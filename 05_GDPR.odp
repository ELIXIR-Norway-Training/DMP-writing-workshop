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2C52A8C77E23918652F.png" manifest:media-type="image/png"/>
  <manifest:file-entry manifest:full-path="Pictures/100002010000051600000432C5304727C0ECF49D.png" manifest:media-type="image/png"/>
  <manifest:file-entry manifest:full-path="Pictures/100002010000044F000003A3D50AD686DBC0D52F.png" manifest:media-type="image/png"/>
  <manifest:file-entry manifest:full-path="Pictures/10000201000002C4000001389E17077FD2C9D029.png" manifest:media-type="image/png"/>
  <manifest:file-entry manifest:full-path="Pictures/TablePreview7.svm" manifest:media-type=""/>
  <manifest:file-entry manifest:full-path="Pictures/TablePreview6.svm" manifest:media-type=""/>
  <manifest:file-entry manifest:full-path="Pictures/100002010000022B000002BD0E32064FAEB92C37.png" manifest:media-type="image/png"/>
  <manifest:file-entry manifest:full-path="Pictures/TablePreview5.svm" manifest:media-type=""/>
  <manifest:file-entry manifest:full-path="Pictures/TablePreview2.svm" manifest:media-type=""/>
  <manifest:file-entry manifest:full-path="Pictures/1000020100000144000000436534AE613C0E33F2.png" manifest:media-type="image/png"/>
  <manifest:file-entry manifest:full-path="Pictures/100002010000040000000400056732C6DA6137D4.png" manifest:media-type="image/png"/>
  <manifest:file-entry manifest:full-path="Pictures/1000020100000400000004001069E99D172314B3.png" manifest:media-type="image/png"/>
  <manifest:file-entry manifest:full-path="Pictures/10000201000006000000080027A80628F8DCA6F3.png" manifest:media-type="image/png"/>
  <manifest:file-entry manifest:full-path="Pictures/10000201000009C40000075B0A51E3C3CD88BC07.png" manifest:media-type="image/png"/>
  <manifest:file-entry manifest:full-path="Pictures/TablePreview4.svm" manifest:media-type=""/>
  <manifest:file-entry manifest:full-path="Pictures/10000000000001B3000000747D76F1BD4040118B.png" manifest:media-type="image/png"/>
  <manifest:file-entry manifest:full-path="Pictures/100002010000026A000002DB51D9E60E858446FD.png" manifest:media-type="image/png"/>
  <manifest:file-entry manifest:full-path="Pictures/TablePreview3.svm" manifest:media-type=""/>
  <manifest:file-entry manifest:full-path="Pictures/1000020100000800000006129C498E2C5ABF3C41.png" manifest:media-type="image/png"/>
  <manifest:file-entry manifest:full-path="Pictures/100002010000064100000800ABB327E47C0DA0AA.png" manifest:media-type="image/png"/>
  <manifest:file-entry manifest:full-path="Pictures/100002010000042700000569970680E867B6566F.png" manifest:media-type="image/png"/>
  <manifest:file-entry manifest:full-path="Pictures/10000201000000ED00000449C8AB390A94284B94.png" manifest:media-type="image/png"/>
  <manifest:file-entry manifest:full-path="Pictures/100002010000043C0000048C60519F59D334BE38.png" manifest:media-type="image/png"/>
  <manifest:file-entry manifest:full-path="Pictures/10000201000000A300000448EACA50CF4303650F.png" manifest:media-type="image/png"/>
  <manifest:file-entry manifest:full-path="Pictures/100000000000020000000174C5E145BF6683B30C.png" manifest:media-type="image/png"/>
  <manifest:file-entry manifest:full-path="Pictures/1000020100000800000005A87429A934D158A4D1.png" manifest:media-type="image/png"/>
  <manifest:file-entry manifest:full-path="Pictures/100002010000010A000003160292EAC3CA21222E.png" manifest:media-type="image/png"/>
  <manifest:file-entry manifest:full-path="Pictures/TablePreview1.svm" manifest:media-type=""/>
  <manifest:file-entry manifest:full-path="Pictures/100000000000032000000215F33B6484BB0748B4.png" manifest:media-type="image/png"/>
  <manifest:file-entry manifest:full-path="Pictures/10000201000001230000004369D9F581B7E7DD98.png" manifest:media-type="image/png"/>
  <manifest:file-entry manifest:full-path="Pictures/1000020100000300000003005C10A696FD01655D.png" manifest:media-type="image/png"/>
  <manifest:file-entry manifest:full-path="Pictures/100000000000032A0000021CFBC0095C002E1384.png" manifest:media-type="image/png"/>
  <manifest:file-entry manifest:full-path="Pictures/100002010000044B00000106C712797C10D8974B.png" manifest:media-type="image/png"/>
  <manifest:file-entry manifest:full-path="Pictures/100002010000080000000480310B4D60D3BBC837.png" manifest:media-type="image/png"/>
  <manifest:file-entry manifest:full-path="Pictures/100002010000033E000003006FD3819535F777FD.png" manifest:media-type="image/png"/>
  <manifest:file-entry manifest:full-path="Pictures/100002010000021A00000073B3ADA33C6E567737.png" manifest:media-type="image/png"/>
  <manifest:file-entry manifest:full-path="Pictures/10000201000002D0000002D0DDE67520C92BF921.png" manifest:media-type="image/png"/>
  <manifest:file-entry manifest:full-path="Pictures/10000201000000CA000000327771BA3BABF58435.png" manifest:media-type="image/png"/>
  <manifest:file-entry manifest:full-path="Pictures/1000020100000370000001130697892BF8D75BA8.png" manifest:media-type="image/png"/>
  <manifest:file-entry manifest:full-path="Pictures/100002010000011300000027C9C4B16A08A534FA.png" manifest:media-type="image/png"/>
  <manifest:file-entry manifest:full-path="Pictures/10000201000008000000040104A924880F94F5A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Exo 2" svg:font-family="'Exo 2'"/>
    <style:font-face style:name="Open Sans" svg:font-family="'Open Sans'"/>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solid" svg:stroke-width="0.026cm" svg:stroke-color="#00000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73763"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84cm, 0cm, 0.882cm)" draw:image-opacity="100%" style:mirror="none"/>
    </style:style>
    <style:style style:name="gr9" style:family="graphic" style:parent-style-name="standard">
      <style:graphic-properties draw:stroke="none" svg:stroke-width="0cm"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4cm" fo:padding-bottom="0cm" fo:padding-left="0cm" fo:padding-right="0cm" fo:wrap-option="wrap"/>
    </style:style>
    <style:style style:name="gr11" style:family="graphic" style:parent-style-name="standard">
      <style:graphic-properties draw:stroke="solid" svg:stroke-width="0.106cm" svg:stroke-color="#351c7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049cc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6aa8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7cm, 0cm, 0.879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544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14cm, 0cm, 10.495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94cm, 0cm, 14.539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936cm, 0cm, 3.608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92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69cm, 0cm, 19.423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87cm, 5.066cm, 5.046cm, 5.095cm)" draw:image-opacity="100%" style:mirror="none"/>
    </style:style>
    <style:style style:name="gr23" style:family="graphic" style:parent-style-name="standard">
      <style:graphic-properties draw:stroke="solid" svg:stroke-width="0.026cm" svg:stroke-color="#a64d79" draw:stroke-linejoin="round" draw:fill="solid" draw:fill-color="#a64d79"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741b47" draw:stroke-linejoin="round" draw:fill="solid" draw:fill-color="#741b47"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ea999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c27ba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5.63cm, 0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277cm, 0cm, 3.352cm, 0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976cm, 0cm, 17.654cm, 0cm)" draw:image-opacity="100%" style:mirror="none"/>
    </style:style>
    <style:style style:name="gr31" style:family="graphic" style:parent-style-name="standard">
      <style:graphic-properties draw:stroke="none" svg:stroke-width="0cm" draw:fill="solid" draw:fill-color="#0b5394" draw:textarea-vertical-align="top" draw:auto-grow-height="false" draw:fit-to-size="false" style:shrink-to-fit="false" fo:min-height="0cm" fo:min-width="0cm" fo:padding-top="0.24cm" fo:padding-bottom="0cm" fo:padding-left="0cm" fo:padding-right="0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77cm, 0cm, 17.373cm, 0cm)" draw:image-opacity="100%" style:mirror="none"/>
    </style:style>
    <style:style style:name="gr33" style:family="graphic" style:parent-style-name="standard">
      <style:graphic-properties draw:stroke="solid" svg:stroke-width="0.026cm" svg:stroke-color="#cccccc"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413cm, 0cm)" draw:image-opacity="100%" style:mirror="none"/>
    </style:style>
    <style:style style:name="gr39"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6fa8dc"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194cm" fo:padding-bottom="0.125cm" fo:padding-left="0.25cm" fo:padding-right="0.25cm" fo:wrap-option="wrap"/>
    </style:style>
    <style:style style:name="gr43" style:family="graphic" style:parent-style-name="standard">
      <style:graphic-properties draw:stroke="solid" svg:stroke-width="0.026cm" svg:stroke-color="#20124d" draw:stroke-linejoin="round" draw:fill="solid" draw:fill-color="#20124d"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51c75" draw:stroke-linejoin="round" draw:fill="solid" draw:fill-color="#351c75"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674ea7"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26cm" svg:stroke-color="#b4a7d6"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d9d2e9"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1cm" svg:stroke-color="#8e7cc3" draw:stroke-linejoin="round" draw:fill="none" draw:textarea-vertical-align="middle" draw:auto-grow-height="false" draw:fit-to-size="false" style:shrink-to-fit="false" fo:min-height="0cm" fo:min-width="0cm" fo:padding-top="0.219cm" fo:padding-bottom="0.175cm" fo:padding-left="0.3cm" fo:padding-right="0.3cm" fo:wrap-option="wrap"/>
    </style:style>
    <style:style style:name="gr49" style:family="graphic" style:parent-style-name="standard">
      <style:graphic-properties draw:stroke="none" svg:stroke-width="0cm" draw:fill="none" draw:textarea-vertical-align="middle" draw:auto-grow-height="false" draw:fit-to-size="false" style:shrink-to-fit="false" fo:min-height="0cm" fo:min-width="0cm" fo:padding-top="0.24cm" fo:padding-bottom="0cm" fo:padding-left="0cm" fo:padding-right="0cm" fo:wrap-option="wrap"/>
    </style:style>
    <style:style style:name="gr50"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none" draw:textarea-vertical-align="top" draw:auto-grow-height="false" draw:fit-to-size="false" style:shrink-to-fit="false" fo:min-height="0cm" fo:min-width="0cm" fo:padding-top="0.184cm" fo:padding-bottom="0.094cm" fo:padding-left="0.188cm" fo:padding-right="0.188cm" fo:wrap-option="wrap"/>
    </style:style>
    <style:style style:name="gr52" style:family="graphic" style:parent-style-name="standard">
      <style:graphic-properties draw:stroke="none" svg:stroke-width="0cm" draw:fill="none" draw:textarea-vertical-align="top" draw:auto-grow-height="false" draw:fit-to-size="false" style:shrink-to-fit="false" fo:min-height="0cm" fo:min-width="0cm" fo:padding-top="0.139cm" fo:padding-bottom="0.094cm" fo:padding-left="0.188cm" fo:padding-right="0.188cm" fo:wrap-option="wrap"/>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357cm)" draw:image-opacity="100%" style:mirror="none"/>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5" style:family="graphic" style:parent-style-name="standard">
      <style:graphic-properties draw:stroke="none" svg:stroke-width="0cm" draw:fill="solid" draw:fill-color="#c23669"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8"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5.799cm, 0.527cm, 0cm)" draw:image-opacity="100%" style:mirror="none"/>
    </style:style>
    <style:style style:name="gr6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034cm, 0cm, 0cm, 8.595cm)" draw:image-opacity="100%" style:mirror="none"/>
    </style:style>
    <style:style style:name="gr6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2"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6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1.033cm)" draw:image-opacity="100%" style:mirror="none"/>
    </style:style>
    <style:style style:name="gr64"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65" style:family="graphic" style:parent-style-name="standard">
      <style:graphic-properties draw:stroke="none" svg:stroke-width="0cm" draw:fill="solid" draw:fill-color="#4d4948" draw:textarea-vertical-align="middle" draw:auto-grow-height="false" draw:fit-to-size="false" style:shrink-to-fit="false" fo:min-height="0cm" fo:min-width="0cm" fo:padding-top="0.19cm" fo:padding-bottom="0.19cm" fo:padding-left="0.19cm" fo:padding-right="0.19cm" fo:wrap-option="wrap"/>
    </style:style>
    <style:style style:name="pr1" style:family="presentation" style:parent-style-name="Title_20_slide_20_ELIXIR-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Title_20_slide_20_ELIXI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 style:family="presentation" style:parent-style-name="Title_20_slide_20_ELIXIR-notes" style:list-style-name="L5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OBJECT-title">
      <style:graphic-properties draw:stroke="none" svg:stroke-width="0cm" draw:fill="none" draw:textarea-vertical-align="middle" draw:auto-grow-height="false" draw:fit-to-size="false" style:shrink-to-fit="false" fo:min-height="2.386cm" fo:padding-top="0.18cm" fo:padding-bottom="0cm" fo:padding-left="0cm" fo:padding-right="0cm" fo:wrap-option="wrap"/>
    </style:style>
    <style:style style:name="pr6" style:family="presentation" style:parent-style-name="OBJECT-outline1">
      <style:graphic-properties draw:stroke="none" svg:stroke-width="0cm" draw:fill="none" draw:textarea-vertical-align="top" draw:auto-grow-height="false" draw:fit-to-size="false" style:shrink-to-fit="false" fo:min-height="8.036cm" fo:padding-top="0.36cm" fo:padding-bottom="0cm" fo:padding-left="0cm" fo:padding-right="0cm" fo:wrap-option="wrap"/>
    </style:style>
    <style:style style:name="pr7"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8"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9"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0"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1"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3"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5"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6"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7"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8"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1"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2"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3"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4" style:family="presentation" style:parent-style-name="OBJECT-title">
      <style:graphic-properties draw:stroke="solid" svg:stroke-width="0.026cm" svg:stroke-color="#0b5394" draw:stroke-linejoin="round" draw:fill="solid" draw:fill-color="#0b5394" draw:textarea-vertical-align="middle" draw:auto-grow-height="false" draw:fit-to-size="false" style:shrink-to-fit="false" fo:min-height="2.386cm" fo:padding-top="0.18cm" fo:padding-bottom="0cm" fo:padding-left="0cm" fo:padding-right="0cm" fo:wrap-option="wrap"/>
    </style:style>
    <style:style style:name="pr25"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6"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7"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8"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9"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0"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1"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2"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3"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4"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5"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6"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7" style:family="presentation" style:parent-style-name="Divider_20_slid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38" style:family="presentation" style:parent-style-name="Divider_20_slide-notes" style:list-style-name="L5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Divider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0"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1"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2"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3"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4"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5" style:family="presentation" style:parent-style-name="TITLE-notes" style:list-style-name="L5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notes" style:list-style-name="L5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8"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9"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0"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1"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2"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3"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4"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5" style:family="presentation" style:parent-style-name="OBJECT-notes" style:list-style-name="L5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6" style:family="presentation" style:parent-style-name="simple-light-2-notes" style:list-style-name="L5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TWO_5f_COLUMNS-notes" style:list-style-name="L5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simple-light-2-notes" style:list-style-name="L5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TWO_5f_COLUMNS-notes" style:list-style-name="L5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20_slide_20_ELIXIR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61" style:family="presentation" style:parent-style-name="Title_20_slide_20_ELIXIR_5f_1-notes" style:list-style-name="L5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2" style:family="presentation" style:parent-style-name="Title_20_slide_20_ELIXIR_5f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8.135cm" style:use-optimal-column-width="false"/>
    </style:style>
    <style:style style:name="co2" style:family="table-column">
      <style:table-column-properties style:column-width="8.139cm" style:use-optimal-column-width="false"/>
    </style:style>
    <style:style style:name="co3" style:family="table-column">
      <style:table-column-properties style:column-width="8.146cm" style:use-optimal-column-width="false"/>
    </style:style>
    <style:style style:name="ro1" style:family="table-row">
      <style:table-row-properties style:row-height="0.982cm"/>
    </style:style>
    <style:style style:name="ro2" style:family="table-row">
      <style:table-row-properties style:row-height="1.699cm"/>
    </style:style>
    <style:style style:name="ro3" style:family="table-row">
      <style:table-row-properties style:row-height="2.417cm"/>
    </style:style>
    <style:style style:name="ro4" style:family="table-row">
      <style:table-row-properties style:row-height="0.985cm"/>
    </style:style>
    <style:style style:name="ro5" style:family="table-row">
      <style:table-row-properties style:row-height="0.983cm"/>
    </style:style>
    <style:style style:name="ro6" style:family="table-row">
      <style:table-row-properties style:row-height="2.419cm"/>
    </style:style>
    <style:style style:name="ro7" style:family="table-row">
      <style:table-row-properties style:row-height="2.098cm"/>
    </style:style>
    <style:style style:name="ro8" style:family="table-row">
      <style:table-row-properties style:row-height="2.42cm"/>
    </style:style>
    <style:style style:name="ce1" style:family="table-cell">
      <loext:graphic-properties draw:fill="none" draw:textarea-vertical-align="top" fo:padding-top="0.097cm" fo:padding-bottom="0.097cm" fo:padding-left="0.187cm" fo:padding-right="0.187cm"/>
      <style:paragraph-properties fo:border="none"/>
    </style:style>
    <style:style style:name="P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41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106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917cm" fo:margin-right="0cm" fo:margin-top="0cm" fo:margin-bottom="0cm" fo:line-height="83%" fo:text-align="center" fo:text-indent="-0.705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4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solid" draw:fill-color="#073763"/>
      <style:paragraph-properties fo:text-align="start" style:font-independent-line-spacing="true"/>
      <style:text-properties fo:font-size="14pt"/>
    </style:style>
    <style:style style:name="P14" style:family="paragraph">
      <loext:graphic-properties draw:fill="solid" draw:fill-color="#cccccc"/>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style:paragraph-properties fo:margin-left="1.27cm" fo:margin-right="0cm" fo:margin-top="0.494cm" fo:margin-bottom="0cm" fo:line-height="115%" fo:text-align="center" fo:text-indent="0cm" style:writing-mode="lr-tb">
        <style:tab-stops>
          <style:tab-stop style:position="0cm"/>
        </style:tab-stops>
      </style:paragraph-properties>
    </style:style>
    <style:style style:name="P24" style:family="paragraph">
      <loext:graphic-properties draw:fill="solid" draw:fill-color="#a64d79"/>
      <style:paragraph-properties fo:text-align="start" style:font-independent-line-spacing="true"/>
      <style:text-properties fo:font-size="14pt"/>
    </style:style>
    <style:style style:name="P25" style:family="paragraph">
      <loext:graphic-properties draw:fill="solid" draw:fill-color="#741b47"/>
      <style:paragraph-properties fo:text-align="start" style:font-independent-line-spacing="true"/>
      <style:text-properties fo:font-size="14pt"/>
    </style:style>
    <style:style style:name="P26" style:family="paragraph">
      <loext:graphic-properties draw:fill="solid" draw:fill-color="#ea9999"/>
      <style:paragraph-properties fo:text-align="start" style:font-independent-line-spacing="true"/>
      <style:text-properties fo:font-size="14pt"/>
    </style:style>
    <style:style style:name="P27" style:family="paragraph">
      <loext:graphic-properties draw:fill="solid" draw:fill-color="#666666"/>
      <style:paragraph-properties fo:text-align="start" style:font-independent-line-spacing="true"/>
      <style:text-properties fo:font-size="14pt"/>
    </style:style>
    <style:style style:name="P28" style:family="paragraph">
      <loext:graphic-properties draw:fill="solid" draw:fill-color="#c27ba0"/>
      <style:paragraph-properties fo:text-align="start" style:font-independent-line-spacing="true"/>
      <style:text-properties fo:font-size="14pt"/>
    </style:style>
    <style:style style:name="P29" style:family="paragraph">
      <style:paragraph-properties fo:margin-left="0cm" fo:margin-right="0cm" fo:margin-top="0.494cm" fo:margin-bottom="0cm" fo:line-height="115%" fo:text-align="start" fo:text-indent="0cm" style:writing-mode="lr-tb"/>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0b5394"/>
      <style:paragraph-properties fo:text-align="start" style:font-independent-line-spacing="true"/>
      <style:text-properties fo:font-size="14pt"/>
    </style:style>
    <style:style style:name="P32" style:family="paragraph">
      <style:paragraph-properties fo:margin-left="1.199cm" fo:margin-right="0cm" fo:margin-top="0cm" fo:margin-bottom="0cm" fo:line-height="83%" fo:text-align="justify" fo:text-indent="-0.899cm" style:writing-mode="lr-tb">
        <style:tab-stops>
          <style:tab-stop style:position="0cm"/>
        </style:tab-stops>
      </style:paragraph-properties>
    </style:style>
    <style:style style:name="P33" style:family="paragraph">
      <loext:graphic-properties draw:fill="solid" draw:fill-color="#efefef"/>
      <style:paragraph-properties fo:text-align="start" style:font-independent-line-spacing="true"/>
      <style:text-properties fo:font-size="14pt"/>
    </style:style>
    <style:style style:name="P34" style:family="paragraph">
      <loext:graphic-properties draw:fill="solid" draw:fill-color="#6fa8dc"/>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start" fo:text-indent="0cm" style:writing-mode="lr-tb"/>
    </style:style>
    <style:style style:name="P36" style:family="paragraph">
      <loext:graphic-properties draw:fill="solid" draw:fill-color="#cfe2f3"/>
      <style:paragraph-properties fo:text-align="start" style:font-independent-line-spacing="true"/>
      <style:text-properties fo:font-size="14pt"/>
    </style:style>
    <style:style style:name="P37" style:family="paragraph">
      <loext:graphic-properties draw:fill="solid" draw:fill-color="#9fc5e8"/>
      <style:paragraph-properties fo:text-align="start" style:font-independent-line-spacing="true"/>
      <style:text-properties fo:font-size="14pt"/>
    </style:style>
    <style:style style:name="P38" style:family="paragraph">
      <loext:graphic-properties draw:fill="solid" draw:fill-color="#0b5394"/>
      <style:paragraph-properties fo:text-align="start" style:font-independent-line-spacing="true"/>
      <style:text-properties fo:font-size="30pt"/>
    </style:style>
    <style:style style:name="P39" style:family="paragraph">
      <style:paragraph-properties fo:margin-left="0cm" fo:margin-right="0cm" fo:margin-top="0cm" fo:margin-bottom="0cm" fo:line-height="83%" fo:text-align="justify" fo:text-indent="0cm" style:writing-mode="lr-tb"/>
    </style:style>
    <style:style style:name="P40"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41" style:family="paragraph">
      <style:paragraph-properties fo:margin-left="0cm" fo:margin-right="0cm" fo:margin-top="0.494cm" fo:margin-bottom="0cm" fo:line-height="115%" fo:text-align="start" fo:text-indent="1.27cm" style:writing-mode="lr-tb">
        <style:tab-stops>
          <style:tab-stop style:position="0cm"/>
        </style:tab-stops>
      </style:paragraph-properties>
    </style:style>
    <style:style style:name="P4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43" style:family="paragraph">
      <loext:graphic-properties draw:fill="none" draw:fill-color="#ffffff"/>
      <style:paragraph-properties fo:text-align="start" style:font-independent-line-spacing="true"/>
      <style:text-properties fo:font-size="14pt" style:font-size-asian="14pt" style:font-size-complex="14pt"/>
    </style:style>
    <style:style style:name="P44" style:family="paragraph">
      <loext:graphic-properties draw:fill="solid" draw:fill-color="#20124d"/>
      <style:paragraph-properties fo:text-align="start" style:font-independent-line-spacing="true"/>
      <style:text-properties fo:font-size="14pt"/>
    </style:style>
    <style:style style:name="P45" style:family="paragraph">
      <loext:graphic-properties draw:fill="solid" draw:fill-color="#351c75"/>
      <style:paragraph-properties fo:text-align="start" style:font-independent-line-spacing="true"/>
      <style:text-properties fo:font-size="14pt"/>
    </style:style>
    <style:style style:name="P46" style:family="paragraph">
      <loext:graphic-properties draw:fill="solid" draw:fill-color="#674ea7"/>
      <style:paragraph-properties fo:text-align="start" style:font-independent-line-spacing="true"/>
      <style:text-properties fo:font-size="14pt"/>
    </style:style>
    <style:style style:name="P47" style:family="paragraph">
      <loext:graphic-properties draw:fill="solid" draw:fill-color="#b4a7d6"/>
      <style:paragraph-properties fo:text-align="start" style:font-independent-line-spacing="true"/>
      <style:text-properties fo:font-size="14pt"/>
    </style:style>
    <style:style style:name="P48" style:family="paragraph">
      <loext:graphic-properties draw:fill="solid" draw:fill-color="#d9d2e9"/>
      <style:paragraph-properties fo:text-align="start" style:font-independent-line-spacing="true"/>
      <style:text-properties fo:font-size="14pt"/>
    </style:style>
    <style:style style:name="P49" style:family="paragraph">
      <style:paragraph-properties fo:margin-left="0cm" fo:margin-right="0cm" fo:margin-top="0.494cm" fo:margin-bottom="0cm" fo:line-height="100%" fo:text-align="start" fo:text-indent="0cm" style:writing-mode="lr-tb">
        <style:tab-stops>
          <style:tab-stop style:position="0cm"/>
        </style:tab-stops>
      </style:paragraph-properties>
    </style:style>
    <style:style style:name="P50" style:family="paragraph">
      <style:paragraph-properties fo:margin-left="0cm" fo:margin-right="0cm" fo:margin-top="0cm" fo:margin-bottom="0cm" fo:line-height="93%" fo:text-align="start" fo:text-indent="0cm" style:writing-mode="lr-tb">
        <style:tab-stops>
          <style:tab-stop style:position="0cm"/>
        </style:tab-stops>
      </style:paragraph-properties>
    </style:style>
    <style:style style:name="P51" style:family="paragraph">
      <style:paragraph-properties fo:margin-left="0cm" fo:margin-right="0cm" fo:margin-top="0cm" fo:margin-bottom="0cm" fo:line-height="83%" fo:text-align="justify" fo:text-indent="0cm" style:writing-mode="lr-tb">
        <style:tab-stops>
          <style:tab-stop style:position="0cm"/>
        </style:tab-stops>
      </style:paragraph-properties>
    </style:style>
    <style:style style:name="P52"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53"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54" style:family="paragraph">
      <loext:graphic-properties draw:fill="solid" draw:fill-color="#c23669"/>
      <style:paragraph-properties fo:text-align="start" style:font-independent-line-spacing="true"/>
      <style:text-properties fo:font-size="14pt"/>
    </style:style>
    <style:style style:name="P5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58"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3f41" style:text-line-through-style="none" style:text-line-through-type="none" style:text-position="0% 100%" style:font-name="Open Sans" fo:font-size="36pt" fo:letter-spacing="normal" fo:font-style="normal" style:text-underline-style="none" fo:font-weight="bold" style:font-name-asian="Open Sans" style:font-size-asian="36pt" style:font-style-asian="normal" style:font-weight-asian="bold" style:font-name-complex="Open Sans"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 style:family="text">
      <style:text-properties fo:font-variant="normal" fo:text-transform="none" fo:color="#4d484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4" style:family="text">
      <style:text-properties fo:font-variant="normal" fo:text-transform="none" fo:color="#003f41" style:text-line-through-style="none" style:text-line-through-type="none" style:text-position="0% 100%" style:font-name="Arial" fo:font-size="43pt" fo:letter-spacing="normal" fo:font-style="normal" style:text-underline-style="none" fo:font-weight="bold" style:font-name-asian="Arial" style:font-size-asian="43pt" style:font-style-asian="normal" style:font-weight-asian="bold" style:font-name-complex="Arial" style:font-size-complex="43pt" style:font-style-complex="normal" style:font-weight-complex="bold"/>
    </style:style>
    <style:style style:name="T5" style:family="text">
      <style:text-properties fo:font-variant="normal" fo:text-transform="none" fo:color="#4d4948" style:text-line-through-style="none" style:text-line-through-type="none" style:text-position="0% 100%" style:font-name="Corbel" fo:font-size="60pt" fo:letter-spacing="normal" fo:font-style="normal" style:text-underline-style="none" fo:font-weight="normal" style:font-name-asian="Corbel" style:font-size-asian="60pt" style:font-style-asian="normal" style:font-weight-asian="normal" style:font-name-complex="Corbel" style:font-size-complex="60pt" style:font-style-complex="normal" style:font-weight-complex="normal"/>
    </style:style>
    <style:style style:name="T6" style:family="text">
      <style:text-properties fo:font-variant="normal" fo:text-transform="none" fo:color="#003f41"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cccc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4" style:family="text">
      <style:text-properties fo:font-variant="normal" fo:text-transform="none" fo:color="#ccccff"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ccccff"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9"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049cc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5" style:family="text">
      <style:text-properties fo:font-variant="normal" fo:text-transform="none" fo:color="#049cc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ccccf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fo:font-variant="normal" fo:text-transform="none" fo:color="#ccccff" style:text-line-through-style="none" style:text-line-through-type="none" style:text-position="0% 100%" style:font-name="Arial" fo:font-size="10pt" fo:letter-spacing="normal"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34"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6" style:family="text">
      <style:text-properties fo:font-variant="normal" fo:text-transform="none" fo:color="#ffffff" style:text-line-through-style="none" style:text-line-through-type="none" style:text-position="0% 100%" style:font-name="Arial" fo:font-size="33pt" fo:letter-spacing="normal" fo:font-style="normal" style:text-underline-style="none" fo:font-weight="bold" style:font-name-asian="Arial" style:font-size-asian="33pt" style:font-style-asian="normal" style:font-weight-asian="bold" style:font-name-complex="Arial" style:font-size-complex="33pt" style:font-style-complex="normal" style:font-weight-complex="bold"/>
    </style:style>
    <style:style style:name="T37" style:family="text">
      <style:text-properties fo:font-variant="normal" fo:text-transform="none" fo:color="#003f41"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38" style:family="text">
      <style:text-properties fo:font-variant="normal" fo:text-transform="none" fo:color="#003f4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0" style:family="text">
      <style:text-properties fo:font-variant="normal" fo:text-transform="none" fo:color="#ccccff" style:text-line-through-style="none" style:text-line-through-type="none" style:text-position="0% 100%" style:font-name="Arial" fo:font-size="11pt" fo:letter-spacing="normal"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5" style:family="text">
      <style:text-properties fo:font-variant="normal" fo:text-transform="none" fo:color="#ccccff" style:text-line-through-style="none" style:text-line-through-type="none" style:text-position="0% 100%" style:font-name="Arial" fo:font-size="9pt" fo:letter-spacing="normal"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font-variant="normal" fo:text-transform="none" fo:color="#049cc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font-variant="normal" fo:text-transform="none" fo:color="#ccccf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font-variant="normal" fo:text-transform="none" fo:color="#049cc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font-variant="normal" fo:text-transform="none" fo:color="#cccc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2" style:family="text">
      <style:text-properties fo:font-variant="normal" fo:text-transform="none" fo:color="#023452"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53"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57" style:family="text">
      <style:text-properties fo:font-variant="normal" fo:text-transform="none" fo:color="#ccccff"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8" style:family="text">
      <style:text-properties fo:font-variant="normal" fo:text-transform="none" fo:color="#049ccf"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62" style:family="text">
      <style:text-properties fo:font-variant="normal" fo:text-transform="none" fo:color="#ccccf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3" style:family="text">
      <style:text-properties fo:font-variant="normal" fo:text-transform="none" fo:color="#049cc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5"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6"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7"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68"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0"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1"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2" style:family="text">
      <style:text-properties fo:font-variant="normal" fo:text-transform="none" fo:color="#005472"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73"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76" style:family="text">
      <style:text-properties fo:font-variant="normal" fo:text-transform="none" fo:color="#cccc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7" style:family="text">
      <style:text-properties fo:font-variant="normal" fo:text-transform="none" fo:color="#ccccff"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78" style:family="text">
      <style:text-properties fo:font-variant="normal" fo:text-transform="none" fo:color="#2a2e3d"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79" style:family="text">
      <style:text-properties fo:font-variant="normal" fo:text-transform="none" fo:color="#c23669"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80" style:family="text">
      <style:text-properties fo:font-variant="normal" fo:text-transform="none" fo:color="#f3f0f1"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1"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82"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83" style:family="text">
      <style:text-properties fo:font-variant="normal" fo:text-transform="none" fo:color="#0097a7"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84" style:family="text">
      <style:text-properties fo:font-variant="normal" fo:text-transform="none" fo:color="#172b4b"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85" style:family="text">
      <style:text-properties fo:font-variant="normal" fo:text-transform="none" fo:color="#0097a7"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86"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87" style:family="text">
      <style:text-properties fo:font-variant="normal" fo:text-transform="none" fo:color="#c23669" style:text-line-through-style="none" style:text-line-through-type="none" style:text-position="0% 100%" style:font-name="Exo 2" fo:font-size="24pt" fo:letter-spacing="normal"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88" style:family="text">
      <style:text-properties fo:font-variant="normal" fo:text-transform="none" fo:color="#4d494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90" style:family="text">
      <style:text-properties fo:font-variant="normal" fo:text-transform="none" fo:color="#003f41"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91"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92" style:family="text">
      <style:text-properties fo:font-variant="normal" fo:text-transform="none" fo:color="#0097a7"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93" style:family="text">
      <style:text-properties fo:font-variant="normal" fo:text-transform="none" fo:color="#0097a7" style:text-line-through-style="none" style:text-line-through-type="none" style:text-position="0% 100%" style:font-name="Open Sans" fo:font-size="10pt" fo:letter-spacing="normal" fo:font-style="normal" style:text-underline-style="solid" style:text-underline-width="auto" style:text-underline-color="font-color" fo:font-weight="normal" style:font-name-asian="Open Sans" style:font-size-asian="10pt" style:font-style-asian="normal" style:font-weight-asian="normal" style:font-name-complex="Open Sans"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2.85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77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1.62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2.92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234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719cm" text:min-label-width="0.7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53cm" text:min-label-width="0.7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513cm" text:min-label-width="0.7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311;g387f1b574d3_0_114" presentation:style-name="pr1" draw:text-style-name="P2" draw:layer="layout" svg:width="13.661cm" svg:height="4.996cm" svg:x="10.713cm" svg:y="1.772cm" presentation:class="title" presentation:user-transformed="true">
          <draw:text-box>
            <text:p text:style-name="P1"><text:span text:style-name="T1"><text:line-break/></text:span><text:span text:style-name="T1">Key Legal Requirements</text:span><text:span text:style-name="T1"><text:line-break/></text:span><text:span text:style-name="T1">for Life Sciences</text:span><text:span text:style-name="T1"><text:line-break/></text:span><text:span text:style-name="T1">Data Management</text:span><text:span text:style-name="T1"><text:line-break/></text:span><text:span text:style-name="T1"> </text:span><text:span text:style-name="T1"><text:line-break/></text:span><text:span text:style-name="T1"/></text:p>
          </draw:text-box>
        </draw:frame>
        <draw:frame draw:name="Google Shape;312;g387f1b574d3_0_114" presentation:style-name="pr2" draw:text-style-name="P4" draw:layer="layout" svg:width="11.941cm" svg:height="1.536cm" svg:x="12.433cm" svg:y="8.82cm" presentation:class="subtitle" presentation:user-transformed="true">
          <draw:text-box>
            <text:p text:style-name="P3"><text:span text:style-name="T2">Nazeefa Fatima</text:span></text:p>
          </draw:text-box>
        </draw:frame>
        <draw:frame draw:name="Google Shape;313;g387f1b574d3_0_114" presentation:style-name="pr3" draw:text-style-name="P6" draw:layer="layout" svg:width="10.612cm" svg:height="1.168cm" svg:x="13.762cm" svg:y="9.971cm" presentation:class="outline" presentation:user-transformed="true">
          <draw:text-box>
            <text:p text:style-name="P5"><text:span text:style-name="T3">Data Steward | National Training Coordinator</text:span></text:p>
            <text:p text:style-name="P5"><text:span text:style-name="T3">ELIXIR Norway</text:span></text:p>
          </draw:text-box>
        </draw:frame>
        <presentation:notes draw:style-name="dp2">
          <draw:frame draw:name="Google Shape;308;g387f1b574d3_0_114:notes" presentation:style-name="pr4" draw:text-style-name="P7" draw:layer="layout" svg:width="15.239cm" svg:height="10.001cm" svg:x="1.905cm" svg:y="12.224cm" presentation:class="notes" presentation:placeholder="true" presentation:user-transformed="true">
            <draw:text-box/>
          </draw:frame>
          <draw:page-thumbnail draw:name="Google Shape;309;g387f1b574d3_0_114:notes" draw:style-name="gr1" draw:layer="layout" svg:width="15.239cm" svg:height="8.572cm" svg:x="1.905cm" svg:y="3.175cm" draw:page-number="1" presentation:class="page"/>
        </presentation:notes>
      </draw:page>
      <draw:page draw:name="Disclaimer" draw:style-name="dp1" draw:master-page-name="OBJECT" presentation:presentation-page-layout-name="AL1T11">
        <draw:frame draw:name="Google Shape;319;p3" presentation:style-name="pr5" draw:text-style-name="P9" draw:layer="layout" svg:width="22.859cm" svg:height="2.383cm" svg:x="1.27cm" svg:y="1.604cm" presentation:class="title" presentation:user-transformed="true">
          <draw:text-box>
            <text:p text:style-name="P8"><text:span text:style-name="T4">Disclaimer</text:span></text:p>
          </draw:text-box>
        </draw:frame>
        <draw:frame draw:name="Google Shape;320;p3" presentation:style-name="pr6" draw:text-style-name="P11" draw:layer="layout" svg:width="22.859cm" svg:height="2.206cm" svg:x="1.27cm" svg:y="6.492cm" presentation:class="outline" presentation:user-transformed="true">
          <draw:text-box>
            <text:p text:style-name="P10"><text:span text:style-name="T5">This is not a legal advice </text:span></text:p>
          </draw:text-box>
        </draw:frame>
        <presentation:notes draw:style-name="dp2">
          <draw:custom-shape draw:name="Google Shape;315;p3: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16;p3:notes" draw:style-name="gr1" draw:layer="layout" svg:width="0.003cm" svg:height="0.003cm" svg:x="0cm" svg:y="1.931cm" draw:page-number="2" presentation:class="page"/>
          <draw:frame draw:name="Google Shape;317;p3:notes" presentation:style-name="pr7" draw:text-style-name="P7"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OBJECT" presentation:presentation-page-layout-name="AL1T11">
        <draw:frame draw:name="Google Shape;326;g34119d947f7_1_99" presentation:style-name="pr5" draw:text-style-name="P9" draw:layer="layout" svg:width="22.859cm" svg:height="2.383cm" svg:x="1.27cm" svg:y="-0.13cm" presentation:class="title" presentation:user-transformed="true">
          <draw:text-box>
            <text:p text:style-name="P8"><text:span text:style-name="T6">Important Relevant Legislations</text:span></text:p>
          </draw:text-box>
        </draw:frame>
        <draw:custom-shape draw:name="Google Shape;327;g34119d947f7_1_99" draw:style-name="gr3" draw:text-style-name="P13" xml:id="id3" draw:id="id3" draw:layer="layout" svg:width="6.418cm" svg:height="1.123cm" svg:x="1.914cm" svg:y="2.787cm">
          <text:p text:style-name="P12"><text:span text:style-name="T7">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8;g34119d947f7_1_99" draw:style-name="gr3" draw:text-style-name="P13" xml:id="id4" draw:id="id4" draw:layer="layout" svg:width="6.418cm" svg:height="1.123cm" svg:x="1.914cm" svg:y="4.335cm">
          <text:p text:style-name="P12"><text:span text:style-name="T7">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9;g34119d947f7_1_99" draw:style-name="gr4" draw:text-style-name="P14" xml:id="id5" draw:id="id5" draw:layer="layout" svg:width="6.418cm" svg:height="1.123cm" svg:x="1.914cm" svg:y="5.816cm">
          <text:p text:style-name="P12"><text:span text:style-name="T8">Health Registr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0;g34119d947f7_1_99" draw:style-name="gr4" draw:text-style-name="P14" xml:id="id6" draw:id="id6" draw:layer="layout" svg:width="6.418cm" svg:height="1.123cm" svg:x="1.914cm" svg:y="7.298cm">
          <text:p text:style-name="P12"><text:span text:style-name="T8">Biotechnolog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1;g34119d947f7_1_99" draw:style-name="gr4" draw:text-style-name="P14" xml:id="id7" draw:id="id7" draw:layer="layout" svg:width="6.418cm" svg:height="1.123cm" svg:x="1.914cm" svg:y="8.78cm">
          <text:p text:style-name="P12"><text:span text:style-name="T8">Archive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2;g34119d947f7_1_99" draw:style-name="gr4" draw:text-style-name="P14" xml:id="id8" draw:id="id8" draw:layer="layout" svg:width="6.418cm" svg:height="1.123cm" svg:x="1.914cm" svg:y="10.261cm">
          <text:p text:style-name="P12"><text:span text:style-name="T8">Paten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3;g34119d947f7_1_99" draw:style-name="gr4" draw:text-style-name="P14" xml:id="id9" draw:id="id9" draw:layer="layout" svg:width="6.418cm" svg:height="1.123cm" svg:x="1.914cm" svg:y="11.743cm">
          <text:p text:style-name="P12"><text:span text:style-name="T8">Copyrigh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34;g34119d947f7_1_99" draw:style-name="gr5" draw:text-style-name="P15" xml:id="id1" draw:id="id1" draw:layer="layout" svg:width="6.103cm" svg:height="7.22cm" svg:x="15.225cm" svg:y="2.787cm">
          <draw:image xlink:href="Pictures/100002010000026A000002DB51D9E60E858446FD.png" xlink:type="simple" xlink:show="embed" xlink:actuate="onLoad">
            <text:p/>
          </draw:image>
        </draw:frame>
        <draw:frame draw:name="Google Shape;335;g34119d947f7_1_99" draw:style-name="gr5" draw:text-style-name="P15" xml:id="id2" draw:id="id2" draw:layer="layout" svg:width="3.28cm" svg:height="2.383cm" svg:x="18.494cm" svg:y="5.398cm">
          <draw:image xlink:href="Pictures/100000000000020000000174C5E145BF6683B30C.png" xlink:type="simple" xlink:show="embed" xlink:actuate="onLoad">
            <text:p/>
          </draw:image>
        </draw:frame>
        <draw:custom-shape draw:name="Google Shape;336;g34119d947f7_1_99" draw:style-name="gr6" draw:text-style-name="P6" xml:id="id10" draw:id="id10" draw:layer="layout" svg:width="14.343cm" svg:height="3.177cm" svg:x="11.078cm" svg:y="10.059cm">
          <text:list text:style-name="L7">
            <text:list-item>
              <text:p text:style-name="P16"><text:span text:style-name="T9">Health Register Act: </text:span><text:span text:style-name="T10"><text:a xlink:href="https://lovdata.no/dokument/NL/lov/2014-06-20-43" xlink:type="simple">https://lovdata.no/dokument/NL/lov/2014-06-20-43</text:a></text:span></text:p>
            </text:list-item>
            <text:list-item>
              <text:p text:style-name="P16"><text:span text:style-name="T9">Biotechnology Act: </text:span><text:span text:style-name="T10"><text:a xlink:href="https://lovdata.no/dokument/LTI/lov/2020-06-19-78" xlink:type="simple">https://lovdata.no/dokument/LTI/lov/2020-06-19-78</text:a></text:span></text:p>
            </text:list-item>
            <text:list-item>
              <text:p text:style-name="P16"><text:span text:style-name="T9">Archives Act: </text:span><text:span text:style-name="T10"><text:a xlink:href="https://lovdata.no/dokument/NL/lov/1992-12-04-126" xlink:type="simple">https://lovdata.no/dokument/NL/lov/1992-12-04-126</text:a></text:span></text:p>
            </text:list-item>
            <text:list-item>
              <text:p text:style-name="P16"><text:span text:style-name="T9">Patents Act: </text:span><text:span text:style-name="T10"><text:a xlink:href="https://lovdata.no/dokument/LTI/lov/2019-06-21-49" xlink:type="simple">https://lovdata.no/dokument/LTI/lov/2019-06-21-49</text:a></text:span></text:p>
            </text:list-item>
            <text:list-item>
              <text:p text:style-name="P16"><text:span text:style-name="T9">Copyright Act: </text:span><text:span text:style-name="T10"><text:a xlink:href="https://lovdata.no/dokument/NL/lov/2018-06-15-40" xlink:type="simple">https://lovdata.no/dokument/NL/lov/2018-06-15-40</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3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4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4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custom-shape draw:name="Google Shape;322;g34119d947f7_1_99: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23;g34119d947f7_1_99:notes" draw:style-name="gr1" draw:layer="layout" svg:width="0.003cm" svg:height="0.003cm" svg:x="0cm" svg:y="1.931cm" draw:page-number="3" presentation:class="page"/>
          <draw:frame draw:name="Google Shape;324;g34119d947f7_1_99:notes" presentation:style-name="pr8" draw:text-style-name="P7"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OBJECT" presentation:presentation-page-layout-name="AL1T11">
        <draw:frame draw:name="Google Shape;342;p5" presentation:style-name="pr5" draw:text-style-name="P9" draw:layer="layout" svg:width="22.859cm" svg:height="2.383cm" svg:x="1.27cm" svg:y="0.505cm" presentation:class="title" presentation:user-transformed="true">
          <draw:text-box>
            <text:p text:style-name="P8"><text:span text:style-name="T6">Important Relevant Legislations</text:span></text:p>
          </draw:text-box>
        </draw:frame>
        <draw:custom-shape draw:name="Google Shape;343;p5" draw:style-name="gr7" draw:text-style-name="P13" xml:id="id12" draw:id="id12" draw:layer="layout" svg:width="6.418cm" svg:height="1.123cm" svg:x="1.914cm" svg:y="4.269cm">
          <text:p text:style-name="P12"><text:span text:style-name="T7">Personal Data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4;p5" draw:style-name="gr3" draw:text-style-name="P13" xml:id="id13" draw:id="id13" draw:layer="layout" svg:width="13.467cm" svg:height="1.267cm" svg:x="1.914cm" svg:y="5.672cm">
          <text:p text:style-name="P12"><text:a xlink:href="https://lovdata.no/dokument/SF/forskrift/2018-06-15-876" xlink:type="simple">Regulations on the processing of personal data</text:a></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5;p5" draw:style-name="gr7" draw:text-style-name="P13" xml:id="id14" draw:id="id14" draw:layer="layout" svg:width="12.728cm" svg:height="1.123cm" svg:x="1.914cm" svg:y="7.298cm">
          <text:p text:style-name="P12"><text:span text:style-name="T7">General Data Protection Regulation (GDP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46;p5" draw:style-name="gr8" draw:text-style-name="P15" xml:id="id11" draw:id="id11" draw:layer="layout" svg:width="5.472cm" svg:height="3.975cm" svg:x="18.038cm" svg:y="4.758cm">
          <draw:image xlink:href="Pictures/100000000000032A0000021CFBC0095C002E1384.png" xlink:type="simple" xlink:show="embed" xlink:actuate="onLoad">
            <text:p/>
          </draw:image>
        </draw:frame>
        <draw:custom-shape draw:name="Google Shape;347;p5" draw:style-name="gr6" draw:text-style-name="P6" xml:id="id15" draw:id="id15" draw:layer="layout" svg:width="12.728cm" svg:height="1.777cm" svg:x="1.914cm" svg:y="8.78cm">
          <text:p text:style-name="P12"><text:span text:style-name="T11">The GDPR is an EU Regulation that applies </text:span><text:span text:style-name="T11"><text:line-break/></text:span><text:span text:style-name="T11">directly to Norway, as a member of the E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 smil:attributeName="visibility" smil:to="visible"/>
                  <anim:transitionFilter smil:dur="0.3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4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4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custom-shape draw:name="Google Shape;338;p5: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39;p5:notes" draw:style-name="gr1" draw:layer="layout" svg:width="0.003cm" svg:height="0.003cm" svg:x="0cm" svg:y="1.931cm" draw:page-number="4" presentation:class="page"/>
          <draw:frame draw:name="Google Shape;340;p5:notes" presentation:style-name="pr9"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OBJECT" presentation:presentation-page-layout-name="AL1T11">
        <draw:custom-shape draw:name="Google Shape;353;p6" draw:style-name="gr9" draw:text-style-name="P13" xml:id="id17" draw:id="id17" draw:layer="layout" svg:width="14.017cm" svg:height="1.597cm" svg:x="6.005cm" svg:y="1.321cm">
          <text:p text:style-name="P17"><text:span text:style-name="T12">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4;p6" draw:style-name="gr5" draw:text-style-name="P15" xml:id="id16" draw:id="id16" draw:layer="layout" svg:width="1.98cm" svg:height="1.438cm" svg:x="2.371cm" svg:y="1.479cm">
          <draw:image xlink:href="Pictures/100000000000020000000174C5E145BF6683B30C.png" xlink:type="simple" xlink:show="embed" xlink:actuate="onLoad">
            <text:p/>
          </draw:image>
        </draw:frame>
        <draw:custom-shape draw:name="Google Shape;355;p6" draw:style-name="gr6" draw:text-style-name="P6" xml:id="id18" draw:id="id18" draw:layer="layout" svg:width="21.799cm" svg:height="1.139cm" svg:x="0.999cm" svg:y="12.611cm">
          <text:p text:style-name="P1"><text:span text:style-name="T13">Research Ethics Act: </text:span><text:span text:style-name="T14"><text:a xlink:href="https://lovdata.no/dokument/NL/lov/2017-04-28-23" xlink:type="simple">https://lovdata.no/dokument/NL/lov/2017-04-28-2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6" draw:style-name="gr10" draw:text-style-name="P6" xml:id="id20" draw:id="id20" draw:layer="layout" svg:width="22.499cm" svg:height="7.85cm" svg:x="2.329cm" svg:y="4.156cm">
          <text:p text:style-name="P18"><text:span text:style-name="T15">Withhold-, mislead about-, or selectively/secretly dispose of undesired results.</text:span></text:p>
          <text:p text:style-name="P19"><text:span text:style-name="T15">Conceal of scientific efforts and / or scientific achievements. Improper allocation of authorship etc.</text:span></text:p>
          <text:p text:style-name="P19"><text:span text:style-name="T15">Destruction of research data / material to prevent investigations of miscon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7;p6" draw:style-name="gr5" draw:text-style-name="P15" xml:id="id19" draw:id="id19" draw:layer="layout" svg:width="2.642cm" svg:height="7.85cm" svg:x="0.669cm" svg:y="3.455cm">
          <draw:image xlink:href="Pictures/100002010000010A000003160292EAC3CA21222E.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6" smil:attributeName="visibility" smil:to="visible"/>
                  <anim:transitionFilter smil:dur="0.3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4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custom-shape draw:name="Google Shape;349;p6: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50;p6:notes" draw:style-name="gr1" draw:layer="layout" svg:width="0.003cm" svg:height="0.003cm" svg:x="0cm" svg:y="1.931cm" draw:page-number="5" presentation:class="page"/>
          <draw:frame draw:name="Google Shape;351;p6:notes" presentation:style-name="pr10"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OBJECT" presentation:presentation-page-layout-name="AL1T11">
        <draw:frame draw:name="Google Shape;363;p7" draw:style-name="gr5" draw:text-style-name="P15" xml:id="id21" draw:id="id21" draw:layer="layout" svg:width="1.471cm" svg:height="1.068cm" svg:x="0.493cm" svg:y="0.406cm">
          <draw:image xlink:href="Pictures/100000000000020000000174C5E145BF6683B30C.png" xlink:type="simple" xlink:show="embed" xlink:actuate="onLoad">
            <text:p/>
          </draw:image>
        </draw:frame>
        <draw:custom-shape draw:name="Google Shape;364;p7" draw:style-name="gr6" draw:text-style-name="P6" xml:id="id28" draw:id="id28" draw:layer="layout" svg:width="9.719cm" svg:height="1.284cm" svg:x="7.276cm" svg:y="12.51cm">
          <text:p text:style-name="P1"><text:span text:style-name="T16">Read more at: </text:span><text:span text:style-name="T17"><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p7" draw:style-name="gr5" draw:text-style-name="P15" draw:layer="layout" svg:width="9.543cm" svg:height="2.276cm" svg:x="7.759cm" svg:y="0.621cm">
          <draw:image xlink:href="Pictures/100002010000044B00000106C712797C10D8974B.png" xlink:type="simple" xlink:show="embed" xlink:actuate="onLoad">
            <text:p/>
          </draw:image>
        </draw:frame>
        <draw:custom-shape draw:name="Google Shape;366;p7" draw:style-name="gr11" draw:text-style-name="P6" xml:id="id22" draw:id="id22" draw:layer="layout" svg:width="7.007cm" svg:height="1.547cm" svg:x="1.752cm" svg:y="4.506cm">
          <text:p text:style-name="P12"><text:span text:style-name="T18">General guidelines on research eth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7;p7" draw:style-name="gr11" draw:text-style-name="P6" xml:id="id23" draw:id="id23" draw:layer="layout" svg:width="9.719cm" svg:height="1.722cm" svg:x="1.817cm" svg:y="6.466cm">
          <text:p text:style-name="P20"><text:span text:style-name="T18">Guidelines for Research Ethics in Science and Technolog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8;p7" draw:style-name="gr12" draw:text-style-name="P6" xml:id="id24" draw:id="id24" draw:layer="layout" svg:width="10.012cm" svg:height="2.042cm" svg:x="12.793cm" svg:y="4.011cm">
          <text:p text:style-name="P21"><text:span text:style-name="T18">Guidelines for the use of genetic studies of hum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p7" draw:style-name="gr12" draw:text-style-name="P6" xml:id="id25" draw:id="id25" draw:layer="layout" svg:width="8.914cm" svg:height="1.866cm" svg:x="12.793cm" svg:y="6.323cm">
          <text:p text:style-name="P21"><text:span text:style-name="T18">Guidelines for the inclusion of wome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0;p7" draw:style-name="gr12" draw:text-style-name="P6" xml:id="id26" draw:id="id26" draw:layer="layout" svg:width="7.727cm" svg:height="1.722cm" svg:x="1.964cm" svg:y="8.716cm">
          <text:p text:style-name="P21"><text:span text:style-name="T18">Guidelines for clinical trial of dr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7" draw:style-name="gr11" draw:text-style-name="P6" xml:id="id27" draw:id="id27" draw:layer="layout" svg:width="13.307cm" svg:height="2.042cm" svg:x="11.537cm" svg:y="8.556cm">
          <text:p text:style-name="P21"><text:span text:style-name="T18">Guidelines for research ethics and scientific assessment of qualitative research projec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1" smil:attributeName="visibility" smil:to="visible"/>
                  <anim:transitionFilter smil:dur="0.3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4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3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4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4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custom-shape draw:name="Google Shape;359;p7: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0;p7:notes" draw:style-name="gr1" draw:layer="layout" svg:width="0.003cm" svg:height="0.003cm" svg:x="0cm" svg:y="1.931cm" draw:page-number="6" presentation:class="page"/>
          <draw:frame draw:name="Google Shape;361;p7:notes" presentation:style-name="pr11"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OBJECT" presentation:presentation-page-layout-name="AL1T11">
        <draw:frame draw:name="Google Shape;377;p8" draw:style-name="gr5" draw:text-style-name="P15" xml:id="id29" draw:id="id29" draw:layer="layout" svg:width="1.471cm" svg:height="1.068cm" svg:x="0.493cm" svg:y="0.406cm">
          <draw:image xlink:href="Pictures/100000000000020000000174C5E145BF6683B30C.png" xlink:type="simple" xlink:show="embed" xlink:actuate="onLoad">
            <text:p/>
          </draw:image>
        </draw:frame>
        <draw:custom-shape draw:name="Google Shape;378;p8" draw:style-name="gr6" draw:text-style-name="P6" xml:id="id34" draw:id="id34" draw:layer="layout" svg:width="11.026cm" svg:height="1.284cm" svg:x="13.617cm" svg:y="12.611cm">
          <text:p text:style-name="P1"><text:span text:style-name="T16">Read more at: </text:span><text:span text:style-name="T17"><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p8" draw:style-name="gr5" draw:text-style-name="P15" draw:layer="layout" svg:width="9.543cm" svg:height="2.276cm" svg:x="7.759cm" svg:y="0.621cm">
          <draw:image xlink:href="Pictures/100002010000044B00000106C712797C10D8974B.png" xlink:type="simple" xlink:show="embed" xlink:actuate="onLoad">
            <text:p/>
          </draw:image>
        </draw:frame>
        <draw:custom-shape draw:name="Google Shape;380;p8" draw:style-name="gr13" draw:text-style-name="P6" xml:id="id30" draw:id="id30" draw:layer="layout" svg:width="10.882cm" svg:height="1.722cm" svg:x="1.817cm" svg:y="4.146cm">
          <text:p text:style-name="P17"><text:span text:style-name="T18">The Vancouver Recommend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1;p8" draw:style-name="gr13" draw:text-style-name="P6" xml:id="id31" draw:id="id31" draw:layer="layout" svg:width="10.882cm" svg:height="1.722cm" svg:x="1.817cm" svg:y="6.466cm">
          <text:p text:style-name="P17"><text:span text:style-name="T18">Declaration of Helsink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2;p8" draw:style-name="gr13" draw:text-style-name="P6" xml:id="id32" draw:id="id32" draw:layer="layout" svg:width="10.882cm" svg:height="1.722cm" svg:x="1.817cm" svg:y="8.716cm">
          <text:p text:style-name="P8"><text:span text:style-name="T18">Oveido Conven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3;p8" draw:style-name="gr14" draw:text-style-name="P22" xml:id="id33" draw:id="id33" draw:layer="layout" svg:width="11.845cm" svg:height="1.958cm" svg:x="1.614cm" svg:y="10.606cm">
          <text:p text:style-name="P12"><text:span text:style-name="T19">Otherwise known as: </text:span><text:span text:style-name="T20">The Convention for the Protection of Human Rights and Dignity of the Human Being with regard to the Application of Biology and Medicine</text:span></text:p>
          <text:p text:style-name="P12"><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9" smil:attributeName="visibility" smil:to="visible"/>
                  <anim:transitionFilter smil:dur="0.3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4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custom-shape draw:name="Google Shape;373;p8: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4;p8:notes" draw:style-name="gr1" draw:layer="layout" svg:width="0.003cm" svg:height="0.003cm" svg:x="0cm" svg:y="1.931cm" draw:page-number="7" presentation:class="page"/>
          <draw:frame draw:name="Google Shape;375;p8:notes" presentation:style-name="pr12"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OBJECT" presentation:presentation-page-layout-name="AL1T11">
        <draw:custom-shape draw:name="Google Shape;389;p9" draw:style-name="gr9" draw:text-style-name="P13" xml:id="id36" draw:id="id36" draw:layer="layout" svg:width="14.017cm" svg:height="1.597cm" svg:x="6.005cm" svg:y="0.686cm">
          <text:p text:style-name="P17"><text:span text:style-name="T12">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90;p9" draw:style-name="gr5" draw:text-style-name="P15" xml:id="id35" draw:id="id35" draw:layer="layout" svg:width="1.98cm" svg:height="1.438cm" svg:x="2.371cm" svg:y="0.844cm">
          <draw:image xlink:href="Pictures/100000000000020000000174C5E145BF6683B30C.png" xlink:type="simple" xlink:show="embed" xlink:actuate="onLoad">
            <text:p/>
          </draw:image>
        </draw:frame>
        <draw:custom-shape draw:name="Google Shape;391;p9" draw:style-name="gr6" draw:text-style-name="P6" xml:id="id45" draw:id="id45" draw:layer="layout" svg:width="21.799cm" svg:height="1.139cm" svg:x="0.362cm" svg:y="13.034cm">
          <text:p text:style-name="P1"><text:span text:style-name="T13">Health Research Act:</text:span><text:span text:style-name="T22"> </text:span><text:span text:style-name="T14"><text:a xlink:href="https://lovdata.no/dokument/LTI/lov/2008-06-20-44" xlink:type="simple">https://lovdata.no/dokument/LTI/lov/2008-06-20-44</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9" draw:style-name="gr10" draw:text-style-name="P6" xml:id="id38" draw:id="id38" draw:layer="layout" svg:width="22.499cm" svg:height="1.597cm" svg:x="2.329cm" svg:y="3.098cm">
          <text:p text:style-name="P19"><text:span text:style-name="T23">Prior approval for health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9" draw:style-name="gr10" draw:text-style-name="P6" xml:id="id39" draw:id="id39" draw:layer="layout" svg:width="22.499cm" svg:height="1.597cm" svg:x="2.329cm" svg:y="4.58cm">
          <text:p text:style-name="P19"><text:span text:style-name="T23">Consent from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9" draw:style-name="gr10" draw:text-style-name="P6" xml:id="id40" draw:id="id40" draw:layer="layout" svg:width="22.499cm" svg:height="1.597cm" svg:x="2.329cm" svg:y="5.85cm">
          <text:p text:style-name="P19"><text:span text:style-name="T23">Data access rights for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9" draw:style-name="gr10" draw:text-style-name="P6" xml:id="id41" draw:id="id41" draw:layer="layout" svg:width="22.499cm" svg:height="1.597cm" svg:x="2.407cm" svg:y="7.156cm">
          <text:p text:style-name="P19"><text:span text:style-name="T23">Biobank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9" draw:style-name="gr10" draw:text-style-name="P6" xml:id="id42" draw:id="id42" draw:layer="layout" svg:width="22.499cm" svg:height="1.597cm" svg:x="2.407cm" svg:y="8.426cm">
          <text:p text:style-name="P19"><text:span text:style-name="T23">Maximum data storage time for non-archived data </text:span><text:span text:style-name="T23"><text:line-break/></text:span><text:span text:style-name="T23">(Default: 5 years after end of project – exemptions: appr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9" draw:style-name="gr10" draw:text-style-name="P6" xml:id="id43" draw:id="id43" draw:layer="layout" svg:width="22.499cm" svg:height="1.597cm" svg:x="2.407cm" svg:y="10.542cm">
          <text:p text:style-name="P19"><text:span text:style-name="T23">Regional Committees for Medical and Health Research Ethics (R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8;p9" draw:style-name="gr5" draw:text-style-name="P15" xml:id="id44" draw:id="id44" draw:layer="layout" svg:width="7.473cm" svg:height="1.597cm" svg:x="16.671cm" svg:y="11.595cm">
          <draw:image xlink:href="Pictures/100002010000021A00000073B3ADA33C6E567737.png" xlink:type="simple" xlink:show="embed" xlink:actuate="onLoad">
            <text:p/>
          </draw:image>
        </draw:frame>
        <draw:frame draw:name="Google Shape;399;p9" draw:style-name="gr5" draw:text-style-name="P15" xml:id="id37" draw:id="id37" draw:layer="layout" svg:width="1.83cm" svg:height="8.474cm" svg:x="1.43cm" svg:y="3.098cm">
          <draw:image xlink:href="Pictures/10000201000000ED00000449C8AB390A94284B94.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4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custom-shape draw:name="Google Shape;385;p9: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6;p9:notes" draw:style-name="gr1" draw:layer="layout" svg:width="0.003cm" svg:height="0.003cm" svg:x="0cm" svg:y="1.931cm" draw:page-number="8" presentation:class="page"/>
          <draw:frame draw:name="Google Shape;387;p9:notes" presentation:style-name="pr13"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OBJECT" presentation:presentation-page-layout-name="AL1T11">
        <draw:custom-shape draw:name="Google Shape;405;p10" draw:style-name="gr9" draw:text-style-name="P13" xml:id="id47" draw:id="id47" draw:layer="layout" svg:width="18.961cm" svg:height="1.827cm" svg:x="5.197cm" svg:y="0.686cm">
          <text:p text:style-name="P17"><text:span text:style-name="T24">GDPR: General Data Protection Regul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6;p10" draw:style-name="gr15" draw:text-style-name="P15" xml:id="id46" draw:id="id46" draw:layer="layout" svg:width="1.98cm" svg:height="1.438cm" svg:x="2.371cm" svg:y="0.844cm">
          <draw:image xlink:href="Pictures/100000000000032000000215F33B6484BB0748B4.png" xlink:type="simple" xlink:show="embed" xlink:actuate="onLoad">
            <text:p/>
          </draw:image>
        </draw:frame>
        <draw:custom-shape draw:name="Google Shape;407;p10" draw:style-name="gr6" draw:text-style-name="P6" xml:id="id62" draw:id="id62" draw:layer="layout" svg:width="21.799cm" svg:height="1.09cm" svg:x="0.278cm" svg:y="13.118cm">
          <text:p text:style-name="P1"><text:span text:style-name="T21">GDPR:</text:span><text:span text:style-name="T25"> </text:span><text:span text:style-name="T26"><text:a xlink:href="https://eur-lex.europa.eu/legal-content/EN/TXT/PDF/?uri=OJ:L:2016:119:FULL" xlink:type="simple">https://eur-lex.europa.eu/legal-content/EN/TXT/PDF/?uri=OJ:L:2016:119:FU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10" draw:style-name="gr10" draw:text-style-name="P6" xml:id="id49" draw:id="id49" draw:layer="layout" svg:width="22.499cm" svg:height="1.597cm" svg:x="2.329cm" svg:y="3.098cm">
          <text:p text:style-name="P19"><text:span text:style-name="T23">Protec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10" draw:style-name="gr10" draw:text-style-name="P6" xml:id="id50" draw:id="id50" draw:layer="layout" svg:width="22.499cm" svg:height="1.597cm" svg:x="2.329cm" svg:y="4.368cm">
          <text:p text:style-name="P19"><text:span text:style-name="T23">Privacy by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10" draw:style-name="gr10" draw:text-style-name="P6" xml:id="id52" draw:id="id52" draw:layer="layout" svg:width="22.499cm" svg:height="1.597cm" svg:x="2.329cm" svg:y="5.638cm">
          <text:p text:style-name="P19"><text:span text:style-name="T23">Data Protection Impact Assessment (D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10" draw:style-name="gr10" draw:text-style-name="P6" xml:id="id54" draw:id="id54" draw:layer="layout" svg:width="22.499cm" svg:height="1.597cm" svg:x="2.407cm" svg:y="6.732cm">
          <text:p text:style-name="P19"><text:span text:style-name="T23">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10" draw:style-name="gr10" draw:text-style-name="P6" xml:id="id56" draw:id="id56" draw:layer="layout" svg:width="22.499cm" svg:height="1.597cm" svg:x="2.407cm" svg:y="7.791cm">
          <text:p text:style-name="P19"><text:span text:style-name="T23">Technical and organisational measure to sec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10" draw:style-name="gr10" draw:text-style-name="P6" xml:id="id58" draw:id="id58" draw:layer="layout" svg:width="22.499cm" svg:height="1.597cm" svg:x="2.407cm" svg:y="9.061cm">
          <text:p text:style-name="P19"><text:span text:style-name="T23">Records of Processing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10" draw:style-name="gr10" draw:text-style-name="P6" xml:id="id59" draw:id="id59" draw:layer="layout" svg:width="22.499cm" svg:height="1.597cm" svg:x="2.407cm" svg:y="10.119cm">
          <text:p text:style-name="P19"><text:span text:style-name="T23">Access rights, Right to be forgotten, Right on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10" draw:style-name="gr10" draw:text-style-name="P6" xml:id="id61" draw:id="id61" draw:layer="layout" svg:width="22.499cm" svg:height="1.597cm" svg:x="2.407cm" svg:y="11.177cm">
          <text:p text:style-name="P19"><text:span text:style-name="T23">Fine for severe violations: Up to 20 million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10" draw:style-name="gr16" draw:text-style-name="P15" xml:id="id48" draw:id="id48" draw:layer="layout" svg:width="1.214cm" svg:height="2.098cm" svg:x="2.117cm" svg:y="3.322cm">
          <draw:image xlink:href="Pictures/10000201000000A300000448EACA50CF4303650F.png" xlink:type="simple" xlink:show="embed" xlink:actuate="onLoad">
            <text:p/>
          </draw:image>
        </draw:frame>
        <draw:frame draw:name="Google Shape;417;p10" draw:style-name="gr17" draw:text-style-name="P15" xml:id="id51" draw:id="id51" draw:layer="layout" svg:width="1.339cm" svg:height="1.269cm" svg:x="2.117cm" svg:y="5.608cm">
          <draw:image xlink:href="Pictures/10000201000000A300000448EACA50CF4303650F.png" xlink:type="simple" xlink:show="embed" xlink:actuate="onLoad">
            <text:p/>
          </draw:image>
        </draw:frame>
        <draw:frame draw:name="Google Shape;418;p10" draw:style-name="gr18" draw:text-style-name="P15" xml:id="id53" draw:id="id53" draw:layer="layout" svg:width="1.339cm" svg:height="0.857cm" svg:x="2.117cm" svg:y="6.932cm">
          <draw:image xlink:href="Pictures/10000201000000A300000448EACA50CF4303650F.png" xlink:type="simple" xlink:show="embed" xlink:actuate="onLoad">
            <text:p/>
          </draw:image>
        </draw:frame>
        <draw:frame draw:name="Google Shape;419;p10" draw:style-name="gr19" draw:text-style-name="P15" xml:id="id57" draw:id="id57" draw:layer="layout" svg:width="1.214cm" svg:height="2.098cm" svg:x="2.242cm" svg:y="9.096cm">
          <draw:image xlink:href="Pictures/10000201000000A300000448EACA50CF4303650F.png" xlink:type="simple" xlink:show="embed" xlink:actuate="onLoad">
            <text:p/>
          </draw:image>
        </draw:frame>
        <draw:frame draw:name="Google Shape;420;p10" draw:style-name="gr5" draw:text-style-name="P15" xml:id="id55" draw:id="id55" draw:layer="layout" svg:width="0.857cm" svg:height="0.857cm" svg:x="2.411cm" svg:y="8.04cm">
          <draw:image xlink:href="Pictures/1000020100000300000003005C10A696FD01655D.png" xlink:type="simple" xlink:show="embed" xlink:actuate="onLoad">
            <text:p/>
          </draw:image>
        </draw:frame>
        <draw:frame draw:name="Google Shape;421;p10" draw:style-name="gr5" draw:text-style-name="P15" xml:id="id60" draw:id="id60" draw:layer="layout" svg:width="0.552cm" svg:height="0.736cm" svg:x="2.716cm" svg:y="11.528cm">
          <draw:image xlink:href="Pictures/10000201000006000000080027A80628F8DCA6F3.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6" smil:attributeName="visibility" smil:to="visible"/>
                  <anim:transitionFilter smil:dur="0.3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4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custom-shape draw:name="Google Shape;401;p10: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2;p10:notes" draw:style-name="gr1" draw:layer="layout" svg:width="0.003cm" svg:height="0.003cm" svg:x="0cm" svg:y="1.931cm" draw:page-number="9" presentation:class="page"/>
          <draw:frame draw:name="Google Shape;403;p10:notes" presentation:style-name="pr14"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1T11">
        <draw:custom-shape draw:name="Google Shape;427;g34119d947f7_1_194" draw:style-name="gr9" draw:text-style-name="P13" xml:id="id64" draw:id="id64" draw:layer="layout" svg:width="18.546cm" svg:height="1.597cm" svg:x="5.088cm" svg:y="0.734cm">
          <text:p text:style-name="P17"><text:span text:style-name="T27">Personal Data Act &amp; Personal Data Regula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28;g34119d947f7_1_194" draw:style-name="gr5" draw:text-style-name="P15" xml:id="id63" draw:id="id63" draw:layer="layout" svg:width="1.98cm" svg:height="1.438cm" svg:x="2.371cm" svg:y="0.844cm">
          <draw:image xlink:href="Pictures/100000000000020000000174C5E145BF6683B30C.png" xlink:type="simple" xlink:show="embed" xlink:actuate="onLoad">
            <text:p/>
          </draw:image>
        </draw:frame>
        <draw:custom-shape draw:name="Google Shape;429;g34119d947f7_1_194" draw:style-name="gr6" draw:text-style-name="P6" xml:id="id72" draw:id="id72" draw:layer="layout" svg:width="23.568cm" svg:height="2.839cm" svg:x="0.362cm" svg:y="10.825cm">
          <text:p text:style-name="P1"><text:span text:style-name="T21">More information at:</text:span></text:p>
          <text:list text:style-name="L17">
            <text:list-item>
              <text:p text:style-name="P1"><text:span text:style-name="T21">Regulations on the processing of personal data: </text:span><text:span text:style-name="T26"><text:a xlink:href="https://lovdata.no/dokument/SF/forskrift/2018-06-15-876" xlink:type="simple">https://lovdata.no/dokument/SF/forskrift/2018-06-15-876</text:a></text:span></text:p>
            </text:list-item>
            <text:list-item>
              <text:p text:style-name="P1"><text:span text:style-name="T21">Transitional rules on the processing of personal data: </text:span><text:span text:style-name="T26"><text:a xlink:href="https://lovdata.no/dokument/SF/forskrift/2018-06-15-877" xlink:type="simple">https://lovdata.no/dokument/SF/forskrift/2018-06-15-877</text:a></text:span></text:p>
            </text:list-item>
            <text:list-item>
              <text:p text:style-name="P1"><text:span text:style-name="T21">Personal Data Act: </text:span><text:span text:style-name="T26"><text:a xlink:href="https://lovdata.no/dokument/NL/lov/2018-06-15-38" xlink:type="simple">https://lovdata.no/dokument/NL/lov/2018-06-15-3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g34119d947f7_1_194" draw:style-name="gr10" draw:text-style-name="P6" xml:id="id65" draw:id="id65" draw:layer="layout" svg:width="22.499cm" svg:height="1.597cm" svg:x="2.004cm" svg:y="2.494cm">
          <text:p text:style-name="P23"><text:span text:style-name="T28">National Implementation of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g34119d947f7_1_194" draw:style-name="gr10" draw:text-style-name="P6" xml:id="id67" draw:id="id67" draw:layer="layout" svg:width="22.499cm" svg:height="1.597cm" svg:x="2.329cm" svg:y="4.58cm">
          <text:p text:style-name="P19"><text:span text:style-name="T23">Consent from participants (13 years and 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g34119d947f7_1_194" draw:style-name="gr10" draw:text-style-name="P6" xml:id="id69" draw:id="id69" draw:layer="layout" svg:width="22.499cm" svg:height="1.597cm" svg:x="2.329cm" svg:y="6.485cm">
          <text:p text:style-name="P19"><text:span text:style-name="T23">Exceptions for archival, public interest, and scientific rea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g34119d947f7_1_194" draw:style-name="gr10" draw:text-style-name="P6" xml:id="id71" draw:id="id71" draw:layer="layout" svg:width="22.499cm" svg:height="2.259cm" svg:x="2.407cm" svg:y="8.187cm">
          <text:p text:style-name="P19"><text:span text:style-name="T23">Authorities: Privacy Ombudsman (Datatilsynet), Privacy Committees,</text:span><text:span text:style-name="T23"><text:line-break/></text:span><text:span text:style-name="T23">Data Inspector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g34119d947f7_1_194" draw:style-name="gr20" draw:text-style-name="P15" xml:id="id70" draw:id="id70" draw:layer="layout" svg:width="2.447cm" svg:height="1.923cm" svg:x="0.964cm" svg:y="8.074cm">
          <draw:image xlink:href="Pictures/10000201000000ED00000449C8AB390A94284B94.png" xlink:type="simple" xlink:show="embed" xlink:actuate="onLoad">
            <text:p/>
          </draw:image>
        </draw:frame>
        <draw:frame draw:name="Google Shape;435;g34119d947f7_1_194" draw:style-name="gr21" draw:text-style-name="P15" xml:id="id66" draw:id="id66" draw:layer="layout" svg:width="2.447cm" svg:height="1.923cm" svg:x="0.964cm" svg:y="4.067cm">
          <draw:image xlink:href="Pictures/10000201000000ED00000449C8AB390A94284B94.png" xlink:type="simple" xlink:show="embed" xlink:actuate="onLoad">
            <text:p/>
          </draw:image>
        </draw:frame>
        <draw:frame draw:name="Google Shape;436;g34119d947f7_1_194" draw:style-name="gr22" draw:text-style-name="P15" xml:id="id68" draw:id="id68" draw:layer="layout" svg:width="1.274cm" svg:height="1.264cm" svg:x="1.695cm" svg:y="6.369cm">
          <draw:image xlink:href="Pictures/10000201000002D0000002D0DDE67520C92BF921.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3" smil:attributeName="visibility" smil:to="visible"/>
                  <anim:transitionFilter smil:dur="0.3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4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4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6s" smil:targetElement="id72" smil:type="fade" smil:subtype="crossfade"/>
                </anim:par>
              </anim:par>
            </anim:par>
          </anim:seq>
        </anim:par>
        <presentation:notes draw:style-name="dp2">
          <draw:custom-shape draw:name="Google Shape;423;g34119d947f7_1_194: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24;g34119d947f7_1_194:notes" draw:style-name="gr1" draw:layer="layout" svg:width="0.003cm" svg:height="0.003cm" svg:x="0cm" svg:y="1.931cm" draw:page-number="10" presentation:class="page"/>
          <draw:frame draw:name="Google Shape;425;g34119d947f7_1_194:notes" presentation:style-name="pr15" draw:text-style-name="P7" draw:layer="layout" svg:width="15.239cm" svg:height="11.429cm" svg:x="1.905cm" svg:y="12.065cm" presentation:class="notes" presentation:placeholder="true" presentation:user-transformed="true">
            <draw:text-box/>
          </draw:frame>
        </presentation:notes>
      </draw:page>
      <draw:page draw:name="Let’s find out: What is…?" draw:style-name="dp1" draw:master-page-name="OBJECT" presentation:presentation-page-layout-name="AL1T11">
        <draw:frame draw:name="Google Shape;442;p12" presentation:style-name="pr5" draw:text-style-name="P9" draw:layer="layout" svg:width="22.859cm" svg:height="2.383cm" svg:x="1.27cm" svg:y="-0.13cm" presentation:class="title" presentation:user-transformed="true">
          <draw:text-box>
            <text:p text:style-name="P8"><text:span text:style-name="T6">Let’s find out: What is…?</text:span></text:p>
          </draw:text-box>
        </draw:frame>
        <draw:custom-shape draw:name="Google Shape;443;p12" draw:style-name="gr23" draw:text-style-name="P24" xml:id="id73" draw:id="id73" draw:layer="layout" svg:width="7.197cm" svg:height="1.123cm" svg:x="1.914cm" svg:y="2.787cm">
          <text:p text:style-name="P12"><text:span text:style-name="T7">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4;p12" draw:style-name="gr24" draw:text-style-name="P25" xml:id="id74" draw:id="id74" draw:layer="layout" svg:width="7.374cm" svg:height="1.123cm" svg:x="3.395cm" svg:y="4.335cm">
          <text:p text:style-name="P12"><text:span text:style-name="T7">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5;p12" draw:style-name="gr25" draw:text-style-name="P26" xml:id="id75" draw:id="id75" draw:layer="layout" svg:width="7.197cm" svg:height="1.123cm" svg:x="5.512cm" svg:y="5.816cm">
          <text:p text:style-name="P12"><text:span text:style-name="T8">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6;p12" draw:style-name="gr4" draw:text-style-name="P14" xml:id="id76" draw:id="id76" draw:layer="layout" svg:width="6.418cm" svg:height="1.123cm" svg:x="8.052cm" svg:y="7.298cm">
          <text:p text:style-name="P12"><text:span text:style-name="T8">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7;p12" draw:style-name="gr26" draw:text-style-name="P27" xml:id="id77" draw:id="id77" draw:layer="layout" svg:width="6.418cm" svg:height="1.123cm" svg:x="9.745cm" svg:y="8.991cm">
          <text:p text:style-name="P12"><text:span text:style-name="T7">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4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4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custom-shape draw:name="Google Shape;438;p12: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39;p12:notes" draw:style-name="gr1" draw:layer="layout" svg:width="0.003cm" svg:height="0.003cm" svg:x="0cm" svg:y="1.931cm" draw:page-number="11" presentation:class="page"/>
          <draw:frame draw:name="Google Shape;440;p12:notes" presentation:style-name="pr16"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OBJECT" presentation:presentation-page-layout-name="AL1T11">
        <draw:custom-shape draw:name="Google Shape;453;p13" draw:style-name="gr27" draw:text-style-name="P28" xml:id="id78" draw:id="id78" draw:layer="layout" svg:width="18.961cm" svg:height="1.827cm" svg:x="3.116cm" svg:y="1.346cm">
          <text:p text:style-name="P17"><text:span text:style-name="T29">What defines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4;p13" draw:style-name="gr10" draw:text-style-name="P6" xml:id="id80" draw:id="id80" draw:layer="layout" svg:width="22.499cm" svg:height="1.597cm" svg:x="1.906cm" svg:y="4.368cm">
          <text:p text:style-name="P19"><text:span text:style-name="T23">Any information that relates to an identified or identifiable living individ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13" draw:style-name="gr10" draw:text-style-name="P6" xml:id="id82" draw:id="id82" draw:layer="layout" svg:width="22.499cm" svg:height="1.597cm" svg:x="1.906cm" svg:y="5.638cm">
          <text:p text:style-name="P19"><text:span text:style-name="T23">What if data can be de-identified, encrypted, or pseudonymi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13" draw:style-name="gr10" draw:text-style-name="P6" xml:id="id84" draw:id="id84" draw:layer="layout" svg:width="22.499cm" svg:height="1.597cm" svg:x="1.906cm" svg:y="6.908cm">
          <text:p text:style-name="P19"><text:span text:style-name="T30">^Still, it is considered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13" draw:style-name="gr10" draw:text-style-name="P6" xml:id="id86" draw:id="id86" draw:layer="layout" svg:width="22.499cm" svg:height="1.597cm" svg:x="1.984cm" svg:y="8.214cm">
          <text:p text:style-name="P19"><text:span text:style-name="T23">Truly anonymised → anonymisation must be irrever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8;p13" draw:style-name="gr28" draw:text-style-name="P15" xml:id="id79" draw:id="id79" draw:layer="layout" svg:width="1.339cm" svg:height="1.045cm" svg:x="1.568cm" svg:y="4.592cm">
          <draw:image xlink:href="Pictures/10000201000000A300000448EACA50CF4303650F.png" xlink:type="simple" xlink:show="embed" xlink:actuate="onLoad">
            <text:p/>
          </draw:image>
        </draw:frame>
        <draw:frame draw:name="Google Shape;459;p13" draw:style-name="gr29" draw:text-style-name="P15" xml:id="id81" draw:id="id81" draw:layer="layout" svg:width="1.339cm" svg:height="1.045cm" svg:x="1.568cm" svg:y="5.75cm">
          <draw:image xlink:href="Pictures/10000201000000A300000448EACA50CF4303650F.png" xlink:type="simple" xlink:show="embed" xlink:actuate="onLoad">
            <text:p/>
          </draw:image>
        </draw:frame>
        <draw:frame draw:name="Google Shape;460;p13" draw:style-name="gr30" draw:text-style-name="P15" xml:id="id83" draw:id="id83" draw:layer="layout" svg:width="1.339cm" svg:height="1.045cm" svg:x="1.695cm" svg:y="7.076cm">
          <draw:image xlink:href="Pictures/10000201000000A300000448EACA50CF4303650F.png" xlink:type="simple" xlink:show="embed" xlink:actuate="onLoad">
            <text:p/>
          </draw:image>
        </draw:frame>
        <draw:custom-shape draw:name="Google Shape;461;p13" draw:style-name="gr6" draw:text-style-name="P6" xml:id="id87" draw:id="id87" draw:layer="layout" svg:width="21.799cm" svg:height="1.09cm" svg:x="0.426cm" svg:y="12.763cm">
          <text:p text:style-name="P1"><text:span text:style-name="T21">Further reading</text:span><text:span text:style-name="T25">: </text:span><text:span text:style-name="T26"><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2;p13" draw:style-name="gr5" draw:text-style-name="P15" xml:id="id85" draw:id="id85" draw:layer="layout" svg:width="1.339cm" svg:height="1.239cm" svg:x="1.695cm" svg:y="8.214cm">
          <draw:image xlink:href="Pictures/100002010000033E000003006FD3819535F777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4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custom-shape draw:name="Google Shape;449;p13: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50;p13:notes" draw:style-name="gr1" draw:layer="layout" svg:width="0.003cm" svg:height="0.003cm" svg:x="0cm" svg:y="1.931cm" draw:page-number="12" presentation:class="page"/>
          <draw:frame draw:name="Google Shape;451;p13:notes" presentation:style-name="pr17"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OBJECT" presentation:presentation-page-layout-name="AL1T11">
        <draw:custom-shape draw:name="Google Shape;468;p14" draw:style-name="gr27" draw:text-style-name="P28" draw:layer="layout" svg:width="18.961cm" svg:height="1.827cm" svg:x="3.116cm" svg:y="0.711cm">
          <text:p text:style-name="P17"><text:span text:style-name="T29">What is personal data? Ex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9;p14" draw:style-name="gr6" draw:text-style-name="P6" draw:layer="layout" svg:width="21.799cm" svg:height="1.09cm" svg:x="0.426cm" svg:y="12.763cm">
          <text:p text:style-name="P1"><text:span text:style-name="T21">Further reading</text:span><text:span text:style-name="T25">: </text:span><text:span text:style-name="T26"><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p14" draw:style-name="gr5" draw:text-style-name="P15" draw:layer="layout" svg:width="17.466cm" svg:height="8.741cm" svg:x="2.328cm" svg:y="3.174cm">
          <draw:image xlink:href="Pictures/10000201000008000000040104A924880F94F5A7.png" xlink:type="simple" xlink:show="embed" xlink:actuate="onLoad">
            <text:p/>
          </draw:image>
        </draw:frame>
        <presentation:notes draw:style-name="dp2">
          <draw:custom-shape draw:name="Google Shape;464;p14: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65;p14:notes" draw:style-name="gr1" draw:layer="layout" svg:width="0.003cm" svg:height="0.003cm" svg:x="0cm" svg:y="1.931cm" draw:page-number="13" presentation:class="page"/>
          <draw:frame draw:name="Google Shape;466;p14:notes" presentation:style-name="pr18"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OBJECT" presentation:presentation-page-layout-name="AL1T11">
        <draw:custom-shape draw:name="Google Shape;476;p15" draw:style-name="gr24" draw:text-style-name="P25" draw:layer="layout" svg:width="19.356cm" svg:height="2.498cm" svg:x="2.721cm" svg:y="1.346cm">
          <text:p text:style-name="P17"><text:span text:style-name="T29">What personal data is </text:span><text:span text:style-name="T29"><text:line-break/></text:span><text:span text:style-name="T29">considered sensit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7;p15" draw:style-name="gr10" draw:text-style-name="P6" draw:layer="layout" svg:width="22.499cm" svg:height="2.116cm" svg:x="1.906cm" svg:y="4.368cm">
          <text:list text:style-name="L20">
            <text:list-item>
              <text:p text:style-name="P29"><text:span text:style-name="T23">Personal data revealing racial or ethnic origin, political opinions, </text:span><text:span text:style-name="T23"><text:line-break/></text:span><text:span text:style-name="T23">religious, or philosophical belie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15" draw:style-name="gr10" draw:text-style-name="P6" draw:layer="layout" svg:width="22.499cm" svg:height="1.597cm" svg:x="1.906cm" svg:y="6.485cm">
          <text:list text:style-name="L20">
            <text:list-item>
              <text:p text:style-name="P29"><text:span text:style-name="T23">Trade-union member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15" draw:style-name="gr10" draw:text-style-name="P6" draw:layer="layout" svg:width="22.499cm" svg:height="1.597cm" svg:x="1.906cm" svg:y="7.755cm">
          <text:list text:style-name="L20">
            <text:list-item>
              <text:p text:style-name="P29"><text:span text:style-name="T23">Genetic data, biometric data processed solely to identify a human be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15" draw:style-name="gr10" draw:text-style-name="P6" draw:layer="layout" svg:width="22.499cm" svg:height="1.597cm" svg:x="1.984cm" svg:y="9.061cm">
          <text:list text:style-name="L20">
            <text:list-item>
              <text:p text:style-name="P29"><text:span text:style-name="T23">Health related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15" draw:style-name="gr6" draw:text-style-name="P6" draw:layer="layout" svg:width="24.057cm" svg:height="1.481cm" svg:x="0.568cm" svg:y="12.06cm">
          <text:p text:style-name="P1"><text:span text:style-name="T31">Further reading - what personal data is considered sensitive?: </text:span><text:span text:style-name="T3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72;p15: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73;p15:notes" draw:style-name="gr1" draw:layer="layout" svg:width="0.003cm" svg:height="0.003cm" svg:x="0cm" svg:y="1.931cm" draw:page-number="14" presentation:class="page"/>
          <draw:frame draw:name="Google Shape;474;p15:notes" presentation:style-name="pr19"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OBJECT" presentation:presentation-page-layout-name="AL1T11">
        <draw:custom-shape draw:name="Google Shape;487;p16" draw:style-name="gr25" draw:text-style-name="P26" xml:id="id88" draw:id="id88" draw:layer="layout" svg:width="19.356cm" svg:height="2.116cm" svg:x="2.721cm" svg:y="1.346cm">
          <text:p text:style-name="P17"><text:span text:style-name="T33">What defines genetic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8;p16" draw:style-name="gr31" draw:text-style-name="P31" xml:id="id90" draw:id="id90" draw:layer="layout" svg:width="20.666cm" svg:height="4.345cm" svg:x="2.614cm" svg:y="4.41cm">
          <text:p text:style-name="P30"><text:span text:style-name="T34">Genetic data is defined as: “personal data relating to the inherited or acquired genetic characteristics of a natural person which give unique information about the physiology or the health of that natural person.” - GDPR article 4(13)</text:span></text:p>
          <text:p text:style-name="P30"><text:span text:style-name="T34"/></text:p>
          <text:p text:style-name="P30"><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16" draw:style-name="gr10" draw:text-style-name="P6" xml:id="id92" draw:id="id92" draw:layer="layout" svg:width="20.666cm" svg:height="1.597cm" svg:x="2.614cm" svg:y="9.355cm">
          <text:p text:style-name="P30"><text:span text:style-name="T23">Always both: Personal identifier and sensitiv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16" draw:style-name="gr6" draw:text-style-name="P6" xml:id="id93" draw:id="id93" draw:layer="layout" svg:width="24.057cm" svg:height="1.481cm" svg:x="0.568cm" svg:y="12.06cm">
          <text:p text:style-name="P1"><text:span text:style-name="T31">Further reading - what personal data is considered sensitive?: </text:span><text:span text:style-name="T3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1;p16" draw:style-name="gr15" draw:text-style-name="P15" xml:id="id89" draw:id="id89" draw:layer="layout" svg:width="1.178cm" svg:height="0.856cm" svg:x="0.98cm" svg:y="4.39cm">
          <draw:image xlink:href="Pictures/100000000000032000000215F33B6484BB0748B4.png" xlink:type="simple" xlink:show="embed" xlink:actuate="onLoad">
            <text:p/>
          </draw:image>
        </draw:frame>
        <draw:frame draw:name="Google Shape;492;p16" draw:style-name="gr32" draw:text-style-name="P15" xml:id="id91" draw:id="id91" draw:layer="layout" svg:width="1.339cm" svg:height="1.412cm" svg:x="1.062cm" svg:y="9.23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seq>
        </anim:par>
        <presentation:notes draw:style-name="dp2">
          <draw:custom-shape draw:name="Google Shape;483;p16: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84;p16:notes" draw:style-name="gr1" draw:layer="layout" svg:width="0.003cm" svg:height="0.003cm" svg:x="0cm" svg:y="1.931cm" draw:page-number="15" presentation:class="page"/>
          <draw:frame draw:name="Google Shape;485;p16:notes" presentation:style-name="pr20"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OBJECT" presentation:presentation-page-layout-name="AL1T11">
        <draw:custom-shape draw:name="Google Shape;498;p17" draw:style-name="gr33" draw:text-style-name="P14" xml:id="id94" draw:id="id94" draw:layer="layout" svg:width="19.356cm" svg:height="2.498cm" svg:x="2.721cm" svg:y="1.346cm">
          <text:p text:style-name="P17"><text:span text:style-name="T35">Data Psue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99;p17" draw:style-name="gr10" draw:text-style-name="P6" xml:id="id97" draw:id="id97" draw:layer="layout" svg:width="22.499cm" svg:height="1.597cm" svg:x="1.137cm" svg:y="9.272cm">
          <text:list text:style-name="L20">
            <text:list-item>
              <text:p text:style-name="P29"><text:span text:style-name="T23">De-identified and not back traceable for the researcher without the identifi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17" draw:style-name="gr31" draw:text-style-name="P31" xml:id="id96" draw:id="id96" draw:layer="layout" svg:width="20.074cm" svg:height="4.345cm" svg:x="2.614cm" svg:y="4.41cm">
          <text:p text:style-name="P32"><text:span text:style-name="T7">“</text:span><text:span text:style-name="T7">The processing of personal data in such a manner that the personal data </text:span><text:span text:style-name="T7"><text:line-break/></text:span><text:span text:style-name="T7">can no longer be attributed to a specific data subject without the use of </text:span><text:span text:style-name="T7"><text:line-break/></text:span><text:span text:style-name="T7">additional information, provided that such additional information is kept </text:span><text:span text:style-name="T7"><text:line-break/></text:span><text:span text:style-name="T7">separately and is subject to technical and organisational measures to </text:span><text:span text:style-name="T7"><text:line-break/></text:span><text:span text:style-name="T7">ensure that the personal data are not attributed to an identified or </text:span><text:span text:style-name="T7"><text:line-break/></text:span><text:span text:style-name="T7">identifiable natural person” - GDPR article 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1;p17" draw:style-name="gr15" draw:text-style-name="P15" xml:id="id95" draw:id="id95" draw:layer="layout" svg:width="1.178cm" svg:height="0.856cm" svg:x="0.98cm" svg:y="4.39cm">
          <draw:image xlink:href="Pictures/100000000000032000000215F33B6484BB0748B4.png" xlink:type="simple" xlink:show="embed" xlink:actuate="onLoad">
            <text:p/>
          </draw:image>
        </draw:frame>
        <draw:custom-shape draw:name="Google Shape;502;p17" draw:style-name="gr10" draw:text-style-name="P6" xml:id="id99" draw:id="id99" draw:layer="layout" svg:width="20.666cm" svg:height="1.597cm" svg:x="2.402cm" svg:y="10.625cm">
          <text:p text:style-name="P30"><text:span text:style-name="T23">Pseudonymised data is still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3;p17" draw:style-name="gr32" draw:text-style-name="P15" xml:id="id98" draw:id="id98" draw:layer="layout" svg:width="1.339cm" svg:height="1.412cm" svg:x="0.85cm" svg:y="10.50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custom-shape draw:name="Google Shape;494;p17: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95;p17:notes" draw:style-name="gr1" draw:layer="layout" svg:width="0.003cm" svg:height="0.003cm" svg:x="0cm" svg:y="1.931cm" draw:page-number="16" presentation:class="page"/>
          <draw:frame draw:name="Google Shape;496;p17:notes" presentation:style-name="pr21"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OBJECT" presentation:presentation-page-layout-name="AL1T11">
        <draw:custom-shape draw:name="Google Shape;509;p18" draw:style-name="gr34" draw:text-style-name="P27" xml:id="id100" draw:id="id100" draw:layer="layout" svg:width="19.356cm" svg:height="2.498cm" svg:x="2.721cm" svg:y="1.346cm">
          <text:p text:style-name="P17"><text:span text:style-name="T36">Anonymou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0;p18" draw:style-name="gr10" draw:text-style-name="P6" xml:id="id101" draw:id="id101" draw:layer="layout" svg:width="20.666cm" svg:height="3.945cm" svg:x="1.15cm" svg:y="5.22cm">
          <text:list text:style-name="L20">
            <text:list-item>
              <text:p text:style-name="P29"><text:span text:style-name="T23">Anonymous data cannot in any way be used to identify individuals in a data material, either:</text:span></text:p>
            </text:list-item>
          </text:list>
          <text:list text:style-name="L24">
            <text:list-item>
              <text:list>
                <text:list-item>
                  <text:p text:style-name="P16"><text:span text:style-name="T23">directly by name or personal identification number or </text:span></text:p>
                </text:list-item>
                <text:list-item>
                  <text:p text:style-name="P16"><text:span text:style-name="T23">indirectly by additional inform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18" draw:style-name="gr10" draw:text-style-name="P6" xml:id="id103" draw:id="id103" draw:layer="layout" svg:width="20.666cm" svg:height="1.597cm" svg:x="2.402cm" svg:y="9.778cm">
          <text:p text:style-name="P30"><text:span text:style-name="T23">Not possible for many data types, such as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18" draw:style-name="gr32" draw:text-style-name="P15" xml:id="id102" draw:id="id102" draw:layer="layout" svg:width="1.339cm" svg:height="1.412cm" svg:x="0.85cm" svg:y="9.6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seq>
        </anim:par>
        <presentation:notes draw:style-name="dp2">
          <draw:custom-shape draw:name="Google Shape;505;p18: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06;p18:notes" draw:style-name="gr1" draw:layer="layout" svg:width="0.003cm" svg:height="0.003cm" svg:x="0cm" svg:y="1.931cm" draw:page-number="17" presentation:class="page"/>
          <draw:frame draw:name="Google Shape;507;p18:notes" presentation:style-name="pr22" draw:text-style-name="P7"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OBJECT" presentation:presentation-page-layout-name="AL1T11">
        <draw:custom-shape draw:name="Google Shape;518;p19" draw:style-name="gr23" draw:text-style-name="P24" draw:layer="layout" svg:width="7.197cm" svg:height="1.123cm" svg:x="2.76cm" svg:y="3.422cm">
          <text:p text:style-name="P12"><text:span text:style-name="T7">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9;p19" draw:style-name="gr24" draw:text-style-name="P25" draw:layer="layout" svg:width="7.374cm" svg:height="1.123cm" svg:x="2.76cm" svg:y="4.97cm">
          <text:p text:style-name="P12"><text:span text:style-name="T7">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0;p19" draw:style-name="gr25" draw:text-style-name="P26" draw:layer="layout" svg:width="7.197cm" svg:height="1.123cm" svg:x="2.76cm" svg:y="6.451cm">
          <text:p text:style-name="P12"><text:span text:style-name="T8">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1;p19" draw:style-name="gr35" draw:text-style-name="P33" draw:layer="layout" svg:width="6.418cm" svg:height="1.123cm" svg:x="2.76cm" svg:y="7.933cm">
          <text:p text:style-name="P12"><text:span text:style-name="T8">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19" draw:style-name="gr26" draw:text-style-name="P27" draw:layer="layout" svg:width="6.418cm" svg:height="1.123cm" svg:x="2.76cm" svg:y="9.415cm">
          <text:p text:style-name="P12"><text:span text:style-name="T7">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3;p19" draw:style-name="gr36" draw:text-style-name="P34" xml:id="id106" draw:id="id106" draw:layer="layout" svg:width="10.243cm" svg:height="1.709cm" svg:x="12.119cm" svg:y="5.115cm">
          <text:p text:style-name="P12"><text:span text:style-name="T8">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4;p19" draw:style-name="gr37" draw:text-style-name="P6" xml:id="id107" draw:id="id107" draw:layer="layout" svg:width="10.243cm" svg:height="5.347cm" svg:x="12.542cm" svg:y="7.03cm">
          <text:list text:style-name="L25">
            <text:list-item>
              <text:p text:style-name="P35"><text:span text:style-name="T8">Fairness and Transparency</text:span></text:p>
            </text:list-item>
            <text:list-item>
              <text:p text:style-name="P35"><text:span text:style-name="T8">Data Minimisation</text:span></text:p>
            </text:list-item>
            <text:list-item>
              <text:p text:style-name="P35"><text:span text:style-name="T8">Data Accuracy</text:span></text:p>
            </text:list-item>
            <text:list-item>
              <text:p text:style-name="P35"><text:span text:style-name="T8">Storage Limitation</text:span></text:p>
            </text:list-item>
            <text:list-item>
              <text:p text:style-name="P35"><text:span text:style-name="T8">Integrity and Confidentiality</text:span></text:p>
            </text:list-item>
            <text:list-item>
              <text:p text:style-name="P35"><text:span text:style-name="T8">Accountability</text:span></text:p>
            </text:list-item>
          </text:list>
          <text:p text:style-name="P12"><text:span text:style-name="T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25;p19" draw:style-name="gr38" draw:text-style-name="P15" draw:layer="layout" svg:width="1.83cm" svg:height="1.345cm" svg:x="0.718cm" svg:y="3.201cm">
          <draw:image xlink:href="Pictures/10000201000000ED00000449C8AB390A94284B94.png" xlink:type="simple" xlink:show="embed" xlink:actuate="onLoad">
            <text:p/>
          </draw:image>
        </draw:frame>
        <draw:frame draw:name="Google Shape;526;p19" draw:style-name="gr38" draw:text-style-name="P15" draw:layer="layout" svg:width="1.83cm" svg:height="1.345cm" svg:x="0.718cm" svg:y="4.682cm">
          <draw:image xlink:href="Pictures/10000201000000ED00000449C8AB390A94284B94.png" xlink:type="simple" xlink:show="embed" xlink:actuate="onLoad">
            <text:p/>
          </draw:image>
        </draw:frame>
        <draw:frame draw:name="Google Shape;527;p19" draw:style-name="gr38" draw:text-style-name="P15" draw:layer="layout" svg:width="1.83cm" svg:height="1.345cm" svg:x="0.718cm" svg:y="6.164cm">
          <draw:image xlink:href="Pictures/10000201000000ED00000449C8AB390A94284B94.png" xlink:type="simple" xlink:show="embed" xlink:actuate="onLoad">
            <text:p/>
          </draw:image>
        </draw:frame>
        <draw:frame draw:name="Google Shape;528;p19" draw:style-name="gr38" draw:text-style-name="P15" draw:layer="layout" svg:width="1.83cm" svg:height="1.345cm" svg:x="0.718cm" svg:y="7.646cm">
          <draw:image xlink:href="Pictures/10000201000000ED00000449C8AB390A94284B94.png" xlink:type="simple" xlink:show="embed" xlink:actuate="onLoad">
            <text:p/>
          </draw:image>
        </draw:frame>
        <draw:frame draw:name="Google Shape;529;p19" draw:style-name="gr38" draw:text-style-name="P15" draw:layer="layout" svg:width="1.83cm" svg:height="1.345cm" svg:x="0.718cm" svg:y="9.127cm">
          <draw:image xlink:href="Pictures/10000201000000ED00000449C8AB390A94284B94.png" xlink:type="simple" xlink:show="embed" xlink:actuate="onLoad">
            <text:p/>
          </draw:image>
        </draw:frame>
        <draw:custom-shape draw:name="Google Shape;530;p19" draw:style-name="gr39" draw:text-style-name="P36" xml:id="id105" draw:id="id105" draw:layer="layout" svg:width="10.095cm" svg:height="1.709cm" svg:x="12.119cm" svg:y="3.201cm">
          <text:p text:style-name="P12"><text:span text:style-name="T8">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31;p19" presentation:style-name="pr5" draw:text-style-name="P9" draw:layer="layout" svg:width="9.082cm" svg:height="2.383cm" svg:x="1.566cm" svg:y="0.257cm" presentation:class="title" presentation:user-transformed="true">
          <draw:text-box>
            <text:p text:style-name="P8"><text:span text:style-name="T37">What is…?</text:span></text:p>
          </draw:text-box>
        </draw:frame>
        <draw:frame draw:name="Google Shape;532;p19" presentation:style-name="pr5" draw:text-style-name="P9" xml:id="id104" draw:id="id104" draw:layer="layout" svg:width="12.956cm" svg:height="2.383cm" svg:x="11.3cm" svg:y="0.393cm" presentation:class="title" presentation:user-transformed="true">
          <draw:text-box>
            <text:p text:style-name="P8"><text:span text:style-name="T38">What does GDPR say abou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0.4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4s" smil:targetElement="id107" smil:type="fade" smil:subtype="crossfade"/>
                </anim:par>
              </anim:par>
            </anim:par>
          </anim:seq>
        </anim:par>
        <presentation:notes draw:style-name="dp2">
          <draw:custom-shape draw:name="Google Shape;514;p19: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15;p19:notes" draw:style-name="gr1" draw:layer="layout" svg:width="0.003cm" svg:height="0.003cm" svg:x="0cm" svg:y="1.931cm" draw:page-number="18" presentation:class="page"/>
          <draw:frame draw:name="Google Shape;516;p19:notes" presentation:style-name="pr23" draw:text-style-name="P7"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OBJECT" presentation:presentation-page-layout-name="AL1T11">
        <draw:custom-shape draw:name="Google Shape;538;p20" draw:style-name="gr40" draw:text-style-name="P37" xml:id="id110" draw:id="id110" draw:layer="layout" svg:width="21.445cm" svg:height="1.597cm" svg:x="2.751cm" svg:y="2.292cm">
          <text:p text:style-name="P17"><text:span text:style-name="T28">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9;p20" draw:style-name="gr10" draw:text-style-name="P6" xml:id="id111" draw:id="id111" draw:layer="layout" svg:width="23.399cm" svg:height="2.116cm" svg:x="1.006cm" svg:y="4.368cm">
          <text:list text:style-name="L28">
            <text:list-item>
              <text:p text:style-name="P29"><text:span text:style-name="T39">Data subject</text:span><text:span text:style-name="T16">: </text:span><text:span text:style-name="T16"><text:line-break/></text:span><text:span text:style-name="T16">“the natural person information relates to.”- GDPR article 4(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20" draw:style-name="gr10" draw:text-style-name="P6" xml:id="id112" draw:id="id112" draw:layer="layout" svg:width="23.399cm" svg:height="3.157cm" svg:x="1.006cm" svg:y="6.485cm">
          <text:list text:style-name="L28">
            <text:list-item>
              <text:p text:style-name="P29"><text:span text:style-name="T39">Data Processing:</text:span><text:span text:style-name="T16"> </text:span><text:span text:style-name="T16"><text:line-break/></text:span><text:span text:style-name="T16">“any operation or set of operations which is performed on personal data or on sets of personal data.” - GDPR article 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20" draw:style-name="gr10" draw:text-style-name="P6" xml:id="id113" draw:id="id113" draw:layer="layout" svg:width="23.693cm" svg:height="1.597cm" svg:x="1.006cm" svg:y="9.448cm">
          <text:list text:style-name="L28">
            <text:list-item>
              <text:p text:style-name="P29"><text:span text:style-name="T39">Data Controller: </text:span><text:span text:style-name="T16">determines the purposes and means of the processing of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20" draw:style-name="gr10" draw:text-style-name="P6" xml:id="id114" draw:id="id114" draw:layer="layout" svg:width="22.499cm" svg:height="1.597cm" svg:x="1.006cm" svg:y="11.046cm">
          <text:list text:style-name="L28">
            <text:list-item>
              <text:p text:style-name="P29"><text:span text:style-name="T39">Data Processor: </text:span><text:span text:style-name="T16">processes personal data on behalf of the control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20" draw:style-name="gr6" draw:text-style-name="P6" xml:id="id115" draw:id="id115" draw:layer="layout" svg:width="24.057cm" svg:height="1.041cm" svg:x="0.78cm" svg:y="12.906cm">
          <text:p text:style-name="P1"><text:span text:style-name="T9">Further reading: </text:span><text:span text:style-name="T40"><text:a xlink:href="https://eur-lex.europa.eu/legal-content/EN/TXT/HTML/?uri=CELEX:32016R0679&amp;from=EN#d1e1489-1-1" xlink:type="simple">https://eur-lex.europa.eu/legal-content/EN/TXT/HTML/?uri=CELEX:32016R0679&amp;from=EN#d1e1489-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4;p20" presentation:style-name="pr24" draw:text-style-name="P38" xml:id="id109" draw:id="id109" draw:layer="layout" svg:width="12.522cm" svg:height="1.289cm" svg:x="1.991cm" svg:y="0.578cm" presentation:class="title" presentation:user-transformed="true">
          <draw:text-box>
            <text:p text:style-name="P8"><text:span text:style-name="T41">What does GDPR say about:</text:span></text:p>
          </draw:text-box>
        </draw:frame>
        <draw:frame draw:name="Google Shape;545;p20" draw:style-name="gr15" draw:text-style-name="P15" xml:id="id108" draw:id="id108" draw:layer="layout" svg:width="1.178cm" svg:height="0.856cm" svg:x="0.6cm" svg:y="0.578cm">
          <draw:image xlink:href="Pictures/100000000000032000000215F33B6484BB0748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4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seq>
        </anim:par>
        <presentation:notes draw:style-name="dp2">
          <draw:custom-shape draw:name="Google Shape;534;p20: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35;p20:notes" draw:style-name="gr1" draw:layer="layout" svg:width="0.003cm" svg:height="0.003cm" svg:x="0cm" svg:y="1.931cm" draw:page-number="19" presentation:class="page"/>
          <draw:frame draw:name="Google Shape;536;p20:notes" presentation:style-name="pr25"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OBJECT" presentation:presentation-page-layout-name="AL1T11">
        <draw:custom-shape draw:name="Google Shape;551;p21" draw:style-name="gr41" draw:text-style-name="P34" xml:id="id116" draw:id="id116" draw:layer="layout" svg:width="21.445cm" svg:height="1.597cm" svg:x="2.751cm" svg:y="0.961cm">
          <text:p text:style-name="P17"><text:span text:style-name="T28">Conditions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2;p21" draw:style-name="gr10" draw:text-style-name="P6" xml:id="id117" draw:id="id117" draw:layer="layout" svg:width="23.399cm" svg:height="1.344cm" svg:x="0.794cm" svg:y="3.023cm">
          <text:list text:style-name="L29">
            <text:list-item>
              <text:p text:style-name="P29"><text:span text:style-name="T42">Lawful and transparent manner (‘</text:span><text:span text:style-name="T43">lawfulness, fairness and transparency</text:span><text:span text:style-name="T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21" draw:style-name="gr10" draw:text-style-name="P6" xml:id="id118" draw:id="id118" draw:layer="layout" svg:width="23.399cm" svg:height="1.137cm" svg:x="0.794cm" svg:y="4.368cm">
          <text:list text:style-name="L29">
            <text:list-item>
              <text:p text:style-name="P29"><text:span text:style-name="T42">Specific purposes (‘</text:span><text:span text:style-name="T43">purpose limitation</text:span><text:span text:style-name="T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21" draw:style-name="gr10" draw:text-style-name="P6" xml:id="id119" draw:id="id119" draw:layer="layout" svg:width="23.693cm" svg:height="0.982cm" svg:x="0.75cm" svg:y="5.506cm">
          <text:list text:style-name="L29">
            <text:list-item>
              <text:p text:style-name="P29"><text:span text:style-name="T42">Only the personal data that is necessary to fulfil that purpose (‘</text:span><text:span text:style-name="T43">data minimisation</text:span><text:span text:style-name="T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21" draw:style-name="gr10" draw:text-style-name="P6" xml:id="id120" draw:id="id120" draw:layer="layout" svg:width="22.499cm" svg:height="1.597cm" svg:x="0.75cm" svg:y="6.68cm">
          <text:list text:style-name="L29">
            <text:list-item>
              <text:p text:style-name="P29"><text:span text:style-name="T42">Stored for no longer than necessary (‘</text:span><text:span text:style-name="T43">storage limitation</text:span><text:span text:style-name="T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21" draw:style-name="gr6" draw:text-style-name="P6" xml:id="id124" draw:id="id124" draw:layer="layout" svg:width="24.057cm" svg:height="1.041cm" svg:x="0.78cm" svg:y="12.906cm">
          <text:p text:style-name="P1"><text:span text:style-name="T9">Further reading: </text:span><text:span text:style-name="T40"><text:a xlink:href="https://eur-lex.europa.eu/legal-content/EN/TXT/HTML/?uri=CELEX:32016R0679&amp;from=EN#d1e1807-1-1" xlink:type="simple">https://eur-lex.europa.eu/legal-content/EN/TXT/HTML/?uri=CELEX:32016R0679&amp;from=EN#d1e1807-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21" draw:style-name="gr10" draw:text-style-name="P6" xml:id="id121" draw:id="id121" draw:layer="layout" svg:width="22.499cm" svg:height="1.597cm" svg:x="0.75cm" svg:y="7.95cm">
          <text:list text:style-name="L29">
            <text:list-item>
              <text:p text:style-name="P29"><text:span text:style-name="T43">Data Accura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21" draw:style-name="gr10" draw:text-style-name="P6" xml:id="id122" draw:id="id122" draw:layer="layout" svg:width="22.499cm" svg:height="2.427cm" svg:x="0.75cm" svg:y="9.008cm">
          <text:list text:style-name="L29">
            <text:list-item>
              <text:p text:style-name="P29"><text:span text:style-name="T42">Technical and organisational safeguards that ensure the security of the personal data, including protection against unauthorised or unlawful processing and against accidental loss, destruction or damage, using appropriate technology (‘</text:span><text:span text:style-name="T43">integrity and confidentiality</text:span><text:span text:style-name="T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21" draw:style-name="gr10" draw:text-style-name="P6" xml:id="id123" draw:id="id123" draw:layer="layout" svg:width="22.499cm" svg:height="1.597cm" svg:x="0.75cm" svg:y="11.336cm">
          <text:list text:style-name="L29">
            <text:list-item>
              <text:p text:style-name="P29"><text:span text:style-name="T43">Accountability → </text:span><text:span text:style-name="T42">Immediate reporting of incid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4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seq>
        </anim:par>
        <presentation:notes draw:style-name="dp2">
          <draw:custom-shape draw:name="Google Shape;547;p21: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48;p21:notes" draw:style-name="gr1" draw:layer="layout" svg:width="0.003cm" svg:height="0.003cm" svg:x="0cm" svg:y="1.931cm" draw:page-number="20" presentation:class="page"/>
          <draw:frame draw:name="Google Shape;549;p21:notes" presentation:style-name="pr26"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OBJECT" presentation:presentation-page-layout-name="AL1T11">
        <draw:custom-shape draw:name="Google Shape;565;p22" draw:style-name="gr41" draw:text-style-name="P34" xml:id="id125" draw:id="id125" draw:layer="layout" svg:width="21.445cm" svg:height="1.597cm" svg:x="2.751cm" svg:y="0.961cm">
          <text:p text:style-name="P17"><text:span text:style-name="T28">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6;p22" draw:style-name="gr10" draw:text-style-name="P6" xml:id="id130" draw:id="id130" draw:layer="layout" svg:width="21.066cm" svg:height="1.923cm" svg:x="1.276cm" svg:y="5.292cm">
          <text:list text:style-name="L28">
            <text:list-item>
              <text:p text:style-name="P29"><text:span text:style-name="T16">The data is processed for </text:span><text:span text:style-name="T39">archiving, scientific or historical research</text:span><text:span text:style-name="T16"> purposes or statistical purposes on the basis of EU or national l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22" draw:style-name="gr10" draw:text-style-name="P6" xml:id="id131" draw:id="id131" draw:layer="layout" svg:width="22.499cm" svg:height="1.597cm" svg:x="1.173cm" svg:y="7.437cm">
          <text:list text:style-name="L28">
            <text:list-item>
              <text:p text:style-name="P29"><text:span text:style-name="T16">“</text:span><text:span text:style-name="T16">Tasks carried out in the public interest” - Article 6, GDP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22" draw:style-name="gr6" draw:text-style-name="P6" xml:id="id133" draw:id="id133" draw:layer="layout" svg:width="24.423cm" svg:height="1.823cm" svg:x="0.488cm" svg:y="11.57cm">
          <text:p text:style-name="P1"><text:span text:style-name="T44">Further readings:</text:span></text:p>
          <text:list text:style-name="L31">
            <text:list-item>
              <text:p text:style-name="P1"><text:span text:style-name="T45"><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text:span text:style-name="T45"><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22" draw:style-name="gr10" draw:text-style-name="P6" xml:id="id126" draw:id="id126" draw:layer="layout" svg:width="22.499cm" svg:height="1.597cm" svg:x="1.694cm" svg:y="3.278cm">
          <text:p text:style-name="P19"><text:span text:style-name="T16">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0;p22" draw:style-name="gr21" draw:text-style-name="P15" xml:id="id127" draw:id="id127" draw:layer="layout" svg:width="2.447cm" svg:height="1.923cm" svg:x="0.329cm" svg:y="2.977cm">
          <draw:image xlink:href="Pictures/10000201000000ED00000449C8AB390A94284B94.png" xlink:type="simple" xlink:show="embed" xlink:actuate="onLoad">
            <text:p/>
          </draw:image>
        </draw:frame>
        <draw:custom-shape draw:name="Google Shape;571;p22" draw:style-name="gr3" draw:text-style-name="P13" xml:id="id128" draw:id="id128" draw:layer="layout" svg:width="5.392cm" svg:height="0.982cm" svg:x="12.474cm" svg:y="3.377cm">
          <text:p text:style-name="P12"><text:span text:style-name="T46">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72;p22" draw:style-name="gr5" draw:text-style-name="P15" xml:id="id129" draw:id="id129" draw:layer="layout" svg:width="0.876cm" svg:height="0.636cm" svg:x="18.144cm" svg:y="3.563cm">
          <draw:image xlink:href="Pictures/100000000000020000000174C5E145BF6683B30C.png" xlink:type="simple" xlink:show="embed" xlink:actuate="onLoad">
            <text:p/>
          </draw:image>
        </draw:frame>
        <draw:custom-shape draw:name="Google Shape;573;p22" draw:style-name="gr10" draw:text-style-name="P6" xml:id="id132" draw:id="id132" draw:layer="layout" svg:width="23.396cm" svg:height="2.561cm" svg:x="0.006cm" svg:y="9.008cm">
          <text:list text:style-name="L33">
            <text:list-item>
              <text:p text:style-name="P39"><text:span text:style-name="T16">“</text:span><text:span text:style-name="T16">It is not always possible to fully identify the purpose of personal data processing for scientific research purposes at the time of data collection” - GDPR, Recital 3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4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seq>
        </anim:par>
        <presentation:notes draw:style-name="dp2">
          <draw:custom-shape draw:name="Google Shape;561;p22: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62;p22:notes" draw:style-name="gr1" draw:layer="layout" svg:width="0.003cm" svg:height="0.003cm" svg:x="0cm" svg:y="1.931cm" draw:page-number="21" presentation:class="page"/>
          <draw:frame draw:name="Google Shape;563;p22:notes" presentation:style-name="pr27"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OBJECT" presentation:presentation-page-layout-name="AL1T11">
        <draw:custom-shape draw:name="Google Shape;579;p23" draw:style-name="gr41" draw:text-style-name="P34" draw:layer="layout" svg:width="21.445cm" svg:height="1.597cm" svg:x="2.751cm" svg:y="0.961cm">
          <text:p text:style-name="P17"><text:span text:style-name="T28">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0;p23" draw:style-name="gr6" draw:text-style-name="P6" draw:layer="layout" svg:width="24.423cm" svg:height="1.823cm" svg:x="0.488cm" svg:y="11.57cm">
          <text:p text:style-name="P1"><text:span text:style-name="T44">Further readings:</text:span></text:p>
          <text:list text:style-name="L31">
            <text:list-item>
              <text:p text:style-name="P1"><text:span text:style-name="T45"><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text:span text:style-name="T45"><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23" draw:style-name="gr10" draw:text-style-name="P6" draw:layer="layout" svg:width="22.499cm" svg:height="1.597cm" svg:x="1.694cm" svg:y="3.278cm">
          <text:p text:style-name="P19"><text:span text:style-name="T16">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2;p23" draw:style-name="gr21" draw:text-style-name="P15" draw:layer="layout" svg:width="2.447cm" svg:height="1.923cm" svg:x="0.329cm" svg:y="2.977cm">
          <draw:image xlink:href="Pictures/10000201000000ED00000449C8AB390A94284B94.png" xlink:type="simple" xlink:show="embed" xlink:actuate="onLoad">
            <text:p/>
          </draw:image>
        </draw:frame>
        <draw:custom-shape draw:name="Google Shape;583;p23" draw:style-name="gr3" draw:text-style-name="P13" draw:layer="layout" svg:width="5.392cm" svg:height="0.982cm" svg:x="12.474cm" svg:y="3.377cm">
          <text:p text:style-name="P12"><text:span text:style-name="T46">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84;p23" draw:style-name="gr5" draw:text-style-name="P15" draw:layer="layout" svg:width="0.876cm" svg:height="0.636cm" svg:x="18.144cm" svg:y="3.563cm">
          <draw:image xlink:href="Pictures/100000000000020000000174C5E145BF6683B30C.png" xlink:type="simple" xlink:show="embed" xlink:actuate="onLoad">
            <text:p/>
          </draw:image>
        </draw:frame>
        <draw:frame draw:name="Google Shape;585;p23" draw:style-name="gr32" draw:text-style-name="P15" draw:layer="layout" svg:width="1.631cm" svg:height="1.719cm" svg:x="0.882cm" svg:y="1.054cm">
          <draw:image xlink:href="Pictures/10000201000000A300000448EACA50CF4303650F.png" xlink:type="simple" xlink:show="embed" xlink:actuate="onLoad">
            <text:p/>
          </draw:image>
        </draw:frame>
        <draw:custom-shape draw:name="Google Shape;586;p23" draw:style-name="gr42" draw:text-style-name="P22" xml:id="id134" draw:id="id134" draw:layer="layout" svg:width="18.067cm" svg:height="4.175cm" svg:x="3.319cm" svg:y="5.179cm">
          <text:p text:style-name="P40"><text:span text:style-name="T30">If you are using consent as your legal basis:</text:span></text:p>
          <text:p text:style-name="P40"><text:span text:style-name="T30"/></text:p>
          <text:p text:style-name="P40"><text:span text:style-name="T30">Make sure your consent form (&amp; REK* approval) </text:span></text:p>
          <text:p text:style-name="P40"><text:span text:style-name="T30">allows controlled access deposition (e.g. to EGA**)</text:span></text:p>
          <text:p text:style-name="P40"><text:span text:style-name="T30">...before you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23" draw:style-name="gr10" draw:text-style-name="P6" xml:id="id135" draw:id="id135" draw:layer="layout" svg:width="22.499cm" svg:height="1.597cm" svg:x="0.74cm" svg:y="9.955cm">
          <text:p text:style-name="P19"><text:span text:style-name="T21">* REK: Regional Committees for Medical and Health Research Ethics</text:span><text:span text:style-name="T21"><text:line-break/></text:span><text:span text:style-name="T21">** EGA: European Genom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seq>
        </anim:par>
        <presentation:notes draw:style-name="dp2">
          <draw:custom-shape draw:name="Google Shape;575;p23: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76;p23:notes" draw:style-name="gr1" draw:layer="layout" svg:width="0.003cm" svg:height="0.003cm" svg:x="0cm" svg:y="1.931cm" draw:page-number="22" presentation:class="page"/>
          <draw:frame draw:name="Google Shape;577;p23:notes" presentation:style-name="pr28" draw:text-style-name="P7"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OBJECT" presentation:presentation-page-layout-name="AL1T11">
        <draw:custom-shape draw:name="Google Shape;593;p24" draw:style-name="gr23" draw:text-style-name="P24" draw:layer="layout" svg:width="7.197cm" svg:height="1.123cm" svg:x="2.76cm" svg:y="3.422cm">
          <text:p text:style-name="P12"><text:span text:style-name="T7">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4;p24" draw:style-name="gr24" draw:text-style-name="P25" draw:layer="layout" svg:width="7.374cm" svg:height="1.123cm" svg:x="2.76cm" svg:y="4.97cm">
          <text:p text:style-name="P12"><text:span text:style-name="T7">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5;p24" draw:style-name="gr25" draw:text-style-name="P26" draw:layer="layout" svg:width="7.197cm" svg:height="1.123cm" svg:x="2.76cm" svg:y="6.451cm">
          <text:p text:style-name="P12"><text:span text:style-name="T8">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6;p24" draw:style-name="gr35" draw:text-style-name="P33" draw:layer="layout" svg:width="6.418cm" svg:height="1.123cm" svg:x="2.76cm" svg:y="7.933cm">
          <text:p text:style-name="P12"><text:span text:style-name="T8">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7;p24" draw:style-name="gr26" draw:text-style-name="P27" draw:layer="layout" svg:width="6.418cm" svg:height="1.123cm" svg:x="2.76cm" svg:y="9.415cm">
          <text:p text:style-name="P12"><text:span text:style-name="T7">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8;p24" draw:style-name="gr36" draw:text-style-name="P34" draw:layer="layout" svg:width="10.243cm" svg:height="1.709cm" svg:x="12.119cm" svg:y="5.115cm">
          <text:p text:style-name="P12"><text:span text:style-name="T8">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9;p24" draw:style-name="gr37" draw:text-style-name="P6" draw:layer="layout" svg:width="10.243cm" svg:height="5.347cm" svg:x="12.542cm" svg:y="7.03cm">
          <text:list text:style-name="L25">
            <text:list-item>
              <text:p text:style-name="P35"><text:span text:style-name="T8">Fairness and Transparency</text:span></text:p>
            </text:list-item>
            <text:list-item>
              <text:p text:style-name="P35"><text:span text:style-name="T8">Data Minimisation</text:span></text:p>
            </text:list-item>
            <text:list-item>
              <text:p text:style-name="P35"><text:span text:style-name="T8">Data Accuracy</text:span></text:p>
            </text:list-item>
            <text:list-item>
              <text:p text:style-name="P35"><text:span text:style-name="T8">Storage Limitation</text:span></text:p>
            </text:list-item>
            <text:list-item>
              <text:p text:style-name="P35"><text:span text:style-name="T8">Integrity and Confidentiality</text:span></text:p>
            </text:list-item>
            <text:list-item>
              <text:p text:style-name="P35"><text:span text:style-name="T8">Accountability</text:span></text:p>
            </text:list-item>
          </text:list>
          <text:p text:style-name="P12"><text:span text:style-name="T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0;p24" draw:style-name="gr38" draw:text-style-name="P15" draw:layer="layout" svg:width="1.83cm" svg:height="1.345cm" svg:x="0.718cm" svg:y="3.201cm">
          <draw:image xlink:href="Pictures/10000201000000ED00000449C8AB390A94284B94.png" xlink:type="simple" xlink:show="embed" xlink:actuate="onLoad">
            <text:p/>
          </draw:image>
        </draw:frame>
        <draw:frame draw:name="Google Shape;601;p24" draw:style-name="gr38" draw:text-style-name="P15" draw:layer="layout" svg:width="1.83cm" svg:height="1.345cm" svg:x="0.718cm" svg:y="4.682cm">
          <draw:image xlink:href="Pictures/10000201000000ED00000449C8AB390A94284B94.png" xlink:type="simple" xlink:show="embed" xlink:actuate="onLoad">
            <text:p/>
          </draw:image>
        </draw:frame>
        <draw:frame draw:name="Google Shape;602;p24" draw:style-name="gr38" draw:text-style-name="P15" draw:layer="layout" svg:width="1.83cm" svg:height="1.345cm" svg:x="0.718cm" svg:y="6.164cm">
          <draw:image xlink:href="Pictures/10000201000000ED00000449C8AB390A94284B94.png" xlink:type="simple" xlink:show="embed" xlink:actuate="onLoad">
            <text:p/>
          </draw:image>
        </draw:frame>
        <draw:frame draw:name="Google Shape;603;p24" draw:style-name="gr38" draw:text-style-name="P15" draw:layer="layout" svg:width="1.83cm" svg:height="1.345cm" svg:x="0.718cm" svg:y="7.646cm">
          <draw:image xlink:href="Pictures/10000201000000ED00000449C8AB390A94284B94.png" xlink:type="simple" xlink:show="embed" xlink:actuate="onLoad">
            <text:p/>
          </draw:image>
        </draw:frame>
        <draw:frame draw:name="Google Shape;604;p24" draw:style-name="gr38" draw:text-style-name="P15" draw:layer="layout" svg:width="1.83cm" svg:height="1.345cm" svg:x="0.718cm" svg:y="9.127cm">
          <draw:image xlink:href="Pictures/10000201000000ED00000449C8AB390A94284B94.png" xlink:type="simple" xlink:show="embed" xlink:actuate="onLoad">
            <text:p/>
          </draw:image>
        </draw:frame>
        <draw:custom-shape draw:name="Google Shape;605;p24" draw:style-name="gr39" draw:text-style-name="P36" draw:layer="layout" svg:width="10.095cm" svg:height="1.709cm" svg:x="12.119cm" svg:y="3.201cm">
          <text:p text:style-name="P12"><text:span text:style-name="T8">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6;p24" presentation:style-name="pr5" draw:text-style-name="P9" draw:layer="layout" svg:width="9.082cm" svg:height="2.383cm" svg:x="1.566cm" svg:y="0.257cm" presentation:class="title" presentation:user-transformed="true">
          <draw:text-box>
            <text:p text:style-name="P8"><text:span text:style-name="T37">What is…?</text:span></text:p>
          </draw:text-box>
        </draw:frame>
        <draw:frame draw:name="Google Shape;607;p24" presentation:style-name="pr5" draw:text-style-name="P9" draw:layer="layout" svg:width="12.956cm" svg:height="2.383cm" svg:x="11.3cm" svg:y="0.393cm" presentation:class="title" presentation:user-transformed="true">
          <draw:text-box>
            <text:p text:style-name="P8"><text:span text:style-name="T38">What does GDPR say about…?</text:span></text:p>
          </draw:text-box>
        </draw:frame>
        <draw:frame draw:name="Google Shape;608;p24" draw:style-name="gr38" draw:text-style-name="P15" draw:layer="layout" svg:width="1.83cm" svg:height="1.345cm" svg:x="10.123cm" svg:y="3.383cm">
          <draw:image xlink:href="Pictures/10000201000000ED00000449C8AB390A94284B94.png" xlink:type="simple" xlink:show="embed" xlink:actuate="onLoad">
            <text:p/>
          </draw:image>
        </draw:frame>
        <presentation:notes draw:style-name="dp2">
          <draw:custom-shape draw:name="Google Shape;589;p24: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90;p24:notes" draw:style-name="gr1" draw:layer="layout" svg:width="0.003cm" svg:height="0.003cm" svg:x="0cm" svg:y="1.931cm" draw:page-number="23" presentation:class="page"/>
          <draw:frame draw:name="Google Shape;591;p24:notes" presentation:style-name="pr29" draw:text-style-name="P7" draw:layer="layout" svg:width="15.239cm" svg:height="11.429cm" svg:x="1.905cm" svg:y="12.065cm" presentation:class="notes" presentation:placeholder="true" presentation:user-transformed="true">
            <draw:text-box/>
          </draw:frame>
        </presentation:notes>
      </draw:page>
      <draw:page draw:name="page24" draw:style-name="dp1" draw:master-page-name="OBJECT" presentation:presentation-page-layout-name="AL1T11">
        <draw:custom-shape draw:name="Google Shape;614;p25" draw:style-name="gr14" draw:text-style-name="P22" draw:layer="layout" svg:width="19.356cm" svg:height="2.498cm" svg:x="2.721cm" svg:y="0.599cm">
          <text:p text:style-name="P17"><text:span text:style-name="T33">Fairness and Transparen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5;p25" draw:style-name="gr10" draw:text-style-name="P6" draw:layer="layout" svg:width="22.499cm" svg:height="2.116cm" svg:x="1.906cm" svg:y="3.31cm">
          <text:list text:style-name="L20">
            <text:list-item>
              <text:p text:style-name="P29"><text:span text:style-name="T30">Fairness:</text:span><text:span text:style-name="T23"> We must not take advantage of our position as a research institution, we must not take advantage of our position in relation to the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25" draw:style-name="gr10" draw:text-style-name="P6" draw:layer="layout" svg:width="22.499cm" svg:height="1.597cm" svg:x="1.906cm" svg:y="6.273cm">
          <text:list text:style-name="L20">
            <text:list-item>
              <text:p text:style-name="P29"><text:span text:style-name="T30">Transparency:</text:span><text:span text:style-name="T23"> The data subjects shall be informed of what we do with their personal data, and and of how to exercise their r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25" draw:style-name="gr10" draw:text-style-name="P6" draw:layer="layout" svg:width="22.499cm" svg:height="1.597cm" svg:x="1.694cm" svg:y="8.601cm">
          <text:list text:style-name="L20">
            <text:list-item>
              <text:p text:style-name="P29"><text:span text:style-name="T23">Provision of the required information in a clear and plain langu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25" draw:style-name="gr6" draw:text-style-name="P6" draw:layer="layout" svg:width="24.423cm" svg:height="2.198cm" svg:x="0.488cm" svg:y="11.211cm">
          <text:p text:style-name="P1"><text:span text:style-name="T47">Further readings:</text:span></text:p>
          <text:list text:style-name="L7">
            <text:list-item>
              <text:p text:style-name="P21"><text:span text:style-name="T4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0"><text:a xlink:href="https://eur-lex.europa.eu/legal-content/EN/TXT/HTML/?uri=CELEX:32016R0679&amp;from=EN#d1e1888-1-1" xlink:type="simple">https://eur-lex.europa.eu/legal-content/EN/TXT/HTML/?uri=CELEX:32016R0679&amp;from=EN#d1e1888-1-1</text:a></text:span></text:p>
            </text:list-item>
            <text:list-item>
              <text:p text:style-name="P21"><text:span text:style-name="T40"><text:a xlink:href="https://lovdata.no/dokument/NL/lov/2008-06-20-44/KAPITTEL_8#KAPITTEL_8" xlink:type="simple">https://lovdata.no/dokument/NL/lov/2008-06-20-44/KAPITTEL_8#KAPITTEL_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10;p25: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11;p25:notes" draw:style-name="gr1" draw:layer="layout" svg:width="0.003cm" svg:height="0.003cm" svg:x="0cm" svg:y="1.931cm" draw:page-number="24" presentation:class="page"/>
          <draw:frame draw:name="Google Shape;612;p25:notes" presentation:style-name="pr30" draw:text-style-name="P7" draw:layer="layout" svg:width="15.239cm" svg:height="11.429cm" svg:x="1.905cm" svg:y="12.065cm" presentation:class="notes" presentation:placeholder="true" presentation:user-transformed="true">
            <draw:text-box/>
          </draw:frame>
        </presentation:notes>
      </draw:page>
      <draw:page draw:name="page25" draw:style-name="dp1" draw:master-page-name="OBJECT" presentation:presentation-page-layout-name="AL1T11">
        <draw:custom-shape draw:name="Google Shape;624;p26" draw:style-name="gr14" draw:text-style-name="P22" draw:layer="layout" svg:width="19.356cm" svg:height="2.498cm" svg:x="2.721cm" svg:y="0.599cm">
          <text:p text:style-name="P17"><text:span text:style-name="T33">Data Mini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5;p26" draw:style-name="gr10" draw:text-style-name="P6" draw:layer="layout" svg:width="22.499cm" svg:height="2.116cm" svg:x="1.906cm" svg:y="3.31cm">
          <text:list text:style-name="L20">
            <text:list-item>
              <text:p text:style-name="P29"><text:span text:style-name="T23">The amount of personal data shall be limited to that necessary to achieve the purpose of data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26" draw:style-name="gr10" draw:text-style-name="P6" draw:layer="layout" svg:width="22.499cm" svg:height="1.597cm" svg:x="1.694cm" svg:y="6.273cm">
          <text:list text:style-name="L20">
            <text:list-item>
              <text:p text:style-name="P29"><text:span text:style-name="T23">Obligation to avoid collecting, storing or in any other way processing personal data that is not strictly necessary, even if it may be “nice to ha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26" draw:style-name="gr6" draw:text-style-name="P6" draw:layer="layout" svg:width="24.423cm" svg:height="2.198cm" svg:x="0.488cm" svg:y="11.211cm">
          <text:p text:style-name="P1"><text:span text:style-name="T47">Further readings:</text:span></text:p>
          <text:list text:style-name="L7">
            <text:list-item>
              <text:p text:style-name="P21"><text:span text:style-name="T4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0"><text:a xlink:href="https://eur-lex.europa.eu/legal-content/EN/TXT/HTML/?uri=CELEX:32016R0679&amp;from=EN#d1e1888-1-1" xlink:type="simple">https://eur-lex.europa.eu/legal-content/EN/TXT/HTML/?uri=CELEX:32016R0679&amp;from=EN#d1e1888-1-1</text:a></text:span></text:p>
            </text:list-item>
          </text:list>
          <text:p text:style-name="P21"><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20;p26: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21;p26:notes" draw:style-name="gr1" draw:layer="layout" svg:width="0.003cm" svg:height="0.003cm" svg:x="0cm" svg:y="1.931cm" draw:page-number="25" presentation:class="page"/>
          <draw:frame draw:name="Google Shape;622;p26:notes" presentation:style-name="pr31" draw:text-style-name="P7" draw:layer="layout" svg:width="15.239cm" svg:height="11.429cm" svg:x="1.905cm" svg:y="12.065cm" presentation:class="notes" presentation:placeholder="true" presentation:user-transformed="true">
            <draw:text-box/>
          </draw:frame>
        </presentation:notes>
      </draw:page>
      <draw:page draw:name="page26" draw:style-name="dp1" draw:master-page-name="OBJECT" presentation:presentation-page-layout-name="AL1T11">
        <draw:custom-shape draw:name="Google Shape;633;p27" draw:style-name="gr14" draw:text-style-name="P22" draw:layer="layout" svg:width="19.356cm" svg:height="2.498cm" svg:x="2.721cm" svg:y="0.599cm">
          <text:p text:style-name="P17"><text:span text:style-name="T33">Data Accura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4;p27" draw:style-name="gr10" draw:text-style-name="P6" draw:layer="layout" svg:width="19.134cm" svg:height="2.116cm" svg:x="1.483cm" svg:y="3.733cm">
          <text:list text:style-name="L20">
            <text:list-item>
              <text:p text:style-name="P29"><text:span text:style-name="T23">Important not only in consideration of the data subjects </text:span><text:span text:style-name="T23"><text:line-break/></text:span><text:span text:style-name="T23">but also for your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27" draw:style-name="gr10" draw:text-style-name="P6" draw:layer="layout" svg:width="22.499cm" svg:height="1.597cm" svg:x="1.694cm" svg:y="6.273cm">
          <text:list text:style-name="L20">
            <text:list-item>
              <text:p text:style-name="P29"><text:span text:style-name="T23">Obligation to rectify or delete inaccurate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27" draw:style-name="gr6" draw:text-style-name="P6" draw:layer="layout" svg:width="24.423cm" svg:height="2.198cm" svg:x="0.488cm" svg:y="11.211cm">
          <text:p text:style-name="P1"><text:span text:style-name="T47">Further readings:</text:span></text:p>
          <text:list text:style-name="L7">
            <text:list-item>
              <text:p text:style-name="P21"><text:span text:style-name="T4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0"><text:a xlink:href="https://eur-lex.europa.eu/legal-content/EN/TXT/HTML/?uri=CELEX:32016R0679&amp;from=EN#d1e1888-1-1" xlink:type="simple">https://eur-lex.europa.eu/legal-content/EN/TXT/HTML/?uri=CELEX:32016R0679&amp;from=EN#d1e1888-1-1</text:a></text:span></text:p>
            </text:list-item>
          </text:list>
          <text:p text:style-name="P21"><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27" draw:style-name="gr10" draw:text-style-name="P6" draw:layer="layout" svg:width="22.499cm" svg:height="1.597cm" svg:x="1.694cm" svg:y="7.966cm">
          <text:list text:style-name="L20">
            <text:list-item>
              <text:p text:style-name="P29"><text:span text:style-name="T23">Your data subject can ask for deletion of the data at any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29;p27: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30;p27:notes" draw:style-name="gr1" draw:layer="layout" svg:width="0.003cm" svg:height="0.003cm" svg:x="0cm" svg:y="1.931cm" draw:page-number="26" presentation:class="page"/>
          <draw:frame draw:name="Google Shape;631;p27:notes" presentation:style-name="pr32"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OBJECT" presentation:presentation-page-layout-name="AL1T11">
        <draw:custom-shape draw:name="Google Shape;643;p28" draw:style-name="gr14" draw:text-style-name="P22" draw:layer="layout" svg:width="19.356cm" svg:height="1.856cm" svg:x="2.721cm" svg:y="0.599cm">
          <text:p text:style-name="P17"><text:span text:style-name="T33">Storage Limit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4;p28" draw:style-name="gr10" draw:text-style-name="P6" draw:layer="layout" svg:width="23.432cm" svg:height="2.116cm" svg:x="0.848cm" svg:y="3.098cm">
          <text:list text:style-name="L29">
            <text:list-item>
              <text:p text:style-name="P29"><text:span text:style-name="T42">Personal data shall not be stored for longer than necessary to fulfil the purp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28" draw:style-name="gr10" draw:text-style-name="P6" draw:layer="layout" svg:width="23.881cm" svg:height="1.597cm" svg:x="0.759cm" svg:y="4.518cm">
          <text:list text:style-name="L29">
            <text:list-item>
              <text:p text:style-name="P29"><text:span text:style-name="T42">Once the purpose has been achieved, the data shall in principle be deleted or made anonymo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28" draw:style-name="gr6" draw:text-style-name="P6" draw:layer="layout" svg:width="24.423cm" svg:height="2.198cm" svg:x="0.488cm" svg:y="11.211cm">
          <text:p text:style-name="P1"><text:span text:style-name="T47">Further readings:</text:span></text:p>
          <text:list text:style-name="L7">
            <text:list-item>
              <text:p text:style-name="P21"><text:span text:style-name="T4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0"><text:a xlink:href="https://eur-lex.europa.eu/legal-content/EN/TXT/HTML/?uri=CELEX:32016R0679&amp;from=EN#d1e1888-1-1" xlink:type="simple">https://eur-lex.europa.eu/legal-content/EN/TXT/HTML/?uri=CELEX:32016R0679&amp;from=EN#d1e1888-1-1</text:a></text:span></text:p>
            </text:list-item>
          </text:list>
          <text:p text:style-name="P21"><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28" draw:style-name="gr10" draw:text-style-name="P6" draw:layer="layout" svg:width="19.207cm" svg:height="2.116cm" svg:x="0.759cm" svg:y="5.98cm">
          <text:list text:style-name="L29">
            <text:list-item>
              <text:p text:style-name="P29"><text:span text:style-name="T42">REK usually sets requirements for storage beyond the project period for reasons of verifiability - </text:span><text:span text:style-name="T43">you may need to include this in your appl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28" draw:style-name="gr10" draw:text-style-name="P6" draw:layer="layout" svg:width="19.207cm" svg:height="2.116cm" svg:x="0.759cm" svg:y="7.885cm">
          <text:list text:style-name="L29">
            <text:list-item>
              <text:p text:style-name="P29"><text:span text:style-name="T42">Processing personal data for the purpose of verifiability is legitim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28" draw:style-name="gr10" draw:text-style-name="P6" draw:layer="layout" svg:width="22.313cm" svg:height="2.116cm" svg:x="0.759cm" svg:y="9.155cm">
          <text:list text:style-name="L29">
            <text:list-item>
              <text:p text:style-name="P29"><text:span text:style-name="T42">Personal data may be stored for longer periods so far as the personal data is processed solely for scientific, historical, and/or statistical research purpo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39;p28: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40;p28:notes" draw:style-name="gr1" draw:layer="layout" svg:width="0.003cm" svg:height="0.003cm" svg:x="0cm" svg:y="1.931cm" draw:page-number="27" presentation:class="page"/>
          <draw:frame draw:name="Google Shape;641;p28:notes" presentation:style-name="pr33" draw:text-style-name="P7" draw:layer="layout" svg:width="15.239cm" svg:height="11.429cm" svg:x="1.905cm" svg:y="12.065cm" presentation:class="notes" presentation:placeholder="true" presentation:user-transformed="true">
            <draw:text-box/>
          </draw:frame>
        </presentation:notes>
      </draw:page>
      <draw:page draw:name="page28" draw:style-name="dp1" draw:master-page-name="OBJECT" presentation:presentation-page-layout-name="AL1T11">
        <draw:custom-shape draw:name="Google Shape;655;p29" draw:style-name="gr14" draw:text-style-name="P22" xml:id="id136" draw:id="id136" draw:layer="layout" svg:width="19.356cm" svg:height="1.856cm" svg:x="3.568cm" svg:y="0.387cm">
          <text:p text:style-name="P17"><text:span text:style-name="T33">Integrity and Confidentia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6;p29" draw:style-name="gr10" draw:text-style-name="P6" xml:id="id137" draw:id="id137" draw:layer="layout" svg:width="23.432cm" svg:height="3.959cm" svg:x="0.848cm" svg:y="2.675cm">
          <text:list text:style-name="L29">
            <text:list-item>
              <text:p text:style-name="P29"><text:span text:style-name="T42">Personal data must be processed in a manner that ensures:</text:span></text:p>
            </text:list-item>
          </text:list>
          <text:list text:style-name="L36">
            <text:list-item>
              <text:list>
                <text:list-item>
                  <text:p text:style-name="P16"><text:span text:style-name="T42">appropriate security of the personal data, </text:span></text:p>
                </text:list-item>
                <text:list-item>
                  <text:p text:style-name="P16"><text:span text:style-name="T42">protect personal data against unauthorised access, </text:span></text:p>
                </text:list-item>
                <text:list-item>
                  <text:p text:style-name="P16"><text:span text:style-name="T42">unlawful processing, </text:span></text:p>
                </text:list-item>
                <text:list-item>
                  <text:p text:style-name="P16"><text:span text:style-name="T42">accidental loss, distribution, amendment, or dam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29" draw:style-name="gr10" draw:text-style-name="P6" xml:id="id139" draw:id="id139" draw:layer="layout" svg:width="17.984cm" svg:height="1.597cm" svg:x="1.152cm" svg:y="6.846cm">
          <text:p text:style-name="P41"><text:span text:style-name="T42">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9" draw:style-name="gr6" draw:text-style-name="P6" xml:id="id142" draw:id="id142" draw:layer="layout" svg:width="24.423cm" svg:height="1.575cm" svg:x="0.488cm" svg:y="12.514cm">
          <text:p text:style-name="P1"><text:span text:style-name="T9">Image Source: </text:span><text:span text:style-name="T49"><text:a xlink:href="https://uio.no/english/for-employees/support/research/funding/units/hf/imv/data-ethics/colors.html" xlink:type="simple">https://uio.no/english/for-employees/support/research/funding/units/hf/imv/data-ethics/colors.html</text:a></text:span></text:p>
          <text:p text:style-name="P1"><text:span text:style-name="T9">More about TSD:</text:span><text:span text:style-name="T47"> </text:span><text:span text:style-name="T48">https://www.uio.no/english/services/it/research/sensitive-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29" draw:style-name="gr10" draw:text-style-name="P6" xml:id="id141" draw:id="id141" draw:layer="layout" svg:width="19.207cm" svg:height="2.116cm" svg:x="0.759cm" svg:y="9.578cm">
          <text:list text:style-name="L29">
            <text:list-item>
              <text:p text:style-name="P29"><text:span text:style-name="T42">Pseudonymisation</text:span></text:p>
            </text:list-item>
          </text:list>
          <text:list text:style-name="L36">
            <text:list-item>
              <text:list>
                <text:list-item>
                  <text:p text:style-name="P16"><text:span text:style-name="T42">Dedicated data analysis platform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29" draw:style-name="gr32" draw:text-style-name="P15" xml:id="id138" draw:id="id138" draw:layer="layout" svg:width="1.099cm" svg:height="1.158cm" svg:x="1.059cm" svg:y="6.846cm">
          <draw:image xlink:href="Pictures/10000201000000A300000448EACA50CF4303650F.png" xlink:type="simple" xlink:show="embed" xlink:actuate="onLoad">
            <text:p/>
          </draw:image>
        </draw:frame>
        <draw:frame draw:name="Google Shape;661;p29" draw:style-name="gr5" draw:text-style-name="P15" xml:id="id140" draw:id="id140" draw:layer="layout" svg:width="8.063cm" svg:height="2.519cm" svg:x="10.435cm" svg:y="6.635cm">
          <draw:image xlink:href="Pictures/1000020100000370000001130697892BF8D75BA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seq>
        </anim:par>
        <presentation:notes draw:style-name="dp2">
          <draw:custom-shape draw:name="Google Shape;651;p29: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52;p29:notes" draw:style-name="gr1" draw:layer="layout" svg:width="0.003cm" svg:height="0.003cm" svg:x="0cm" svg:y="1.931cm" draw:page-number="28" presentation:class="page"/>
          <draw:frame draw:name="Google Shape;653;p29:notes" presentation:style-name="pr34" draw:text-style-name="P7" draw:layer="layout" svg:width="15.239cm" svg:height="11.429cm" svg:x="1.905cm" svg:y="12.065cm" presentation:class="notes" presentation:placeholder="true" presentation:user-transformed="true">
            <draw:text-box/>
          </draw:frame>
        </presentation:notes>
      </draw:page>
      <draw:page draw:name="page29" draw:style-name="dp1" draw:master-page-name="OBJECT" presentation:presentation-page-layout-name="AL1T11">
        <draw:custom-shape draw:name="Google Shape;667;p30" draw:style-name="gr14" draw:text-style-name="P22" draw:layer="layout" svg:width="19.356cm" svg:height="1.856cm" svg:x="2.721cm" svg:y="0.599cm">
          <text:p text:style-name="P17"><text:span text:style-name="T33">Accountabi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8;p30" draw:style-name="gr10" draw:text-style-name="P6" draw:layer="layout" svg:width="23.432cm" svg:height="2.116cm" svg:x="0.848cm" svg:y="3.098cm">
          <text:list text:style-name="L20">
            <text:list-item>
              <text:p text:style-name="P29"><text:span text:style-name="T23">Data controller shall be responsible for, and be able to demonstrate </text:span><text:span text:style-name="T30">compliance with the princi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30" draw:style-name="gr10" draw:text-style-name="P6" draw:layer="layout" svg:width="23.881cm" svg:height="1.597cm" svg:x="0.759cm" svg:y="5.788cm">
          <text:list text:style-name="L20">
            <text:list-item>
              <text:p text:style-name="P29"><text:span text:style-name="T23">Obligation to </text:span><text:span text:style-name="T30">document</text:span><text:span text:style-name="T23"> the processing of personal (sensitive)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30" draw:style-name="gr10" draw:text-style-name="P6" draw:layer="layout" svg:width="17.984cm" svg:height="1.597cm" svg:x="0.729cm" svg:y="7.693cm">
          <text:p text:style-name="P41"><text:span text:style-name="T23">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p30" draw:style-name="gr32" draw:text-style-name="P15" draw:layer="layout" svg:width="1.099cm" svg:height="1.158cm" svg:x="0.636cm" svg:y="7.693cm">
          <draw:image xlink:href="Pictures/10000201000000A300000448EACA50CF4303650F.png" xlink:type="simple" xlink:show="embed" xlink:actuate="onLoad">
            <text:p/>
          </draw:image>
        </draw:frame>
        <draw:custom-shape draw:name="Google Shape;672;p30" draw:style-name="gr6" draw:text-style-name="P6" draw:layer="layout" svg:width="24.423cm" svg:height="1.187cm" svg:x="0.488cm" svg:y="12.514cm">
          <text:p text:style-name="P1"><text:span text:style-name="T9">System for Risk and compliance. Processing of personal data in research and student projects at UiB: </text:span><text:span text:style-name="T50"><text:s/></text:span><text:span text:style-name="T51"><text:a xlink:href="https://rette.app.uib.no/" xlink:type="simple">https://rette.app.uib.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63;p30: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64;p30:notes" draw:style-name="gr1" draw:layer="layout" svg:width="0.003cm" svg:height="0.003cm" svg:x="0cm" svg:y="1.931cm" draw:page-number="29" presentation:class="page"/>
          <draw:frame draw:name="Google Shape;665;p30:notes" presentation:style-name="pr35" draw:text-style-name="P7"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OBJECT" presentation:presentation-page-layout-name="AL1T11">
        <draw:custom-shape draw:name="Google Shape;678;p31" draw:style-name="gr23" draw:text-style-name="P24" draw:layer="layout" svg:width="7.197cm" svg:height="1.123cm" svg:x="2.76cm" svg:y="3.422cm">
          <text:p text:style-name="P12"><text:span text:style-name="T7">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9;p31" draw:style-name="gr24" draw:text-style-name="P25" draw:layer="layout" svg:width="7.374cm" svg:height="1.123cm" svg:x="2.76cm" svg:y="4.97cm">
          <text:p text:style-name="P12"><text:span text:style-name="T7">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0;p31" draw:style-name="gr25" draw:text-style-name="P26" draw:layer="layout" svg:width="7.197cm" svg:height="1.123cm" svg:x="2.76cm" svg:y="6.451cm">
          <text:p text:style-name="P12"><text:span text:style-name="T8">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1;p31" draw:style-name="gr35" draw:text-style-name="P33" draw:layer="layout" svg:width="6.418cm" svg:height="1.123cm" svg:x="2.76cm" svg:y="7.933cm">
          <text:p text:style-name="P12"><text:span text:style-name="T8">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2;p31" draw:style-name="gr26" draw:text-style-name="P27" draw:layer="layout" svg:width="6.418cm" svg:height="1.123cm" svg:x="2.76cm" svg:y="9.415cm">
          <text:p text:style-name="P12"><text:span text:style-name="T7">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3;p31" draw:style-name="gr36" draw:text-style-name="P34" draw:layer="layout" svg:width="10.243cm" svg:height="1.709cm" svg:x="12.119cm" svg:y="5.115cm">
          <text:p text:style-name="P12"><text:span text:style-name="T8">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4;p31" draw:style-name="gr37" draw:text-style-name="P6" draw:layer="layout" svg:width="10.243cm" svg:height="5.347cm" svg:x="12.542cm" svg:y="7.03cm">
          <text:list text:style-name="L25">
            <text:list-item>
              <text:p text:style-name="P35"><text:span text:style-name="T8">Fairness and Transparency</text:span></text:p>
            </text:list-item>
            <text:list-item>
              <text:p text:style-name="P35"><text:span text:style-name="T8">Data Minimisation</text:span></text:p>
            </text:list-item>
            <text:list-item>
              <text:p text:style-name="P35"><text:span text:style-name="T8">Data Accuracy</text:span></text:p>
            </text:list-item>
            <text:list-item>
              <text:p text:style-name="P35"><text:span text:style-name="T8">Storage Limitation</text:span></text:p>
            </text:list-item>
            <text:list-item>
              <text:p text:style-name="P35"><text:span text:style-name="T8">Integrity and Confidentiality</text:span></text:p>
            </text:list-item>
            <text:list-item>
              <text:p text:style-name="P35"><text:span text:style-name="T8">Accountability</text:span></text:p>
            </text:list-item>
          </text:list>
          <text:p text:style-name="P12"><text:span text:style-name="T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5;p31" draw:style-name="gr38" draw:text-style-name="P15" draw:layer="layout" svg:width="1.83cm" svg:height="1.345cm" svg:x="0.718cm" svg:y="3.201cm">
          <draw:image xlink:href="Pictures/10000201000000ED00000449C8AB390A94284B94.png" xlink:type="simple" xlink:show="embed" xlink:actuate="onLoad">
            <text:p/>
          </draw:image>
        </draw:frame>
        <draw:frame draw:name="Google Shape;686;p31" draw:style-name="gr38" draw:text-style-name="P15" draw:layer="layout" svg:width="1.83cm" svg:height="1.345cm" svg:x="0.718cm" svg:y="4.682cm">
          <draw:image xlink:href="Pictures/10000201000000ED00000449C8AB390A94284B94.png" xlink:type="simple" xlink:show="embed" xlink:actuate="onLoad">
            <text:p/>
          </draw:image>
        </draw:frame>
        <draw:frame draw:name="Google Shape;687;p31" draw:style-name="gr38" draw:text-style-name="P15" draw:layer="layout" svg:width="1.83cm" svg:height="1.345cm" svg:x="0.718cm" svg:y="6.164cm">
          <draw:image xlink:href="Pictures/10000201000000ED00000449C8AB390A94284B94.png" xlink:type="simple" xlink:show="embed" xlink:actuate="onLoad">
            <text:p/>
          </draw:image>
        </draw:frame>
        <draw:frame draw:name="Google Shape;688;p31" draw:style-name="gr38" draw:text-style-name="P15" draw:layer="layout" svg:width="1.83cm" svg:height="1.345cm" svg:x="0.718cm" svg:y="7.646cm">
          <draw:image xlink:href="Pictures/10000201000000ED00000449C8AB390A94284B94.png" xlink:type="simple" xlink:show="embed" xlink:actuate="onLoad">
            <text:p/>
          </draw:image>
        </draw:frame>
        <draw:frame draw:name="Google Shape;689;p31" draw:style-name="gr38" draw:text-style-name="P15" draw:layer="layout" svg:width="1.83cm" svg:height="1.345cm" svg:x="0.718cm" svg:y="9.127cm">
          <draw:image xlink:href="Pictures/10000201000000ED00000449C8AB390A94284B94.png" xlink:type="simple" xlink:show="embed" xlink:actuate="onLoad">
            <text:p/>
          </draw:image>
        </draw:frame>
        <draw:custom-shape draw:name="Google Shape;690;p31" draw:style-name="gr39" draw:text-style-name="P36" draw:layer="layout" svg:width="10.095cm" svg:height="1.709cm" svg:x="12.119cm" svg:y="3.201cm">
          <text:p text:style-name="P12"><text:span text:style-name="T8">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91;p31" presentation:style-name="pr5" draw:text-style-name="P9" draw:layer="layout" svg:width="9.082cm" svg:height="2.383cm" svg:x="1.566cm" svg:y="0.257cm" presentation:class="title" presentation:user-transformed="true">
          <draw:text-box>
            <text:p text:style-name="P8"><text:span text:style-name="T37">What is…?</text:span></text:p>
          </draw:text-box>
        </draw:frame>
        <draw:frame draw:name="Google Shape;692;p31" presentation:style-name="pr5" draw:text-style-name="P9" draw:layer="layout" svg:width="12.956cm" svg:height="2.383cm" svg:x="11.3cm" svg:y="0.393cm" presentation:class="title" presentation:user-transformed="true">
          <draw:text-box>
            <text:p text:style-name="P8"><text:span text:style-name="T38">What does GDPR say about…?</text:span></text:p>
          </draw:text-box>
        </draw:frame>
        <draw:frame draw:name="Google Shape;693;p31" draw:style-name="gr38" draw:text-style-name="P15" draw:layer="layout" svg:width="1.83cm" svg:height="1.345cm" svg:x="10.123cm" svg:y="3.383cm">
          <draw:image xlink:href="Pictures/10000201000000ED00000449C8AB390A94284B94.png" xlink:type="simple" xlink:show="embed" xlink:actuate="onLoad">
            <text:p/>
          </draw:image>
        </draw:frame>
        <draw:frame draw:name="Google Shape;694;p31" draw:style-name="gr38" draw:text-style-name="P15" draw:layer="layout" svg:width="1.83cm" svg:height="1.345cm" svg:x="10.123cm" svg:y="5.076cm">
          <draw:image xlink:href="Pictures/10000201000000ED00000449C8AB390A94284B94.png" xlink:type="simple" xlink:show="embed" xlink:actuate="onLoad">
            <text:p/>
          </draw:image>
        </draw:frame>
        <presentation:notes draw:style-name="dp2">
          <draw:custom-shape draw:name="Google Shape;674;p31: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75;p31:notes" draw:style-name="gr1" draw:layer="layout" svg:width="0.003cm" svg:height="0.003cm" svg:x="0cm" svg:y="1.931cm" draw:page-number="30" presentation:class="page"/>
          <draw:frame draw:name="Google Shape;676;p31:notes" presentation:style-name="pr36" draw:text-style-name="P7" draw:layer="layout" svg:width="15.239cm" svg:height="11.429cm" svg:x="1.905cm" svg:y="12.065cm" presentation:class="notes" presentation:placeholder="true" presentation:user-transformed="true">
            <draw:text-box/>
          </draw:frame>
        </presentation:notes>
      </draw:page>
      <draw:page draw:name="Research Data Protection and Ethical Compliance" draw:style-name="dp1" draw:master-page-name="Divider_20_slide">
        <draw:frame draw:name="Google Shape;700;g387f1b574d3_0_221" presentation:style-name="pr37" draw:text-style-name="P11" draw:layer="layout" svg:width="10.918cm" svg:height="3.438cm" svg:x="0.237cm" svg:y="2.841cm" presentation:class="title" presentation:user-transformed="true">
          <draw:text-box>
            <text:p text:style-name="P12"><text:span text:style-name="T52">Research Data Protection and Ethical Compliance</text:span></text:p>
          </draw:text-box>
        </draw:frame>
        <presentation:notes draw:style-name="dp2">
          <draw:page-thumbnail draw:name="Google Shape;696;g387f1b574d3_0_221:notes" draw:style-name="gr1" draw:layer="layout" svg:width="15.239cm" svg:height="8.572cm" svg:x="1.905cm" svg:y="3.175cm" draw:page-number="31" presentation:class="page"/>
          <draw:frame draw:name="Google Shape;697;g387f1b574d3_0_221:notes" presentation:style-name="pr38" draw:text-style-name="P7" draw:layer="layout" svg:width="15.239cm" svg:height="10.001cm" svg:x="1.905cm" svg:y="12.224cm" presentation:class="notes" presentation:placeholder="true" presentation:user-transformed="true">
            <draw:text-box/>
          </draw:frame>
          <draw:frame draw:name="Google Shape;698;g387f1b574d3_0_221:notes" presentation:style-name="pr39" draw:text-style-name="P43" draw:layer="layout" svg:width="8.254cm" svg:height="1.273cm" svg:x="10.791cm" svg:y="24.126cm" presentation:class="page-number" presentation:user-transformed="true">
            <draw:text-box>
              <text:p text:style-name="P42"><text:span text:style-name="T42"><text:page-number>&lt;number&gt;</text:page-number></text:span></text:p>
            </draw:text-box>
          </draw:frame>
        </presentation:notes>
      </draw:page>
      <draw:page draw:name="Let’s learn about (the importance of):" draw:style-name="dp1" draw:master-page-name="OBJECT" presentation:presentation-page-layout-name="AL1T11">
        <draw:frame draw:name="Google Shape;706;p32" presentation:style-name="pr5" draw:text-style-name="P9" draw:layer="layout" svg:width="22.859cm" svg:height="2.383cm" svg:x="1.27cm" svg:y="0.293cm" presentation:class="title" presentation:user-transformed="true">
          <draw:text-box>
            <text:p text:style-name="P8"><text:span text:style-name="T6">Let’s learn about (the importance of):</text:span></text:p>
          </draw:text-box>
        </draw:frame>
        <draw:custom-shape draw:name="Google Shape;707;p32" draw:style-name="gr43" draw:text-style-name="P44" draw:layer="layout" svg:width="14.118cm" svg:height="1.514cm" svg:x="5.724cm" svg:y="3.243cm">
          <text:p text:style-name="P12"><text:span text:style-name="T7">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8;p32" draw:style-name="gr44" draw:text-style-name="P45" draw:layer="layout" svg:width="10.839cm" svg:height="1.26cm" svg:x="7.205cm" svg:y="5.256cm">
          <text:p text:style-name="P12"><text:span text:style-name="T7">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9;p32" draw:style-name="gr45" draw:text-style-name="P46" draw:layer="layout" svg:width="8.722cm" svg:height="1.123cm" svg:x="8.264cm" svg:y="7.086cm">
          <text:p text:style-name="P12"><text:span text:style-name="T7">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0;p32" draw:style-name="gr46" draw:text-style-name="P47" draw:layer="layout" svg:width="7.957cm" svg:height="1.123cm" svg:x="8.333cm" svg:y="8.779cm">
          <text:p text:style-name="P12"><text:span text:style-name="T8">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11;p32" draw:style-name="gr17" draw:text-style-name="P15" draw:layer="layout" svg:width="1.598cm" svg:height="1.514cm" svg:x="4.022cm" svg:y="3.243cm">
          <draw:image xlink:href="Pictures/10000201000000A300000448EACA50CF4303650F.png" xlink:type="simple" xlink:show="embed" xlink:actuate="onLoad">
            <text:p/>
          </draw:image>
        </draw:frame>
        <draw:frame draw:name="Google Shape;712;p32" draw:style-name="gr5" draw:text-style-name="P15" draw:layer="layout" svg:width="1.109cm" svg:height="0.806cm" svg:x="5.724cm" svg:y="5.357cm">
          <draw:image xlink:href="Pictures/100000000000020000000174C5E145BF6683B30C.png" xlink:type="simple" xlink:show="embed" xlink:actuate="onLoad">
            <text:p/>
          </draw:image>
        </draw:frame>
        <draw:frame draw:name="Google Shape;713;p32" draw:style-name="gr5" draw:text-style-name="P15" draw:layer="layout" svg:width="1.26cm" svg:height="1.26cm" svg:x="6.641cm" svg:y="6.974cm">
          <draw:image xlink:href="Pictures/1000020100000400000004001069E99D172314B3.png" xlink:type="simple" xlink:show="embed" xlink:actuate="onLoad">
            <text:p/>
          </draw:image>
        </draw:frame>
        <draw:custom-shape draw:name="Google Shape;714;p32" draw:style-name="gr47" draw:text-style-name="P48" draw:layer="layout" svg:width="6.541cm" svg:height="1.123cm" svg:x="8.544cm" svg:y="10.473cm">
          <text:p text:style-name="P12"><text:span text:style-name="T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15;p32" draw:style-name="gr5" draw:text-style-name="P15" draw:layer="layout" svg:width="0.94cm" svg:height="0.94cm" svg:x="6.834cm" svg:y="8.871cm">
          <draw:image xlink:href="Pictures/1000020100000300000003005C10A696FD01655D.png" xlink:type="simple" xlink:show="embed" xlink:actuate="onLoad">
            <text:p/>
          </draw:image>
        </draw:frame>
        <draw:frame draw:name="Google Shape;716;p32" draw:style-name="gr5" draw:text-style-name="P15" draw:layer="layout" svg:width="0.94cm" svg:height="0.94cm" svg:x="6.834cm" svg:y="10.448cm">
          <draw:image xlink:href="Pictures/100002010000040000000400056732C6DA6137D4.png" xlink:type="simple" xlink:show="embed" xlink:actuate="onLoad">
            <text:p/>
          </draw:image>
        </draw:frame>
        <presentation:notes draw:style-name="dp2">
          <draw:custom-shape draw:name="Google Shape;702;p32: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3;p32:notes" draw:style-name="gr1" draw:layer="layout" svg:width="0.003cm" svg:height="0.003cm" svg:x="0cm" svg:y="1.931cm" draw:page-number="32" presentation:class="page"/>
          <draw:frame draw:name="Google Shape;704;p32:notes" presentation:style-name="pr40"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OBJECT" presentation:presentation-page-layout-name="AL1T11">
        <draw:custom-shape draw:name="Google Shape;722;p33" draw:style-name="gr10" draw:text-style-name="P6" xml:id="id145" draw:id="id145" draw:layer="layout" svg:width="22.499cm" svg:height="2.116cm" svg:x="1.271cm" svg:y="3.31cm">
          <text:list text:style-name="L28">
            <text:list-item>
              <text:p text:style-name="P29"><text:span text:style-name="T16">“</text:span><text:span text:style-name="T16">Where a type of processing ... is likely to result in a high risk to the rights and freedoms of natural pers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33" draw:style-name="gr10" draw:text-style-name="P6" xml:id="id146" draw:id="id146" draw:layer="layout" svg:width="22.499cm" svg:height="2.304cm" svg:x="1.271cm" svg:y="5.003cm">
          <text:list text:style-name="L28">
            <text:list-item>
              <text:p text:style-name="P29"><text:span text:style-name="T16">Based on new technologies, the nature, scope, context and purposes of the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33" draw:style-name="gr10" draw:text-style-name="P6" xml:id="id148" draw:id="id148" draw:layer="layout" svg:width="22.499cm" svg:height="1.597cm" svg:x="1.059cm" svg:y="10.083cm">
          <text:list text:style-name="L28">
            <text:list-item>
              <text:p text:style-name="P29"><text:span text:style-name="T16">Identify risks and take measures to reduce the risk; DPIA helps ensure privacy of your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p33" draw:style-name="gr6" draw:text-style-name="P6" xml:id="id149" draw:id="id149" draw:layer="layout" svg:width="24.057cm" svg:height="1.575cm" svg:x="0.568cm" svg:y="12.483cm">
          <text:p text:style-name="P1"><text:span text:style-name="T47">Tool Resource</text:span><text:span text:style-name="T9">: </text:span><text:span text:style-name="T40"><text:a xlink:href="https://www.cnil.fr/en/open-source-pia-software-helps-carry-out-data-protection-impact-assesment" xlink:type="simple">https://www.cnil.fr/en/open-source-pia-software-helps-carry-out-data-protection-impact-assesment</text:a></text:span></text:p>
          <text:p text:style-name="P1"><text:span text:style-name="T47">Further reading:</text:span><text:span text:style-name="T9"> </text:span><text:span text:style-name="T40"><text:a xlink:href="https://gdpr-info.eu/art-35-gdpr/" xlink:type="simple">https://gdpr-info.eu/art-35-gd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33" draw:style-name="gr43" draw:text-style-name="P44" xml:id="id144" draw:id="id144" draw:layer="layout" svg:width="19.937cm" svg:height="2.116cm" svg:x="3.187cm" svg:y="0.601cm">
          <text:p text:style-name="P17"><text:span text:style-name="T53">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27;p33" draw:style-name="gr17" draw:text-style-name="P15" xml:id="id143" draw:id="id143" draw:layer="layout" svg:width="1.598cm" svg:height="1.514cm" svg:x="1.211cm" svg:y="0.948cm">
          <draw:image xlink:href="Pictures/10000201000000A300000448EACA50CF4303650F.png" xlink:type="simple" xlink:show="embed" xlink:actuate="onLoad">
            <text:p/>
          </draw:image>
        </draw:frame>
        <draw:custom-shape draw:name="Google Shape;728;p33" draw:style-name="gr10" draw:text-style-name="P6" xml:id="id147" draw:id="id147" draw:layer="layout" svg:width="22.499cm" svg:height="3.386cm" svg:x="1.271cm" svg:y="6.696cm">
          <text:list text:style-name="L28">
            <text:list-item>
              <text:p text:style-name="P29"><text:span text:style-name="T16">Your research work is based on: </text:span></text:p>
            </text:list-item>
          </text:list>
          <text:list text:style-name="L39">
            <text:list-item>
              <text:list>
                <text:list-item>
                  <text:p text:style-name="P16"><text:span text:style-name="T16">“</text:span><text:span text:style-name="T16">Processing of genetic data in conjunction with at least one other criterion” and </text:span></text:p>
                </text:list-item>
                <text:list-item>
                  <text:p text:style-name="P16"><text:span text:style-name="T16">“</text:span><text:span text:style-name="T16">Processing of personal data using innovative technology in conjunction with at least one other criter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seq>
        </anim:par>
        <presentation:notes draw:style-name="dp2">
          <draw:custom-shape draw:name="Google Shape;718;p33: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19;p33:notes" draw:style-name="gr1" draw:layer="layout" svg:width="0.003cm" svg:height="0.003cm" svg:x="0cm" svg:y="1.931cm" draw:page-number="33" presentation:class="page"/>
          <draw:frame draw:name="Google Shape;720;p33:notes" presentation:style-name="pr41"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OBJECT" presentation:presentation-page-layout-name="AL1T11">
        <draw:custom-shape draw:name="Google Shape;734;p34" draw:style-name="gr10" draw:text-style-name="P6" xml:id="id152" draw:id="id152" draw:layer="layout" svg:width="22.499cm" svg:height="4.444cm" svg:x="1.271cm" svg:y="3.31cm">
          <text:list text:style-name="L28">
            <text:list-item>
              <text:p text:style-name="P29"><text:span text:style-name="T16">Further processing and storage limitation - Articles 5(1)(b) and (e), GDPR</text:span></text:p>
            </text:list-item>
            <text:list-item>
              <text:p text:style-name="P16"><text:span text:style-name="T16">Processing of special categories of data - Article 9(2)(j), GDPR</text:span></text:p>
            </text:list-item>
            <text:list-item>
              <text:p text:style-name="P16"><text:span text:style-name="T16">Information provided by third parties - Article 14(5)(b), GDPR)</text:span></text:p>
            </text:list-item>
            <text:list-item>
              <text:p text:style-name="P16"><text:span text:style-name="T16">Right to erasure - Article 17(3)(d), GDPR</text:span></text:p>
            </text:list-item>
            <text:list-item>
              <text:p text:style-name="P16"><text:span text:style-name="T16">Right to object - Article 21(6) GDP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34" draw:style-name="gr6" draw:text-style-name="P6" xml:id="id154" draw:id="id154" draw:layer="layout" svg:width="19.24cm" svg:height="1.965cm" svg:x="0.568cm" svg:y="12.483cm">
          <text:p text:style-name="P1"><text:span text:style-name="T54">Further reading: </text:span><text:span text:style-name="T31">Chapter 5, The EU’s General Data Protection Regulation (GDPR) in a Research Context - Mondschein, C. F. &amp; Monda, C. Springer 2019 </text:span><text:span text:style-name="T32"><text:a xlink:href="https://www.ncbi.nlm.nih.gov/books/NBK543521/" xlink:type="simple">https://www.ncbi.nlm.nih.gov/books/NBK543521/</text:a></text:span></text:p>
          <text:p text:style-name="P1"><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34" draw:style-name="gr44" draw:text-style-name="P45" xml:id="id151" draw:id="id151" draw:layer="layout" svg:width="16.24cm" svg:height="1.816cm" svg:x="4.703cm" svg:y="0.811cm">
          <text:p text:style-name="P17"><text:span text:style-name="T53">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37;p34" draw:style-name="gr5" draw:text-style-name="P15" xml:id="id150" draw:id="id150" draw:layer="layout" svg:width="1.611cm" svg:height="1.171cm" svg:x="2.115cm" svg:y="1.233cm">
          <draw:image xlink:href="Pictures/100000000000020000000174C5E145BF6683B30C.png" xlink:type="simple" xlink:show="embed" xlink:actuate="onLoad">
            <text:p/>
          </draw:image>
        </draw:frame>
        <draw:custom-shape draw:name="Google Shape;738;p34" draw:style-name="gr10" draw:text-style-name="P6" xml:id="id153" draw:id="id153" draw:layer="layout" svg:width="22.499cm" svg:height="4.127cm" svg:x="1.271cm" svg:y="7.755cm">
          <text:p text:style-name="P30"><text:span text:style-name="T16">In addition, there are following derogations in the Norwegian Data protection act: </text:span></text:p>
          <text:list text:style-name="L40">
            <text:list-item>
              <text:p text:style-name="P30"><text:span text:style-name="T16">Right to access</text:span></text:p>
            </text:list-item>
            <text:list-item>
              <text:p text:style-name="P1"><text:span text:style-name="T16">Right to rectification</text:span></text:p>
            </text:list-item>
            <text:list-item>
              <text:p text:style-name="P1"><text:span text:style-name="T16">Right to restrict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seq>
        </anim:par>
        <presentation:notes draw:style-name="dp2">
          <draw:custom-shape draw:name="Google Shape;730;p34: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31;p34:notes" draw:style-name="gr1" draw:layer="layout" svg:width="0.003cm" svg:height="0.003cm" svg:x="0cm" svg:y="1.931cm" draw:page-number="34" presentation:class="page"/>
          <draw:frame draw:name="Google Shape;732;p34:notes" presentation:style-name="pr42" draw:text-style-name="P7" draw:layer="layout" svg:width="15.239cm" svg:height="11.429cm" svg:x="1.905cm" svg:y="12.065cm" presentation:class="notes" presentation:placeholder="true" presentation:user-transformed="true">
            <draw:text-box/>
          </draw:frame>
        </presentation:notes>
      </draw:page>
      <draw:page draw:name="page35" draw:style-name="dp1" draw:master-page-name="OBJECT" presentation:presentation-page-layout-name="AL1T11">
        <draw:custom-shape draw:name="Google Shape;744;p35" draw:style-name="gr10" draw:text-style-name="P6" xml:id="id155" draw:id="id155" draw:layer="layout" svg:width="22.499cm" svg:height="6.331cm" svg:x="0.848cm" svg:y="3.31cm">
          <text:p text:style-name="P49"><text:span text:style-name="T16">Key relevance in scientific research</text:span></text:p>
          <text:p text:style-name="P49"><text:span text:style-name="T16">Countries outside the EU/EEA</text:span></text:p>
          <text:p text:style-name="P49"><text:span text:style-name="T16">Transfer mechanism pursuant to GDPR chapter 5</text:span></text:p>
          <text:p text:style-name="P49"><text:span text:style-name="T16">Previously: <text:s/>Standard Contractual Clauses (SCCs)</text:span></text:p>
          <text:p text:style-name="P49"><text:span text:style-name="T16">Adequacy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35" draw:style-name="gr10" draw:text-style-name="P6" xml:id="id157" draw:id="id157" draw:layer="layout" svg:width="22.499cm" svg:height="1.137cm" svg:x="0.848cm" svg:y="10.065cm">
          <text:p text:style-name="P30"><text:span text:style-name="T16">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35" draw:style-name="gr45" draw:text-style-name="P46" draw:layer="layout" svg:width="13.961cm" svg:height="2.097cm" svg:x="6.846cm" svg:y="0.595cm">
          <text:p text:style-name="P17"><text:span text:style-name="T53">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47;p35" draw:style-name="gr5" draw:text-style-name="P15" draw:layer="layout" svg:width="1.614cm" svg:height="1.614cm" svg:x="4.446cm" svg:y="0.866cm">
          <draw:image xlink:href="Pictures/1000020100000400000004001069E99D172314B3.png" xlink:type="simple" xlink:show="embed" xlink:actuate="onLoad">
            <text:p/>
          </draw:image>
        </draw:frame>
        <draw:custom-shape draw:name="Google Shape;748;p35" draw:style-name="gr6" draw:text-style-name="P6" xml:id="id158" draw:id="id158" draw:layer="layout" svg:width="23.5cm" svg:height="1.621cm" svg:x="0.771cm" svg:y="11.882cm">
          <text:p text:style-name="P1"><text:span text:style-name="T55">Further reading:</text:span><text:span text:style-name="T56"> </text:span></text:p>
          <text:list text:style-name="L42">
            <text:list-item>
              <text:p text:style-name="P1"><text:span text:style-name="T57"><text:a xlink:href="https://eur-lex.europa.eu/legal-content/EN/TXT/HTML/?uri=CELEX:32016R0679&amp;from=EN#d1e4319-1-1" xlink:type="simple">eur-lex.europa.eu/legal-content/EN/TXT/HTML/?uri=CELEX:32016R0679&amp;from=EN#d1e4319-1-1</text:a></text:span></text:p>
            </text:list-item>
            <text:list-item>
              <text:p text:style-name="P1"><text:span text:style-name="T58">ec.europa.eu/info/law/law-topic/data-protection/reform/rules-business-and-organisations/obligations/what-rules-apply-if-my-organisation-transfers-data-outside-eu_en</text:span></text:p>
            </text:list-item>
            <text:list-item>
              <text:p text:style-name="P50"><text:span text:style-name="T58">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35" draw:style-name="gr48" draw:text-style-name="P6" xml:id="id156" draw:id="id156" draw:layer="layout" svg:width="9.26cm" svg:height="6.331cm" svg:x="15.646cm" svg:y="3.147cm">
          <text:p text:style-name="P40"><text:span text:style-name="T59">As of 2023, EU has granted adequacy decisions to:</text:span></text:p>
          <text:p text:style-name="P40"><text:span text:style-name="T59"/></text:p>
          <text:p text:style-name="P40"><text:span text:style-name="T59">Andorra, Argentina,</text:span></text:p>
          <text:p text:style-name="P40"><text:span text:style-name="T59">Canada, Faroe Islands,</text:span></text:p>
          <text:p text:style-name="P40"><text:span text:style-name="T59">Guernsey, Iceland, Isle of</text:span></text:p>
          <text:p text:style-name="P40"><text:span text:style-name="T59">Man, Japan, Jersey,</text:span></text:p>
          <text:p text:style-name="P40"><text:span text:style-name="T59"><text:s/></text:span><text:span text:style-name="T59">New Zealand, </text:span><text:span text:style-name="T11">Norway,</text:span><text:span text:style-name="T59"> Switzerland, Uruguay, and the UK</text:span></text:p>
          <text:p text:style-name="P5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anim:par>
          </anim:seq>
        </anim:par>
        <presentation:notes draw:style-name="dp2">
          <draw:custom-shape draw:name="Google Shape;740;p35: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41;p35:notes" draw:style-name="gr1" draw:layer="layout" svg:width="0.003cm" svg:height="0.003cm" svg:x="0cm" svg:y="1.931cm" draw:page-number="35" presentation:class="page"/>
          <draw:frame draw:name="Google Shape;742;p35:notes" presentation:style-name="pr43" draw:text-style-name="P7" draw:layer="layout" svg:width="15.239cm" svg:height="11.429cm" svg:x="1.905cm" svg:y="12.065cm" presentation:class="notes" presentation:placeholder="true" presentation:user-transformed="true">
            <draw:text-box/>
          </draw:frame>
        </presentation:notes>
      </draw:page>
      <draw:page draw:name="page36" draw:style-name="dp1" draw:master-page-name="OBJECT" presentation:presentation-page-layout-name="AL1T11">
        <draw:custom-shape draw:name="Google Shape;755;g34119d947f7_1_12" draw:style-name="gr10" draw:text-style-name="P6" draw:layer="layout" svg:width="22.499cm" svg:height="1.137cm" svg:x="0.848cm" svg:y="9.43cm">
          <text:p text:style-name="P30"><text:span text:style-name="T16">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g34119d947f7_1_12" draw:style-name="gr45" draw:text-style-name="P46" draw:layer="layout" svg:width="13.961cm" svg:height="1.727cm" svg:x="6.846cm" svg:y="0.595cm">
          <text:p text:style-name="P17"><text:span text:style-name="T53">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57;g34119d947f7_1_12" draw:style-name="gr5" draw:text-style-name="P15" draw:layer="layout" svg:width="1.614cm" svg:height="1.614cm" svg:x="4.446cm" svg:y="0.866cm">
          <draw:image xlink:href="Pictures/1000020100000400000004001069E99D172314B3.png" xlink:type="simple" xlink:show="embed" xlink:actuate="onLoad">
            <text:p/>
          </draw:image>
        </draw:frame>
        <draw:custom-shape draw:name="Google Shape;758;g34119d947f7_1_12" draw:style-name="gr6" draw:text-style-name="P6" draw:layer="layout" svg:width="23.5cm" svg:height="1.804cm" svg:x="0.848cm" svg:y="12.438cm">
          <text:p text:style-name="P1"><text:span text:style-name="T60">Further reading:</text:span><text:span text:style-name="T61"> </text:span></text:p>
          <text:list text:style-name="L44">
            <text:list-item>
              <text:p text:style-name="P1"><text:span text:style-name="T62"><text:a xlink:href="https://eur-lex.europa.eu/legal-content/EN/TXT/HTML/?uri=CELEX:32016R0679&amp;from=EN#d1e4319-1-1" xlink:type="simple">eur-lex.europa.eu/legal-content/EN/TXT/HTML/?uri=CELEX:32016R0679&amp;from=EN#d1e4319-1-1</text:a></text:span></text:p>
            </text:list-item>
            <text:list-item>
              <text:p text:style-name="P1"><text:span text:style-name="T63">ec.europa.eu/info/law/law-topic/data-protection/reform/rules-business-and-organisations/obligations/what-rules-apply-if-my-organisation-transfers-data-outside-eu_en</text:span></text:p>
            </text:list-item>
            <text:list-item>
              <text:p text:style-name="P50"><text:span text:style-name="T63">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g34119d947f7_1_12" draw:style-name="gr10" draw:text-style-name="P6" xml:id="id160" draw:id="id160" draw:layer="layout" svg:width="19.254cm" svg:height="1.817cm" svg:x="3.599cm" svg:y="10.7cm">
          <text:p text:style-name="P30"><text:span text:style-name="T16">Exchange <text:s/>of personal data &amp; biological material (for research) in any direction requires special and careful additional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g34119d947f7_1_12" draw:style-name="gr48" draw:text-style-name="P6" draw:layer="layout" svg:width="7.398cm" svg:height="7.42cm" svg:x="17.507cm" svg:y="3.147cm">
          <text:p text:style-name="P40"><text:span text:style-name="T59">As of 2023, EU has granted adequacy decisions to:</text:span></text:p>
          <text:p text:style-name="P40"><text:span text:style-name="T59"/></text:p>
          <text:p text:style-name="P40"><text:span text:style-name="T59">Andorra, Argentina,</text:span></text:p>
          <text:p text:style-name="P40"><text:span text:style-name="T59">Canada, Faroe Islands,</text:span></text:p>
          <text:p text:style-name="P40"><text:span text:style-name="T59">Guernsey, Iceland, Isle of</text:span></text:p>
          <text:p text:style-name="P40"><text:span text:style-name="T59">Man, Japan, Jersey,</text:span></text:p>
          <text:p text:style-name="P40"><text:span text:style-name="T59"><text:s/></text:span><text:span text:style-name="T59">New Zealand, </text:span><text:span text:style-name="T11">Norway,</text:span><text:span text:style-name="T59"> Switzerland, Uruguay, and the UK</text:span></text:p>
          <text:p text:style-name="P5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1;g34119d947f7_1_12" draw:style-name="gr32" draw:text-style-name="P15" xml:id="id159" draw:id="id159" draw:layer="layout" svg:width="1.532cm" svg:height="1.614cm" svg:x="1.605cm" svg:y="10.963cm">
          <draw:image xlink:href="Pictures/10000201000000A300000448EACA50CF4303650F.png" xlink:type="simple" xlink:show="embed" xlink:actuate="onLoad">
            <text:p/>
          </draw:image>
        </draw:frame>
        <draw:custom-shape draw:name="Google Shape;762;g34119d947f7_1_12" draw:style-name="gr10" draw:text-style-name="P6" draw:layer="layout" svg:width="22.499cm" svg:height="6.331cm" svg:x="0.848cm" svg:y="3.31cm">
          <text:p text:style-name="P49"><text:span text:style-name="T16">Key relevance in scientific research</text:span></text:p>
          <text:p text:style-name="P49"><text:span text:style-name="T16">Countries outside the EU/EEA</text:span></text:p>
          <text:p text:style-name="P49"><text:span text:style-name="T16">Transfer mechanism pursuant to GDPR chapter 5</text:span></text:p>
          <text:p text:style-name="P49"><text:span text:style-name="T16">Previously: <text:s/>Standard Contractual Clauses (SCCs)</text:span></text:p>
          <text:p text:style-name="P49"><text:span text:style-name="T16">Adequacy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smil:begin="0s" smil:fill="hold" presentation:node-type="with-previous"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anim:par>
          </anim:seq>
        </anim:par>
        <presentation:notes draw:style-name="dp2">
          <draw:custom-shape draw:name="Google Shape;751;g34119d947f7_1_12: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52;g34119d947f7_1_12:notes" draw:style-name="gr1" draw:layer="layout" svg:width="0.003cm" svg:height="0.003cm" svg:x="0cm" svg:y="1.931cm" draw:page-number="36" presentation:class="page"/>
          <draw:frame draw:name="Google Shape;753;g34119d947f7_1_12:notes" presentation:style-name="pr44" draw:text-style-name="P7" draw:layer="layout" svg:width="15.239cm" svg:height="11.429cm" svg:x="1.905cm" svg:y="12.065cm" presentation:class="notes" presentation:placeholder="true" presentation:user-transformed="true">
            <draw:text-box/>
          </draw:frame>
        </presentation:notes>
      </draw:page>
      <draw:page draw:name="page37" draw:style-name="dp1" draw:master-page-name="TITLE" presentation:presentation-page-layout-name="AL2T0">
        <draw:custom-shape draw:name="Google Shape;767;p37" draw:style-name="gr49" draw:text-style-name="P6" draw:layer="layout" svg:width="23.254cm" svg:height="10.103cm" svg:x="0.685cm" svg:y="2.889cm">
          <text:p text:style-name="P8"><text:span text:style-name="T64"/></text:p>
          <text:p text:style-name="P8"><text:span text:style-name="T65"/></text:p>
          <text:p text:style-name="P21"><text:span text:style-name="T66">Sikt carries out privacy assessments on behalf of Norwegian universities.</text:span></text:p>
          <text:p text:style-name="P51"><text:span text:style-name="T65">Processing personal data in project → Apply to Sikt</text:span></text:p>
          <text:p text:style-name="P8"><text:span text:style-name="T65"/></text:p>
          <text:p text:style-name="P8"><text:span text:style-name="T67">Minimum 30 days </text:span><text:span text:style-name="T68">before data collection starts</text:span></text:p>
          <text:p text:style-name="P8"><text:span text:style-name="T65"/></text:p>
          <text:p text:style-name="P8"><text:span text:style-name="T65"/></text:p>
          <text:p text:style-name="P50"><text:span text:style-name="T6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37" draw:style-name="gr46" draw:text-style-name="P47" draw:layer="layout" svg:width="15.435cm" svg:height="2.277cm" svg:x="5.313cm" svg:y="1.061cm">
          <text:p text:style-name="P17"><text:span text:style-name="T69">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69;p37" draw:style-name="gr5" draw:text-style-name="P15" draw:layer="layout" svg:width="1.66cm" svg:height="1.66cm" svg:x="2.772cm" svg:y="1.37cm">
          <draw:image xlink:href="Pictures/1000020100000300000003005C10A696FD01655D.png" xlink:type="simple" xlink:show="embed" xlink:actuate="onLoad">
            <text:p/>
          </draw:image>
        </draw:frame>
        <draw:custom-shape draw:name="Google Shape;770;p37" draw:style-name="gr6" draw:text-style-name="P6" draw:layer="layout" svg:width="20.586cm" svg:height="1.284cm" svg:x="1.185cm" svg:y="12.891cm">
          <text:p text:style-name="P1"><text:span text:style-name="T17"><text:a xlink:href="https://sikt.no/en/data-protection-services" xlink:type="simple">https://sikt.no/en/data-protection-servi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1;p37" draw:style-name="gr5" draw:text-style-name="P15" draw:layer="layout" svg:width="10.896cm" svg:height="2.905cm" svg:x="6.323cm" svg:y="9.707cm">
          <draw:image xlink:href="Pictures/10000000000001B3000000747D76F1BD4040118B.png" xlink:type="simple" xlink:show="embed" xlink:actuate="onLoad">
            <text:p/>
          </draw:image>
        </draw:frame>
        <presentation:notes draw:style-name="dp2">
          <draw:page-thumbnail draw:name="Google Shape;764;p37:notes" draw:style-name="gr1" draw:layer="layout" svg:width="16.932cm" svg:height="9.524cm" svg:x="1.059cm" svg:y="1.905cm" draw:page-number="37" presentation:class="page"/>
          <draw:frame draw:name="Google Shape;765;p37:notes" presentation:style-name="pr45" draw:text-style-name="P7" draw:layer="layout" svg:width="15.239cm" svg:height="11.429cm" svg:x="1.905cm" svg:y="12.065cm" presentation:class="notes" presentation:placeholder="true" presentation:user-transformed="true">
            <draw:text-box/>
          </draw:frame>
        </presentation:notes>
      </draw:page>
      <draw:page draw:name="page38" draw:style-name="dp1" draw:master-page-name="TITLE" presentation:presentation-page-layout-name="AL2T0">
        <draw:custom-shape draw:name="Google Shape;776;p38" draw:style-name="gr49" draw:text-style-name="P6" draw:layer="layout" svg:width="23.444cm" svg:height="8.422cm" svg:x="0.685cm" svg:y="3.524cm">
          <text:p text:style-name="P8"><text:span text:style-name="T64"/></text:p>
          <text:p text:style-name="P8"><text:span text:style-name="T65"/></text:p>
          <text:p text:style-name="P21"><text:span text:style-name="T66">Sikt carries out privacy assessments on behalf of Norwegian universities.</text:span></text:p>
          <text:p text:style-name="P51"><text:span text:style-name="T65">Processing personal data in project → Apply to Sikt</text:span></text:p>
          <text:p text:style-name="P8"><text:span text:style-name="T65"/></text:p>
          <text:p text:style-name="P8"><text:span text:style-name="T67">Minimum 30 days </text:span><text:span text:style-name="T68">before data collection starts</text:span></text:p>
          <text:p text:style-name="P8"><text:span text:style-name="T65"/></text:p>
          <text:p text:style-name="P8"><text:span text:style-name="T65"/></text:p>
          <text:p text:style-name="P51"><text:span text:style-name="T70"/></text:p>
          <text:p text:style-name="P51"><text:span text:style-name="T70"/></text:p>
          <text:p text:style-name="P51"><text:span text:style-name="T70">Medical and health</text:span><text:span text:style-name="T71"> </text:span><text:span text:style-name="T70">research</text:span><text:span text:style-name="T71"> projects</text:span><text:span text:style-name="T70"> → Apply in parallel to Sikt+REK</text:span><text:span text:style-name="T71"> (depends on faculty and instit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7;p38" draw:style-name="gr5" draw:text-style-name="P15" draw:layer="layout" svg:width="10.239cm" svg:height="2.188cm" svg:x="11.135cm" svg:y="11.62cm">
          <draw:image xlink:href="Pictures/100002010000021A00000073B3ADA33C6E567737.png" xlink:type="simple" xlink:show="embed" xlink:actuate="onLoad">
            <text:p/>
          </draw:image>
        </draw:frame>
        <draw:custom-shape draw:name="Google Shape;778;p38" draw:style-name="gr46" draw:text-style-name="P47" draw:layer="layout" svg:width="15.435cm" svg:height="2.277cm" svg:x="5.313cm" svg:y="0.85cm">
          <text:p text:style-name="P17"><text:span text:style-name="T69">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79;p38" draw:style-name="gr5" draw:text-style-name="P15" draw:layer="layout" svg:width="1.66cm" svg:height="1.66cm" svg:x="2.772cm" svg:y="1.158cm">
          <draw:image xlink:href="Pictures/1000020100000300000003005C10A696FD01655D.png" xlink:type="simple" xlink:show="embed" xlink:actuate="onLoad">
            <text:p/>
          </draw:image>
        </draw:frame>
        <draw:frame draw:name="Google Shape;780;p38" draw:style-name="gr5" draw:text-style-name="P15" draw:layer="layout" svg:width="6.559cm" svg:height="1.748cm" svg:x="17.23cm" svg:y="8.503cm">
          <draw:image xlink:href="Pictures/10000000000001B3000000747D76F1BD4040118B.png" xlink:type="simple" xlink:show="embed" xlink:actuate="onLoad">
            <text:p/>
          </draw:image>
        </draw:frame>
        <presentation:notes draw:style-name="dp2">
          <draw:page-thumbnail draw:name="Google Shape;773;p38:notes" draw:style-name="gr1" draw:layer="layout" svg:width="16.932cm" svg:height="9.524cm" svg:x="1.059cm" svg:y="1.905cm" draw:page-number="38" presentation:class="page"/>
          <draw:frame draw:name="Google Shape;774;p38:notes" presentation:style-name="pr46" draw:text-style-name="P7" draw:layer="layout" svg:width="15.239cm" svg:height="11.429cm" svg:x="1.905cm" svg:y="12.065cm" presentation:class="notes" presentation:placeholder="true" presentation:user-transformed="true">
            <draw:text-box/>
          </draw:frame>
        </presentation:notes>
      </draw:page>
      <draw:page draw:name="Responsible Authorities " draw:style-name="dp1" draw:master-page-name="OBJECT" presentation:presentation-page-layout-name="AL1T11">
        <draw:frame draw:name="Google Shape;786;p39" presentation:style-name="pr5" draw:text-style-name="P9" draw:layer="layout" svg:width="22.859cm" svg:height="2.383cm" svg:x="1.27cm" svg:y="0.569cm" presentation:class="title" presentation:user-transformed="true">
          <draw:text-box>
            <text:p text:style-name="P8"><text:span text:style-name="T72">Responsible Authorities</text:span><text:span text:style-name="T73"> </text:span></text:p>
          </draw:text-box>
        </draw:frame>
        <draw:frame draw:name="Google Shape;787;p39" draw:style-name="gr5" draw:text-style-name="P15" draw:layer="layout" svg:width="7.469cm" svg:height="1.719cm" svg:x="16.273cm" svg:y="8.546cm">
          <draw:image xlink:href="Pictures/10000201000001230000004369D9F581B7E7DD98.png" xlink:type="simple" xlink:show="embed" xlink:actuate="onLoad">
            <text:p/>
          </draw:image>
        </draw:frame>
        <draw:frame draw:name="Google Shape;788;p39" draw:style-name="gr5" draw:text-style-name="P15" draw:layer="layout" svg:width="12.256cm" svg:height="2.619cm" svg:x="2.249cm" svg:y="8.26cm">
          <draw:image xlink:href="Pictures/100002010000021A00000073B3ADA33C6E567737.png" xlink:type="simple" xlink:show="embed" xlink:actuate="onLoad">
            <text:p/>
          </draw:image>
        </draw:frame>
        <draw:frame draw:name="Google Shape;789;p39" draw:style-name="gr5" draw:text-style-name="P15" draw:layer="layout" svg:width="6.093cm" svg:height="1.507cm" svg:x="16.904cm" svg:y="3.75cm">
          <draw:image xlink:href="Pictures/10000201000000CA000000327771BA3BABF58435.png" xlink:type="simple" xlink:show="embed" xlink:actuate="onLoad">
            <text:p/>
          </draw:image>
        </draw:frame>
        <draw:frame draw:name="Google Shape;790;p39" draw:style-name="gr5" draw:text-style-name="P15" draw:layer="layout" svg:width="5.968cm" svg:height="0.842cm" svg:x="15.448cm" svg:y="6.75cm">
          <draw:image xlink:href="Pictures/100002010000011300000027C9C4B16A08A534FA.png" xlink:type="simple" xlink:show="embed" xlink:actuate="onLoad">
            <text:p/>
          </draw:image>
        </draw:frame>
        <draw:frame draw:name="Google Shape;791;p39" draw:style-name="gr5" draw:text-style-name="P15" draw:layer="layout" svg:width="7.311cm" svg:height="1.507cm" svg:x="16.351cm" svg:y="11.304cm">
          <draw:image xlink:href="Pictures/1000020100000144000000436534AE613C0E33F2.png" xlink:type="simple" xlink:show="embed" xlink:actuate="onLoad">
            <text:p/>
          </draw:image>
        </draw:frame>
        <draw:frame draw:name="Google Shape;792;p39" draw:style-name="gr5" draw:text-style-name="P15" draw:layer="layout" svg:width="9.824cm" svg:height="2.619cm" svg:x="2.67cm" svg:y="3.917cm">
          <draw:image xlink:href="Pictures/10000000000001B3000000747D76F1BD4040118B.png" xlink:type="simple" xlink:show="embed" xlink:actuate="onLoad">
            <text:p/>
          </draw:image>
        </draw:frame>
        <presentation:notes draw:style-name="dp2">
          <draw:custom-shape draw:name="Google Shape;782;p39: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83;p39:notes" draw:style-name="gr1" draw:layer="layout" svg:width="16.932cm" svg:height="9.524cm" svg:x="1.058cm" svg:y="1.931cm" draw:page-number="39" presentation:class="page"/>
          <draw:frame draw:name="Google Shape;784;p39:notes" presentation:style-name="pr47" draw:text-style-name="P7" draw:layer="layout" svg:width="15.239cm" svg:height="11.429cm" svg:x="1.905cm" svg:y="12.065cm" presentation:class="notes" presentation:placeholder="true" presentation:user-transformed="true">
            <draw:text-box/>
          </draw:frame>
        </presentation:notes>
      </draw:page>
      <draw:page draw:name="page40" draw:style-name="dp1" draw:master-page-name="OBJECT" presentation:presentation-page-layout-name="AL1T11">
        <draw:frame draw:name="Google Shape;798;p40" draw:style-name="standard" draw:layer="layout" svg:width="24.419cm" svg:height="10.727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3" table:default-cell-style-name="ce1">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2" table:default-cell-style-name="ce1">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4"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1.svm" xlink:type="simple" xlink:show="embed" xlink:actuate="onLoad"/>
        </draw:frame>
        <draw:custom-shape draw:name="Google Shape;799;p40" draw:style-name="gr50" draw:text-style-name="P22" draw:layer="layout" svg:width="24.9cm" svg:height="8.737cm" svg:x="0.119cm" svg:y="5.55cm">
          <text:p text:style-name="P5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40" draw:style-name="gr47" draw:text-style-name="P48" draw:layer="layout" svg:width="11.594cm" svg:height="1.803cm" svg:x="7.194cm" svg:y="0.78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01;p40" draw:style-name="gr5" draw:text-style-name="P15" draw:layer="layout" svg:width="1.65cm" svg:height="1.65cm" svg:x="4.99cm" svg:y="0.78cm">
          <draw:image xlink:href="Pictures/100002010000040000000400056732C6DA6137D4.png" xlink:type="simple" xlink:show="embed" xlink:actuate="onLoad">
            <text:p/>
          </draw:image>
        </draw:frame>
        <presentation:notes draw:style-name="dp2">
          <draw:custom-shape draw:name="Google Shape;794;p40: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95;p40:notes" draw:style-name="gr1" draw:layer="layout" svg:width="0.003cm" svg:height="0.003cm" svg:x="0cm" svg:y="1.931cm" draw:page-number="40" presentation:class="page"/>
          <draw:frame draw:name="Google Shape;796;p40:notes" presentation:style-name="pr48" draw:text-style-name="P7" draw:layer="layout" svg:width="15.239cm" svg:height="11.429cm" svg:x="1.905cm" svg:y="12.065cm" presentation:class="notes" presentation:placeholder="true" presentation:user-transformed="true">
            <draw:text-box/>
          </draw:frame>
        </presentation:notes>
      </draw:page>
      <draw:page draw:name="page41" draw:style-name="dp1" draw:master-page-name="OBJECT" presentation:presentation-page-layout-name="AL1T11">
        <draw:frame draw:name="Google Shape;807;p41" draw:style-name="standard" draw:layer="layout" svg:width="24.419cm" svg:height="10.727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3" table:default-cell-style-name="ce1">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2" table:default-cell-style-name="ce1">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4"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2.svm" xlink:type="simple" xlink:show="embed" xlink:actuate="onLoad"/>
        </draw:frame>
        <draw:custom-shape draw:name="Google Shape;808;p41" draw:style-name="gr50" draw:text-style-name="P22" draw:layer="layout" svg:width="24.9cm" svg:height="7.537cm" svg:x="0.119cm" svg:y="6.75cm">
          <text:p text:style-name="P5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41" draw:style-name="gr47" draw:text-style-name="P48" draw:layer="layout" svg:width="11.594cm" svg:height="1.803cm" svg:x="7.194cm" svg:y="0.78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03;p41: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04;p41:notes" draw:style-name="gr1" draw:layer="layout" svg:width="0.003cm" svg:height="0.003cm" svg:x="0cm" svg:y="1.931cm" draw:page-number="41" presentation:class="page"/>
          <draw:frame draw:name="Google Shape;805;p41:notes" presentation:style-name="pr49" draw:text-style-name="P7" draw:layer="layout" svg:width="15.239cm" svg:height="11.429cm" svg:x="1.905cm" svg:y="12.065cm" presentation:class="notes" presentation:placeholder="true" presentation:user-transformed="true">
            <draw:text-box/>
          </draw:frame>
        </presentation:notes>
      </draw:page>
      <draw:page draw:name="page42" draw:style-name="dp1" draw:master-page-name="OBJECT" presentation:presentation-page-layout-name="AL1T11">
        <draw:frame draw:name="Google Shape;815;p42" draw:style-name="standard" draw:layer="layout" svg:width="24.419cm" svg:height="10.727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3" table:default-cell-style-name="ce1">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2" table:default-cell-style-name="ce1">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4"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3.svm" xlink:type="simple" xlink:show="embed" xlink:actuate="onLoad"/>
        </draw:frame>
        <draw:custom-shape draw:name="Google Shape;816;p42" draw:style-name="gr50" draw:text-style-name="P22" draw:layer="layout" svg:width="24.9cm" svg:height="6.637cm" svg:x="0.119cm" svg:y="7.65cm">
          <text:p text:style-name="P5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42" draw:style-name="gr47" draw:text-style-name="P48" draw:layer="layout" svg:width="11.594cm" svg:height="1.803cm" svg:x="7.194cm" svg:y="0.569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11;p42: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12;p42:notes" draw:style-name="gr1" draw:layer="layout" svg:width="0.003cm" svg:height="0.003cm" svg:x="0cm" svg:y="1.931cm" draw:page-number="42" presentation:class="page"/>
          <draw:frame draw:name="Google Shape;813;p42:notes" presentation:style-name="pr50" draw:text-style-name="P7" draw:layer="layout" svg:width="15.239cm" svg:height="11.429cm" svg:x="1.905cm" svg:y="12.065cm" presentation:class="notes" presentation:placeholder="true" presentation:user-transformed="true">
            <draw:text-box/>
          </draw:frame>
        </presentation:notes>
      </draw:page>
      <draw:page draw:name="page43" draw:style-name="dp1" draw:master-page-name="OBJECT" presentation:presentation-page-layout-name="AL1T11">
        <draw:frame draw:name="Google Shape;823;p43" draw:style-name="standard" draw:layer="layout" svg:width="24.419cm" svg:height="10.727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3" table:default-cell-style-name="ce1">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2" table:default-cell-style-name="ce1">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4"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4.svm" xlink:type="simple" xlink:show="embed" xlink:actuate="onLoad"/>
        </draw:frame>
        <draw:custom-shape draw:name="Google Shape;824;p43" draw:style-name="gr50" draw:text-style-name="P22" draw:layer="layout" svg:width="24.9cm" svg:height="5.586cm" svg:x="0.119cm" svg:y="8.701cm">
          <text:p text:style-name="P5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43" draw:style-name="gr47" draw:text-style-name="P48" draw:layer="layout" svg:width="11.594cm" svg:height="1.803cm" svg:x="7.194cm" svg:y="0.569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19;p43: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20;p43:notes" draw:style-name="gr1" draw:layer="layout" svg:width="0.003cm" svg:height="0.003cm" svg:x="0cm" svg:y="1.931cm" draw:page-number="43" presentation:class="page"/>
          <draw:frame draw:name="Google Shape;821;p43:notes" presentation:style-name="pr51" draw:text-style-name="P7" draw:layer="layout" svg:width="15.239cm" svg:height="11.429cm" svg:x="1.905cm" svg:y="12.065cm" presentation:class="notes" presentation:placeholder="true" presentation:user-transformed="true">
            <draw:text-box/>
          </draw:frame>
        </presentation:notes>
      </draw:page>
      <draw:page draw:name="page44" draw:style-name="dp1" draw:master-page-name="OBJECT" presentation:presentation-page-layout-name="AL1T11">
        <draw:frame draw:name="Google Shape;831;p44" draw:style-name="standard" draw:layer="layout" svg:width="24.419cm" svg:height="6.609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5.svm" xlink:type="simple" xlink:show="embed" xlink:actuate="onLoad"/>
        </draw:frame>
        <draw:custom-shape draw:name="Google Shape;832;p44" draw:style-name="gr47" draw:text-style-name="P48" draw:layer="layout" svg:width="11.594cm" svg:height="1.803cm" svg:x="7.194cm" svg:y="0.78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27;p44: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28;p44:notes" draw:style-name="gr1" draw:layer="layout" svg:width="0.003cm" svg:height="0.003cm" svg:x="0cm" svg:y="1.931cm" draw:page-number="44" presentation:class="page"/>
          <draw:frame draw:name="Google Shape;829;p44:notes" presentation:style-name="pr52" draw:text-style-name="P7" draw:layer="layout" svg:width="15.239cm" svg:height="11.429cm" svg:x="1.905cm" svg:y="12.065cm" presentation:class="notes" presentation:placeholder="true" presentation:user-transformed="true">
            <draw:text-box/>
          </draw:frame>
        </presentation:notes>
      </draw:page>
      <draw:page draw:name="page45" draw:style-name="dp1" draw:master-page-name="OBJECT" presentation:presentation-page-layout-name="AL1T11">
        <draw:frame draw:name="Google Shape;838;p45" draw:style-name="standard" draw:layer="layout" svg:width="24.419cm" svg:height="9.028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row table:style-name="ro6" table:default-cell-style-name="ce1">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
          <draw:image xlink:href="Pictures/TablePreview6.svm" xlink:type="simple" xlink:show="embed" xlink:actuate="onLoad"/>
        </draw:frame>
        <draw:custom-shape draw:name="Google Shape;839;p45" draw:style-name="gr47" draw:text-style-name="P48" draw:layer="layout" svg:width="11.594cm" svg:height="1.803cm" svg:x="7.194cm" svg:y="0.78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34;p45: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5;p45:notes" draw:style-name="gr1" draw:layer="layout" svg:width="0.003cm" svg:height="0.003cm" svg:x="0cm" svg:y="1.931cm" draw:page-number="45" presentation:class="page"/>
          <draw:frame draw:name="Google Shape;836;p45:notes" presentation:style-name="pr53" draw:text-style-name="P7" draw:layer="layout" svg:width="15.239cm" svg:height="11.429cm" svg:x="1.905cm" svg:y="12.065cm" presentation:class="notes" presentation:placeholder="true" presentation:user-transformed="true">
            <draw:text-box/>
          </draw:frame>
        </presentation:notes>
      </draw:page>
      <draw:page draw:name="page46" draw:style-name="dp1" draw:master-page-name="OBJECT" presentation:presentation-page-layout-name="AL1T11">
        <draw:frame draw:name="Google Shape;845;p46" draw:style-name="standard" draw:layer="layout" svg:width="24.419cm" svg:height="11.127cm" svg:x="0.781cm" svg:y="3.072cm">
          <table:table>
            <table:table-column table:style-name="co1"/>
            <table:table-column table:style-name="co2"/>
            <table:table-column table:style-name="co3"/>
            <table:table-row table:style-name="ro1" table:default-cell-style-name="ce1">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2" table:default-cell-style-name="ce1">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1" table:default-cell-style-name="ce1">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1" table:default-cell-style-name="ce1">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1" table:default-cell-style-name="ce1">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1">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row table:style-name="ro7" table:default-cell-style-name="ce1">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8" table:default-cell-style-name="ce1">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
          <draw:image xlink:href="Pictures/TablePreview7.svm" xlink:type="simple" xlink:show="embed" xlink:actuate="onLoad"/>
        </draw:frame>
        <draw:custom-shape draw:name="Google Shape;846;p46" draw:style-name="gr47" draw:text-style-name="P48" draw:layer="layout" svg:width="11.594cm" svg:height="1.803cm" svg:x="7.194cm" svg:y="0.78cm">
          <text:p text:style-name="P17"><text:span text:style-name="T35">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41;p46: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42;p46:notes" draw:style-name="gr1" draw:layer="layout" svg:width="0.003cm" svg:height="0.003cm" svg:x="0cm" svg:y="1.931cm" draw:page-number="46" presentation:class="page"/>
          <draw:frame draw:name="Google Shape;843;p46:notes" presentation:style-name="pr54" draw:text-style-name="P7" draw:layer="layout" svg:width="15.239cm" svg:height="11.429cm" svg:x="1.905cm" svg:y="12.065cm" presentation:class="notes" presentation:placeholder="true" presentation:user-transformed="true">
            <draw:text-box/>
          </draw:frame>
        </presentation:notes>
      </draw:page>
      <draw:page draw:name="Contact Information" draw:style-name="dp1" draw:master-page-name="OBJECT" presentation:presentation-page-layout-name="AL1T11">
        <draw:frame draw:name="Google Shape;852;g341cbd01346_0_0" presentation:style-name="pr5" draw:text-style-name="P9" draw:layer="layout" svg:width="22.859cm" svg:height="2.152cm" svg:x="1.27cm" svg:y="0.245cm" presentation:class="title" presentation:user-transformed="true">
          <draw:text-box>
            <text:p text:style-name="P8"><text:span text:style-name="T73">Contact Information</text:span></text:p>
          </draw:text-box>
        </draw:frame>
        <draw:custom-shape draw:name="Google Shape;853;g341cbd01346_0_0" draw:style-name="gr51" draw:text-style-name="P6" draw:layer="layout" svg:width="13.486cm" svg:height="11.463cm" svg:x="0.736cm" svg:y="2.094cm">
          <text:p text:style-name="P1"><text:span text:style-name="T43">Data Protection Officers</text:span></text:p>
          <text:p text:style-name="P52"><text:span text:style-name="T42"/></text:p>
          <text:list text:style-name="L51">
            <text:list-item>
              <text:p text:style-name="P52"><text:span text:style-name="T43">UiB</text:span><text:span text:style-name="T42">: Janecke.Veim@uib.no</text:span></text:p>
            </text:list-item>
            <text:list-item>
              <text:p text:style-name="P52"><text:span text:style-name="T43">NTNU</text:span><text:span text:style-name="T42">: thomas.helgesen@ntnu.no</text:span></text:p>
            </text:list-item>
            <text:list-item>
              <text:p text:style-name="P52"><text:span text:style-name="T43">UiT</text:span><text:span text:style-name="T42">: personvernombud@uit.no</text:span></text:p>
            </text:list-item>
            <text:list-item>
              <text:p text:style-name="P52"><text:span text:style-name="T43">NMBU</text:span><text:span text:style-name="T42">: </text:span><text:span text:style-name="T76"><text:a xlink:href="mailto:personvernombud@nmbu.no" xlink:type="simple">personvernombud@nmbu.no</text:a></text:span></text:p>
            </text:list-item>
            <text:list-item>
              <text:p text:style-name="P52"><text:span text:style-name="T43">UiO</text:span><text:span text:style-name="T42">: personvernombudet@uio.no</text:span></text:p>
            </text:list-item>
          </text:list>
          <text:p text:style-name="P1"><text:span text:style-name="T43"/></text:p>
          <text:p text:style-name="P1"><text:span text:style-name="T43"/></text:p>
          <text:p text:style-name="P1"><text:span text:style-name="T43">REK</text:span></text:p>
          <text:p text:style-name="P1"><text:span text:style-name="T42"/></text:p>
          <text:list text:continue-numbering="true" text:style-name="L51">
            <text:list-item>
              <text:p text:style-name="P1"><text:span text:style-name="T42">rek-vest@uib.no</text:span></text:p>
            </text:list-item>
            <text:list-item>
              <text:p text:style-name="P1"><text:span text:style-name="T42">rek-midt@mh.ntnu.no</text:span></text:p>
            </text:list-item>
            <text:list-item>
              <text:p text:style-name="P1"><text:span text:style-name="T42">rek-nord@asp.uit.no</text:span></text:p>
            </text:list-item>
            <text:list-item>
              <text:p text:style-name="P1"><text:span text:style-name="T76"><text:a xlink:href="mailto:rek-sorost@medisin.uio.no" xlink:type="simple">rek-sorost@medisin.uio.no</text:a></text:span></text:p>
            </text:list-item>
          </text:list>
          <text:p text:style-name="P1"><text:span text:style-name="T42"/></text:p>
          <text:p text:style-name="P1"><text:span text:style-name="T43">Sikt</text:span><text:span text:style-name="T42"> - sikt.no</text:span></text:p>
          <text:p text:style-name="P1"><text:span text:style-name="T13"/></text:p>
          <text:p text:style-name="P1"><text:span text:style-name="T13"/></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g341cbd01346_0_0" draw:style-name="gr52" draw:text-style-name="P6" draw:layer="layout" svg:width="5.826cm" svg:height="0.841cm" svg:x="18.886cm" svg:y="8.935cm">
          <text:p text:style-name="P21"><text:span text:style-name="T77"><text:a xlink:href="https://rekportalen.no/#home/REK" xlink:type="simple">rekportalen.no</text:a></text:span></text:p>
          <text:p text:style-name="P21"><text:span text:style-name="T21"/></text:p>
          <text:p text:style-name="P50"><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5;g341cbd01346_0_0" draw:style-name="gr5" draw:text-style-name="P15" draw:layer="layout" svg:width="7.833cm" svg:height="9.894cm" svg:x="10.731cm" svg:y="2.27cm">
          <draw:image xlink:href="Pictures/100002010000022B000002BD0E32064FAEB92C37.png" xlink:type="simple" xlink:show="embed" xlink:actuate="onLoad">
            <text:p/>
          </draw:image>
        </draw:frame>
        <draw:frame draw:name="Google Shape;856;g341cbd01346_0_0" draw:style-name="gr5" draw:text-style-name="P15" draw:layer="layout" svg:width="10.073cm" svg:height="2.152cm" svg:x="14.999cm" svg:y="6.661cm">
          <draw:image xlink:href="Pictures/100002010000021A00000073B3ADA33C6E567737.png" xlink:type="simple" xlink:show="embed" xlink:actuate="onLoad">
            <text:p/>
          </draw:image>
        </draw:frame>
        <presentation:notes draw:style-name="dp2">
          <draw:custom-shape draw:name="Google Shape;848;g341cbd01346_0_0:notes" draw:style-name="gr2" draw:text-style-name="P6"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49;g341cbd01346_0_0:notes" draw:style-name="gr1" draw:layer="layout" svg:width="16.932cm" svg:height="9.524cm" svg:x="1.058cm" svg:y="1.931cm" draw:page-number="47" presentation:class="page"/>
          <draw:frame draw:name="Google Shape;850;g341cbd01346_0_0:notes" presentation:style-name="pr55" draw:text-style-name="P7" draw:layer="layout" svg:width="15.239cm" svg:height="11.429cm" svg:x="1.905cm" svg:y="12.065cm" presentation:class="notes" presentation:placeholder="true" presentation:user-transformed="true">
            <draw:text-box/>
          </draw:frame>
        </presentation:notes>
      </draw:page>
      <draw:page draw:name="page48" draw:style-name="dp1" draw:master-page-name="simple-light-2" presentation:presentation-page-layout-name="AL2T0">
        <draw:frame draw:name="Google Shape;861;g34119d947f7_1_458" draw:style-name="gr53" draw:text-style-name="P15" draw:layer="layout" svg:width="13.715cm" svg:height="11.719cm" svg:x="0.496cm" svg:y="1.148cm">
          <draw:image xlink:href="Pictures/100002010000044F000003A3D50AD686DBC0D52F.png" xlink:type="simple" xlink:show="embed" xlink:actuate="onLoad">
            <text:p/>
          </draw:image>
        </draw:frame>
        <draw:custom-shape draw:name="Google Shape;862;g34119d947f7_1_458" draw:style-name="gr54" draw:text-style-name="P6" draw:layer="layout" svg:width="11.006cm" svg:height="2.852cm" svg:x="14.212cm" svg:y="5.991cm">
          <text:p text:style-name="P53"><text:span text:style-name="T78">Best practices and guidelines to help you </text:span><text:span text:style-name="T78"><text:line-break/></text:span><text:span text:style-name="T78">make your data FAIR (</text:span><text:span text:style-name="T79">F</text:span><text:span text:style-name="T78">indable, </text:span><text:span text:style-name="T79">A</text:span><text:span text:style-name="T78">ccessible, </text:span><text:span text:style-name="T79">I</text:span><text:span text:style-name="T78">nteroperable and </text:span><text:span text:style-name="T79">R</text:span><text:span text:style-name="T78">eus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3;g34119d947f7_1_458" draw:style-name="gr55" draw:text-style-name="P54" draw:layer="layout" svg:width="0.998cm" svg:height="0.998cm" svg:x="16.752cm" svg:y="8.979cm">
          <text:p text:style-name="P17"><text:span text:style-name="T80">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4;g34119d947f7_1_458" draw:style-name="gr55" draw:text-style-name="P54" draw:layer="layout" svg:width="0.998cm" svg:height="0.998cm" svg:x="18.394cm" svg:y="8.979cm">
          <text:p text:style-name="P17"><text:span text:style-name="T80">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5;g34119d947f7_1_458" draw:style-name="gr55" draw:text-style-name="P54" draw:layer="layout" svg:width="0.998cm" svg:height="0.998cm" svg:x="20.036cm" svg:y="8.979cm">
          <text:p text:style-name="P17"><text:span text:style-name="T80">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6;g34119d947f7_1_458" draw:style-name="gr55" draw:text-style-name="P54" draw:layer="layout" svg:width="0.998cm" svg:height="0.998cm" svg:x="21.678cm" svg:y="8.979cm">
          <text:p text:style-name="P17"><text:span text:style-name="T80">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7;g34119d947f7_1_458" draw:style-name="gr56" draw:text-style-name="P6" draw:layer="layout" svg:width="9.042cm" svg:height="1.217cm" svg:x="15.539cm" svg:y="10.637cm">
          <text:p text:style-name="P12"><text:a xlink:href="https://rdmkit.elixir-europe.org/index.html" xlink:type="simple">rdmkit.elixir-europe.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g34119d947f7_1_458" draw:style-name="gr57" draw:text-style-name="P6" draw:layer="layout" svg:width="5.547cm" svg:height="4.057cm" svg:x="16.752cm" svg:y="1.51cm">
          <text:p text:style-name="P12"><text:span text:style-name="T81">R</text:span><text:span text:style-name="T82">esearch</text:span></text:p>
          <text:p text:style-name="P12"><text:span text:style-name="T81">D</text:span><text:span text:style-name="T82">ata</text:span><text:span text:style-name="T81"> </text:span></text:p>
          <text:p text:style-name="P12"><text:span text:style-name="T81">M</text:span><text:span text:style-name="T82">anagement</text:span><text:span text:style-name="T81">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9;g34119d947f7_1_458" draw:style-name="gr58" draw:text-style-name="P6" draw:layer="layout" svg:width="4.441cm" svg:height="2.364cm" svg:x="0.496cm" svg:y="8.154cm">
          <text:p text:style-name="P12"><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8;g34119d947f7_1_458:notes" draw:style-name="gr1" draw:layer="layout" svg:width="16.932cm" svg:height="9.524cm" svg:x="1.059cm" svg:y="1.905cm" draw:page-number="48" presentation:class="page"/>
          <draw:frame draw:name="Google Shape;859;g34119d947f7_1_458:notes" presentation:style-name="pr56" draw:text-style-name="P7" draw:layer="layout" svg:width="15.239cm" svg:height="11.429cm" svg:x="1.905cm" svg:y="12.065cm" presentation:class="notes" presentation:placeholder="true" presentation:user-transformed="true">
            <draw:text-box/>
          </draw:frame>
        </presentation:notes>
      </draw:page>
      <draw:page draw:name="page49" draw:style-name="dp1" draw:master-page-name="TITLE_5f_AND_5f_TWO_5f_COLUMNS" presentation:presentation-page-layout-name="AL3T3">
        <draw:frame draw:name="Google Shape;874;p49" draw:style-name="gr59" draw:text-style-name="P15" draw:layer="layout" svg:width="4.346cm" svg:height="14.021cm" svg:x="4.04cm" svg:y="0cm">
          <draw:image xlink:href="Pictures/100002010000051600000432C5304727C0ECF49D.png" xlink:type="simple" xlink:show="embed" xlink:actuate="onLoad">
            <text:p/>
          </draw:image>
        </draw:frame>
        <draw:frame draw:name="Google Shape;875;p49" draw:style-name="gr60" draw:text-style-name="P15" draw:layer="layout" svg:width="15.154cm" svg:height="10.773cm" svg:x="8.884cm" svg:y="1.956cm">
          <draw:image xlink:href="Pictures/100002010000051600000432C5304727C0ECF49D.png" xlink:type="simple" xlink:show="embed" xlink:actuate="onLoad">
            <text:p/>
          </draw:image>
        </draw:frame>
        <draw:custom-shape draw:name="Google Shape;876;p49" draw:style-name="gr58" draw:text-style-name="P6" draw:layer="layout" svg:width="3.232cm" svg:height="0.562cm" svg:x="4.292cm" svg:y="12.729cm">
          <text:p text:style-name="P12"><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p49" draw:style-name="gr58" draw:text-style-name="P6" draw:layer="layout" svg:width="3.232cm" svg:height="0.405cm" svg:x="4.292cm" svg:y="6.357cm">
          <text:p text:style-name="P12"><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1;p49:notes" draw:style-name="gr1" draw:layer="layout" svg:width="16.932cm" svg:height="9.524cm" svg:x="1.059cm" svg:y="1.905cm" draw:page-number="49" presentation:class="page"/>
          <draw:frame draw:name="Google Shape;872;p49:notes" presentation:style-name="pr57" draw:text-style-name="P7" draw:layer="layout" svg:width="15.239cm" svg:height="11.429cm" svg:x="1.905cm" svg:y="12.065cm" presentation:class="notes" presentation:placeholder="true" presentation:user-transformed="true">
            <draw:text-box/>
          </draw:frame>
        </presentation:notes>
      </draw:page>
      <draw:page draw:name="page50" draw:style-name="dp1" draw:master-page-name="simple-light-2" presentation:presentation-page-layout-name="AL2T0">
        <draw:frame draw:name="Google Shape;882;g34119d947f7_1_559" draw:style-name="gr53" draw:text-style-name="P15" draw:layer="layout" svg:width="13.715cm" svg:height="11.719cm" svg:x="0.496cm" svg:y="1.148cm">
          <draw:image xlink:href="Pictures/100002010000044F000003A3D50AD686DBC0D52F.png" xlink:type="simple" xlink:show="embed" xlink:actuate="onLoad">
            <text:p/>
          </draw:image>
        </draw:frame>
        <draw:custom-shape draw:name="Google Shape;883;g34119d947f7_1_559" draw:style-name="gr54" draw:text-style-name="P6" draw:layer="layout" svg:width="11.006cm" svg:height="2.852cm" svg:x="14.212cm" svg:y="5.991cm">
          <text:p text:style-name="P53"><text:span text:style-name="T78">Best practices and guidelines to help you </text:span><text:span text:style-name="T78"><text:line-break/></text:span><text:span text:style-name="T78">make your data FAIR (</text:span><text:span text:style-name="T79">F</text:span><text:span text:style-name="T78">indable, </text:span><text:span text:style-name="T79">A</text:span><text:span text:style-name="T78">ccessible, </text:span><text:span text:style-name="T79">I</text:span><text:span text:style-name="T78">nteroperable and </text:span><text:span text:style-name="T79">R</text:span><text:span text:style-name="T78">eus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g34119d947f7_1_559" draw:style-name="gr55" draw:text-style-name="P54" draw:layer="layout" svg:width="0.998cm" svg:height="0.998cm" svg:x="16.752cm" svg:y="8.979cm">
          <text:p text:style-name="P17"><text:span text:style-name="T80">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g34119d947f7_1_559" draw:style-name="gr55" draw:text-style-name="P54" draw:layer="layout" svg:width="0.998cm" svg:height="0.998cm" svg:x="18.394cm" svg:y="8.979cm">
          <text:p text:style-name="P17"><text:span text:style-name="T80">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6;g34119d947f7_1_559" draw:style-name="gr55" draw:text-style-name="P54" draw:layer="layout" svg:width="0.998cm" svg:height="0.998cm" svg:x="20.036cm" svg:y="8.979cm">
          <text:p text:style-name="P17"><text:span text:style-name="T80">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7;g34119d947f7_1_559" draw:style-name="gr55" draw:text-style-name="P54" draw:layer="layout" svg:width="0.998cm" svg:height="0.998cm" svg:x="21.678cm" svg:y="8.979cm">
          <text:p text:style-name="P17"><text:span text:style-name="T80">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8;g34119d947f7_1_559" draw:style-name="gr57" draw:text-style-name="P6" draw:layer="layout" svg:width="5.547cm" svg:height="4.057cm" svg:x="16.752cm" svg:y="1.51cm">
          <text:p text:style-name="P12"><text:span text:style-name="T81">R</text:span><text:span text:style-name="T82">esearch</text:span></text:p>
          <text:p text:style-name="P12"><text:span text:style-name="T81">D</text:span><text:span text:style-name="T82">ata</text:span><text:span text:style-name="T81"> </text:span></text:p>
          <text:p text:style-name="P12"><text:span text:style-name="T81">M</text:span><text:span text:style-name="T82">anagement</text:span><text:span text:style-name="T81">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9;g34119d947f7_1_559" draw:style-name="gr58" draw:text-style-name="P6" draw:layer="layout" svg:width="4.441cm" svg:height="2.364cm" svg:x="9.77cm" svg:y="8.154cm">
          <text:p text:style-name="P12"><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0;g34119d947f7_1_559" draw:style-name="gr56" draw:text-style-name="P6" draw:layer="layout" svg:width="17.577cm" svg:height="1.217cm" svg:x="0.927cm" svg:y="12.983cm">
          <text:p text:style-name="P12"><text:span text:style-name="T83"><text:a xlink:href="https://rdmkit.elixir-europe.org/index.html" xlink:type="simple">https://rdmkit.elixir-europe.org</text:a></text:span><text:span text:style-name="T84">/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9;g34119d947f7_1_559:notes" draw:style-name="gr1" draw:layer="layout" svg:width="16.932cm" svg:height="9.524cm" svg:x="1.059cm" svg:y="1.905cm" draw:page-number="50" presentation:class="page"/>
          <draw:frame draw:name="Google Shape;880;g34119d947f7_1_559:notes" presentation:style-name="pr58" draw:text-style-name="P7" draw:layer="layout" svg:width="15.239cm" svg:height="11.429cm" svg:x="1.905cm" svg:y="12.065cm" presentation:class="notes" presentation:placeholder="true" presentation:user-transformed="true">
            <draw:text-box/>
          </draw:frame>
        </presentation:notes>
      </draw:page>
      <draw:page draw:name="page51" draw:style-name="dp1" draw:master-page-name="TITLE_5f_AND_5f_TWO_5f_COLUMNS" presentation:presentation-page-layout-name="AL3T3">
        <draw:custom-shape draw:name="Google Shape;895;p51" draw:style-name="gr61" draw:text-style-name="P6" draw:layer="layout" svg:width="21.09cm" svg:height="2.051cm" svg:x="2.676cm" svg:y="-0.764cm">
          <text:p text:style-name="P12"><text:span text:style-name="T42"><text:line-break/></text:span><text:span text:style-name="T42"><text:line-break/></text:span><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51" draw:style-name="gr56" draw:text-style-name="P6" draw:layer="layout" svg:width="17.577cm" svg:height="1.217cm" svg:x="2.832cm" svg:y="12.771cm">
          <text:p text:style-name="P12"><text:span text:style-name="T85"><text:a xlink:href="https://rdmkit.elixir-europe.org/index.html" xlink:type="simple">https://rdmkit.elixir-europe.org</text:a></text:span><text:span text:style-name="T86">/no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7;p51" draw:style-name="gr62" draw:text-style-name="P6" draw:layer="layout" svg:width="23.667cm" svg:height="1.59cm" svg:x="1.118cm" svg:y="0.429cm">
          <text:p text:style-name="P55"><text:span text:style-name="T87">RDMkit: National resources in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8;p51" draw:style-name="gr5" draw:text-style-name="P15" draw:layer="layout" svg:width="1.611cm" svg:height="1.171cm" svg:x="23.098cm" svg:y="0.638cm">
          <draw:image xlink:href="Pictures/100000000000020000000174C5E145BF6683B30C.png" xlink:type="simple" xlink:show="embed" xlink:actuate="onLoad">
            <text:p/>
          </draw:image>
        </draw:frame>
        <draw:frame draw:name="Google Shape;899;p51" draw:style-name="gr63" draw:text-style-name="P15" draw:layer="layout" svg:width="21.454cm" svg:height="9.326cm" svg:x="1.643cm" svg:y="2.732cm">
          <draw:image xlink:href="Pictures/1000020100000800000002C52A8C77E23918652F.png" xlink:type="simple" xlink:show="embed" xlink:actuate="onLoad">
            <text:p/>
          </draw:image>
        </draw:frame>
        <presentation:notes draw:style-name="dp2">
          <draw:page-thumbnail draw:name="Google Shape;892;p51:notes" draw:style-name="gr1" draw:layer="layout" svg:width="16.932cm" svg:height="9.524cm" svg:x="1.058cm" svg:y="1.905cm" draw:page-number="51" presentation:class="page"/>
          <draw:frame draw:name="Google Shape;893;p51:notes" presentation:style-name="pr59" draw:text-style-name="P7" draw:layer="layout" svg:width="15.239cm" svg:height="11.429cm" svg:x="1.905cm" svg:y="12.065cm" presentation:class="notes" presentation:placeholder="true" presentation:user-transformed="true">
            <draw:text-box/>
          </draw:frame>
        </presentation:notes>
      </draw:page>
      <draw:page draw:name="page52" draw:style-name="dp1" draw:master-page-name="Title_20_slide_20_ELIXIR_5f_1">
        <draw:frame draw:name="Google Shape;905;g387f1b574d3_0_0" presentation:style-name="pr60" draw:text-style-name="P2" draw:layer="layout" svg:width="7.187cm" svg:height="1.762cm" svg:x="16.16cm" svg:y="4.673cm" presentation:class="title" presentation:user-transformed="true">
          <draw:text-box>
            <text:p text:style-name="P56"><text:span text:style-name="T1">Thank you</text:span><text:span text:style-name="T1"><text:line-break/></text:span><text:span text:style-name="T1"/></text:p>
          </draw:text-box>
        </draw:frame>
        <draw:custom-shape draw:name="Google Shape;906;g387f1b574d3_0_0" draw:style-name="gr57" draw:text-style-name="P6" draw:layer="layout" svg:width="5.994cm" svg:height="1.117cm" svg:x="18.37cm" svg:y="11.013cm">
          <text:p text:style-name="P12"><text:span text:style-name="T88">LinkedIn: ELIXIR Norway </text:span><text:span text:style-name="T88"><text:line-break/></text:span><text:span text:style-name="T88">X/Twitter: @elixirnorway</text:span></text:p>
          <text:p text:style-name="P12"><text:span text:style-name="T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7;g387f1b574d3_0_0" presentation:style-name="pr60" draw:text-style-name="P2" draw:layer="layout" svg:width="7.187cm" svg:height="1.762cm" svg:x="15.283cm" svg:y="12.916cm" presentation:class="title" presentation:user-transformed="true">
          <draw:text-box>
            <text:p text:style-name="P56"><text:span text:style-name="T90">support@</text:span></text:p>
          </draw:text-box>
        </draw:frame>
        <draw:custom-shape draw:name="Google Shape;908;g387f1b574d3_0_0" draw:style-name="gr64" draw:text-style-name="P6" draw:layer="layout" svg:width="10.567cm" svg:height="1.938cm" svg:x="14.47cm" svg:y="8.173cm">
          <text:p text:style-name="P57"><text:span text:style-name="T91">Except where otherwise noted, this work is licensed under a</text:span></text:p>
          <text:p text:style-name="P57"><text:span text:style-name="T92"><text:a xlink:href="http://creativecommons.org/licenses/by-nc/4.0/" xlink:type="simple">Creative Commons Attribution 4.0 International License</text:a></text:span></text:p>
          <text:p text:style-name="P57"><text:span text:style-name="T93"><text:a xlink:href="https://creativecommons.org/licenses/by/4.0/" xlink:type="simple">https://creativecommons.org/licenses/by/4.0/</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9;g387f1b574d3_0_0" draw:style-name="gr5" draw:text-style-name="P15" draw:layer="layout" svg:width="2.723cm" svg:height="1.199cm" svg:x="18.626cm" svg:y="6.834cm">
          <draw:image xlink:href="Pictures/10000201000002C4000001389E17077FD2C9D029.png" xlink:type="simple" xlink:show="embed" xlink:actuate="onLoad">
            <text:p/>
          </draw:image>
        </draw:frame>
        <draw:custom-shape draw:name="Google Shape;910;g387f1b574d3_0_0" draw:style-name="gr65" draw:text-style-name="P58" draw:layer="layout" svg:width="0.595cm" svg:height="0.537cm" svg:x="18.873cm" svg:y="13.032cm">
          <text:p text:style-name="P12"><text:span text:style-name="T42"/></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presentation:notes draw:style-name="dp2">
          <draw:page-thumbnail draw:name="Google Shape;901;g387f1b574d3_0_0:notes" draw:style-name="gr1" draw:layer="layout" svg:width="15.239cm" svg:height="8.572cm" svg:x="1.905cm" svg:y="3.175cm" draw:page-number="52" presentation:class="page"/>
          <draw:frame draw:name="Google Shape;902;g387f1b574d3_0_0:notes" presentation:style-name="pr61" draw:text-style-name="P7" draw:layer="layout" svg:width="15.239cm" svg:height="10.001cm" svg:x="1.905cm" svg:y="12.224cm" presentation:class="notes" presentation:placeholder="true" presentation:user-transformed="true">
            <draw:text-box/>
          </draw:frame>
          <draw:frame draw:name="Google Shape;903;g387f1b574d3_0_0:notes" presentation:style-name="pr62" draw:text-style-name="P43" draw:layer="layout" svg:width="8.254cm" svg:height="1.273cm" svg:x="10.791cm" svg:y="24.126cm" presentation:class="page-number" presentation:user-transformed="true">
            <draw:text-box>
              <text:p text:style-name="P42"><text:span text:style-name="T4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Exo 2" svg:font-family="'Exo 2'"/>
    <style:font-face style:name="Open Sans" svg:font-family="'Open Sans'"/>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afafa"/>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20_slide-background" style:display-name="Divider slide-background" style:family="presentation">
      <style:graphic-properties draw:stroke="none" draw:fill="solid" draw:fill-color="#023452"/>
      <style:text-properties style:letter-kerning="true"/>
    </style:style>
    <style:style style:name="Divider_20_slide-backgroundobjects" style:display-name="Divider slide-backgroundobjects" style:family="presentation">
      <style:graphic-properties draw:textarea-horizontal-align="justify" draw:shadow="hidden" draw:shadow-offset-x="0.2cm" draw:shadow-offset-y="0.2cm" draw:shadow-color="#808080"/>
      <style:text-properties style:letter-kerning="true"/>
    </style:style>
    <style:style style:name="Divider_20_slide-notes" style:display-name="Divid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slide-outline1" style:display-name="Divider slide-outline1" style:family="presentation">
      <style:graphic-properties draw:stroke="none" draw:fill="none" draw:auto-grow-height="false" draw:fit-to-size="shrink-to-fit" style:shrink-to-fit="true">
        <text:list-style style:name="Divider_20_slide-outline1" style:display-name="Divid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20_slide-outline2" style:display-name="Divider slide-outline2" style:family="presentation" style:parent-style-name="Divider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3" style:display-name="Divider slide-outline3" style:family="presentation" style:parent-style-name="Divider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4" style:display-name="Divider slide-outline4" style:family="presentation" style:parent-style-name="Divider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5" style:display-name="Divider slide-outline5" style:family="presentation" style:parent-style-name="Divider_20_slide-outline4">
      <style:paragraph-properties fo:margin-top="0.1cm" fo:margin-bottom="0cm"/>
      <style:text-properties fo:font-size="20pt" style:font-size-asian="20pt" style:font-size-complex="20pt"/>
    </style:style>
    <style:style style:name="Divider_20_slide-outline6" style:display-name="Divider slide-outline6" style:family="presentation" style:parent-style-name="Divider_20_slide-outline5">
      <style:paragraph-properties fo:margin-top="0.1cm" fo:margin-bottom="0cm"/>
      <style:text-properties fo:font-size="20pt" style:font-size-asian="20pt" style:font-size-complex="20pt"/>
    </style:style>
    <style:style style:name="Divider_20_slide-outline7" style:display-name="Divider slide-outline7" style:family="presentation" style:parent-style-name="Divider_20_slide-outline6">
      <style:paragraph-properties fo:margin-top="0.1cm" fo:margin-bottom="0cm"/>
      <style:text-properties fo:font-size="20pt" style:font-size-asian="20pt" style:font-size-complex="20pt"/>
    </style:style>
    <style:style style:name="Divider_20_slide-outline8" style:display-name="Divider slide-outline8" style:family="presentation" style:parent-style-name="Divider_20_slide-outline7">
      <style:paragraph-properties fo:margin-top="0.1cm" fo:margin-bottom="0cm"/>
      <style:text-properties fo:font-size="20pt" style:font-size-asian="20pt" style:font-size-complex="20pt"/>
    </style:style>
    <style:style style:name="Divider_20_slide-outline9" style:display-name="Divider slide-outline9" style:family="presentation" style:parent-style-name="Divider_20_slide-outline8">
      <style:paragraph-properties fo:margin-top="0.1cm" fo:margin-bottom="0cm"/>
      <style:text-properties fo:font-size="20pt" style:font-size-asian="20pt" style:font-size-complex="20pt"/>
    </style:style>
    <style:style style:name="Divider_20_slide-subtitle" style:display-name="Divider slide-subtitle" style:family="presentation">
      <style:graphic-properties draw:stroke="none" draw:fill="none" draw:textarea-vertical-align="middle">
        <text:list-style style:name="Divider_20_slide-subtitle" style:display-name="Divid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slide-title" style:display-name="Divider slide-title" style:family="presentation">
      <style:graphic-properties draw:stroke="none" draw:fill="none" draw:textarea-vertical-align="middle">
        <text:list-style style:name="Divider_20_slide-title" style:display-name="Divid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_5f_1-background" style:display-name="Title slide ELIXIR_1-background" style:family="presentation">
      <style:graphic-properties draw:stroke="none" draw:fill="solid" draw:fill-color="#ffffff"/>
      <style:text-properties style:letter-kerning="true"/>
    </style:style>
    <style:style style:name="Title_20_slide_20_ELIXIR_5f_1-backgroundobjects" style:display-name="Title slide ELIXIR_1-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_5f_1-notes" style:display-name="Title slide ELIXI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_5f_1-outline1" style:display-name="Title slide ELIXIR_1-outline1" style:family="presentation">
      <style:graphic-properties draw:stroke="none" draw:fill="none" draw:auto-grow-height="false" draw:fit-to-size="shrink-to-fit" style:shrink-to-fit="true">
        <text:list-style style:name="Title_20_slide_20_ELIXIR_5f_1-outline1" style:display-name="Title slide ELIXI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_5f_1-outline2" style:display-name="Title slide ELIXIR_1-outline2" style:family="presentation" style:parent-style-name="Title_20_slide_20_ELIXI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_5f_1-outline3" style:display-name="Title slide ELIXIR_1-outline3" style:family="presentation" style:parent-style-name="Title_20_slide_20_ELIXI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_5f_1-outline4" style:display-name="Title slide ELIXIR_1-outline4" style:family="presentation" style:parent-style-name="Title_20_slide_20_ELIXI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_5f_1-outline5" style:display-name="Title slide ELIXIR_1-outline5" style:family="presentation" style:parent-style-name="Title_20_slide_20_ELIXIR_5f_1-outline4">
      <style:paragraph-properties fo:margin-top="0.1cm" fo:margin-bottom="0cm"/>
      <style:text-properties fo:font-size="20pt" style:font-size-asian="20pt" style:font-size-complex="20pt"/>
    </style:style>
    <style:style style:name="Title_20_slide_20_ELIXIR_5f_1-outline6" style:display-name="Title slide ELIXIR_1-outline6" style:family="presentation" style:parent-style-name="Title_20_slide_20_ELIXIR_5f_1-outline5">
      <style:paragraph-properties fo:margin-top="0.1cm" fo:margin-bottom="0cm"/>
      <style:text-properties fo:font-size="20pt" style:font-size-asian="20pt" style:font-size-complex="20pt"/>
    </style:style>
    <style:style style:name="Title_20_slide_20_ELIXIR_5f_1-outline7" style:display-name="Title slide ELIXIR_1-outline7" style:family="presentation" style:parent-style-name="Title_20_slide_20_ELIXIR_5f_1-outline6">
      <style:paragraph-properties fo:margin-top="0.1cm" fo:margin-bottom="0cm"/>
      <style:text-properties fo:font-size="20pt" style:font-size-asian="20pt" style:font-size-complex="20pt"/>
    </style:style>
    <style:style style:name="Title_20_slide_20_ELIXIR_5f_1-outline8" style:display-name="Title slide ELIXIR_1-outline8" style:family="presentation" style:parent-style-name="Title_20_slide_20_ELIXIR_5f_1-outline7">
      <style:paragraph-properties fo:margin-top="0.1cm" fo:margin-bottom="0cm"/>
      <style:text-properties fo:font-size="20pt" style:font-size-asian="20pt" style:font-size-complex="20pt"/>
    </style:style>
    <style:style style:name="Title_20_slide_20_ELIXIR_5f_1-outline9" style:display-name="Title slide ELIXIR_1-outline9" style:family="presentation" style:parent-style-name="Title_20_slide_20_ELIXIR_5f_1-outline8">
      <style:paragraph-properties fo:margin-top="0.1cm" fo:margin-bottom="0cm"/>
      <style:text-properties fo:font-size="20pt" style:font-size-asian="20pt" style:font-size-complex="20pt"/>
    </style:style>
    <style:style style:name="Title_20_slide_20_ELIXIR_5f_1-subtitle" style:display-name="Title slide ELIXIR_1-subtitle" style:family="presentation">
      <style:graphic-properties draw:stroke="none" draw:fill="none" draw:textarea-vertical-align="middle">
        <text:list-style style:name="Title_20_slide_20_ELIXIR_5f_1-subtitle" style:display-name="Title slide ELIXI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_5f_1-title" style:display-name="Title slide ELIXIR_1-title" style:family="presentation">
      <style:graphic-properties draw:stroke="none" draw:fill="none" draw:textarea-vertical-align="middle">
        <text:list-style style:name="Title_20_slide_20_ELIXIR_5f_1-title" style:display-name="Title slide ELIXI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afafa"/>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23452"/>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64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68cm" fo:padding-bottom="0.068cm" fo:padding-left="0.136cm" fo:padding-right="0.136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fafafa" draw:textarea-vertical-align="middle" draw:auto-grow-height="false" draw:fit-to-size="false" style:shrink-to-fit="false" fo:min-height="0cm" fo:min-width="0cm" fo:padding-top="0.095cm" fo:padding-bottom="0.095cm" fo:padding-left="0.19cm" fo:padding-right="0.19cm" fo:wrap-option="wrap"/>
    </style:style>
    <style:style style:name="Mgr7"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153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Divider_20_slide-backgroundobjects">
      <style:graphic-properties draw:stroke="none" draw:fill="none" draw:fill-color="#ffffff" draw:auto-grow-height="false" fo:min-height="1.27cm"/>
    </style:style>
    <style:style style:name="Mpr7" style:family="presentation" style:parent-style-name="Divider_20_slide-backgroundobjects">
      <style:graphic-properties draw:stroke="none" draw:fill="none" draw:fill-color="#ffffff" draw:textarea-vertical-align="bottom" draw:auto-grow-height="false" fo:min-height="1.27cm"/>
    </style:style>
    <style:style style:name="Mpr8" style:family="presentation" style:parent-style-name="TITLE-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backgroundobjects">
      <style:graphic-properties draw:stroke="none" draw:fill="none" draw:fill-color="#ffffff" draw:auto-grow-height="false" fo:min-height="1.27cm"/>
    </style:style>
    <style:style style:name="Mpr10" style:family="presentation" style:parent-style-name="TITLE-backgroundobjects">
      <style:graphic-properties draw:stroke="none" draw:fill="none" draw:fill-color="#ffffff" draw:textarea-vertical-align="bottom" draw:auto-grow-height="false" fo:min-height="1.27cm"/>
    </style:style>
    <style:style style:name="Mpr11"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simple-light-2-backgroundobjects">
      <style:graphic-properties draw:stroke="none" draw:fill="none" draw:fill-color="#ffffff" draw:auto-grow-height="false" fo:min-height="1.27cm"/>
    </style:style>
    <style:style style:name="Mpr13" style:family="presentation" style:parent-style-name="simple-light-2-backgroundobjects">
      <style:graphic-properties draw:stroke="none" draw:fill="none" draw:fill-color="#ffffff" draw:textarea-vertical-align="bottom" draw:auto-grow-height="false" fo:min-height="1.27cm"/>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r17" style:family="presentation" style:parent-style-name="Title_20_slide_20_ELIXIR_5f_1-backgroundobjects">
      <style:graphic-properties draw:stroke="none" draw:fill="none" draw:fill-color="#ffffff" draw:auto-grow-height="false" fo:min-height="1.27cm"/>
    </style:style>
    <style:style style:name="Mpr18" style:family="presentation" style:parent-style-name="Title_20_slide_20_ELIXIR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83%"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1pt" style:font-size-asian="14pt" style:font-size-complex="14pt"/>
    </style:style>
    <style:style style:name="MP11" style:family="paragraph">
      <loext:graphic-properties draw:fill="solid" draw:fill-color="#fafafa"/>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3"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3f41" style:text-line-through-style="none" style:text-line-through-type="none" style:text-position="0% 100%" style:font-name="Corbel" fo:font-size="18pt" fo:letter-spacing="normal" fo:font-style="italic" style:text-underline-style="none" fo:font-weight="normal" style:font-name-asian="Corbel" style:font-size-asian="18pt" style:font-style-asian="italic" style:font-weight-asian="normal" style:font-name-complex="Corbel" style:font-size-complex="18pt" style:font-style-complex="italic" style:font-weight-complex="normal"/>
    </style:style>
    <style:style style:name="MT2"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4" style:family="text">
      <style:text-properties fo:font-variant="normal" fo:text-transform="none" fo:color="#023452"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MT5" style:family="text">
      <style:text-properties fo:font-variant="normal" fo:text-transform="none" fo:color="#4d4848"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ELIXIR" style:display-name="Title slide ELIXIR" style:page-layout-name="PM1" draw:style-name="Mdp1">
      <draw:frame draw:name="Google Shape;104;g387f1b574d3_0_229" presentation:style-name="Title_20_slide_20_ELIXIR-outline1" draw:layer="backgroundobjects" svg:width="9.401cm" svg:height="0.749cm" svg:x="14.973cm" svg:y="9.936cm" presentation:class="outline" presentation:placeholder="true" presentation:user-transformed="true">
        <draw:text-box/>
      </draw:frame>
      <draw:frame draw:name="Google Shape;105;g387f1b574d3_0_229" draw:style-name="Mgr3" draw:text-style-name="MP5" draw:layer="backgroundobjects" svg:width="11.94cm" svg:height="14.286cm" svg:x="0cm" svg:y="0cm">
        <draw:image xlink:href="Pictures/1000020100000800000005A87429A934D158A4D1.png" xlink:type="simple" xlink:show="embed" xlink:actuate="onLoad">
          <text:p/>
        </draw:image>
      </draw:frame>
      <draw:custom-shape draw:name="Google Shape;106;g387f1b574d3_0_229" draw:style-name="Mgr4" draw:text-style-name="MP7" draw:layer="backgroundobjects" svg:width="8.13cm" svg:height="0.905cm" svg:x="16.243cm" svg:y="12.994cm">
        <text:p text:style-name="MP6"><text:span text:style-name="MT1">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g387f1b574d3_0_229" presentation:style-name="Title_20_slide_20_ELIXIR-title" draw:layer="backgroundobjects" svg:width="13.661cm" svg:height="4.996cm" svg:x="10.712cm" svg:y="3.369cm" presentation:class="title" presentation:placeholder="true" presentation:user-transformed="true">
        <draw:text-box/>
      </draw:frame>
      <draw:frame draw:name="Google Shape;109;g387f1b574d3_0_229" draw:style-name="Mgr5" draw:text-style-name="MP5" draw:layer="backgroundobjects" svg:width="5.399cm" svg:height="4.096cm" svg:x="1.258cm" svg:y="5.069cm">
        <draw:image xlink:href="Pictures/1000020100000800000006129C498E2C5ABF3C41.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frame draw:name="Google Shape;152;p75" presentation:style-name="OBJECT-title" draw:layer="backgroundobjects" svg:width="22.856cm" svg:height="2.381cm" svg:x="1.27cm" svg:y="0.569cm" presentation:class="title" presentation:placeholder="true" presentation:user-transformed="true">
        <draw:text-box/>
      </draw:frame>
      <draw:frame draw:name="Google Shape;153;p75" presentation:style-name="OBJECT-outline1" draw:layer="backgroundobjects" svg:width="22.856cm" svg:height="8.281cm" svg:x="1.27cm" svg:y="3.344cm" presentation:class="outline" presentation:placeholder="true" presentation:user-transformed="true">
        <draw:text-box/>
      </draw:frame>
      <draw:frame draw:name="Google Shape;154;p75" presentation:style-name="Mpr3" draw:text-style-name="MP8" draw:layer="backgroundobjects" svg:width="5.913cm" svg:height="0.982cm" svg:x="1.27cm" svg:y="13.014cm" presentation:class="date-time" presentation:user-transformed="true">
        <draw:text-box>
          <text:p/>
        </draw:text-box>
      </draw:frame>
      <draw:frame draw:name="Google Shape;155;p75" presentation:style-name="Mpr3" draw:text-style-name="MP8" draw:layer="backgroundobjects" svg:width="8.046cm" svg:height="0.982cm" svg:x="8.685cm" svg:y="13.014cm" presentation:class="footer" presentation:user-transformed="true">
        <draw:text-box>
          <text:p/>
        </draw:text-box>
      </draw:frame>
      <draw:frame draw:name="Google Shape;156;p75" presentation:style-name="Mpr3" draw:text-style-name="MP10" draw:layer="backgroundobjects" svg:width="5.913cm" svg:height="0.982cm" svg:x="18.21cm" svg:y="13.014cm" presentation:class="page-number" presentation:user-transformed="true">
        <draw:text-box>
          <text:p text:style-name="MP9"><text:span text:style-name="MT2"><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ivider_20_slide" style:display-name="Divider slide" style:page-layout-name="PM1" draw:style-name="Mdp3">
      <draw:frame draw:name="Google Shape;111;g387f1b574d3_0_247" draw:style-name="Mgr5" draw:text-style-name="MP5" draw:layer="backgroundobjects" svg:width="11.486cm" svg:height="14.693cm" draw:transform="rotate (1.5707963267949) translate (0cm 10.598cm)">
        <draw:image xlink:href="Pictures/100002010000064100000800ABB327E47C0DA0AA.png" xlink:type="simple" xlink:show="embed" xlink:actuate="onLoad">
          <text:p/>
        </draw:image>
      </draw:frame>
      <draw:custom-shape draw:name="Google Shape;112;g387f1b574d3_0_247" draw:style-name="Mgr6" draw:text-style-name="MP11" draw:layer="backgroundobjects" svg:width="11.414cm" svg:height="4.183cm" svg:x="0cm" svg:y="2.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g387f1b574d3_0_247" draw:style-name="Mgr7" draw:text-style-name="MP7" draw:layer="backgroundobjects" svg:width="8.691cm" svg:height="1.089cm" svg:x="0.768cm" svg:y="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g387f1b574d3_0_247" draw:style-name="Mgr5" draw:text-style-name="MP5" draw:layer="backgroundobjects" svg:width="5.717cm" svg:height="7.45cm" draw:transform="rotate (1.62228353972873) translate (13.057cm 8.287cm)">
        <draw:image xlink:href="Pictures/100002010000042700000569970680E867B6566F.png" xlink:type="simple" xlink:show="embed" xlink:actuate="onLoad">
          <text:p/>
        </draw:image>
      </draw:frame>
      <draw:frame draw:name="Google Shape;115;g387f1b574d3_0_247" draw:style-name="Mgr5" draw:text-style-name="MP5" draw:layer="backgroundobjects" svg:width="5.06cm" svg:height="5.433cm" draw:transform="rotate (-2.82743338823081) translate (20.497cm 6.55cm)">
        <draw:image xlink:href="Pictures/100002010000043C0000048C60519F59D334BE38.png" xlink:type="simple" xlink:show="embed" xlink:actuate="onLoad">
          <text:p/>
        </draw:image>
      </draw:frame>
      <draw:frame presentation:style-name="Divider_20_slide-title" draw:layer="backgroundobjects" svg:width="22.859cm" svg:height="2.385cm" svg:x="1.27cm" svg:y="0.57cm" presentation:class="title" presentation:placeholder="true">
        <draw:text-box/>
      </draw:frame>
      <draw:frame presentation:style-name="Divider_20_slide-outline1" draw:layer="backgroundobjects" svg:width="22.859cm" svg:height="8.286cm" svg:x="1.27cm" svg:y="3.343cm" presentation:class="outline" presentation:placeholder="true">
        <draw:text-box/>
      </draw:frame>
      <presentation:notes style:page-layout-name="PM2">
        <draw:page-thumbnail presentation:style-name="Divider_20_slide-title" draw:layer="backgroundobjects" svg:width="16.931cm" svg:height="9.524cm" svg:x="1.059cm" svg:y="1.93cm" presentation:class="page"/>
        <draw:frame presentation:style-name="Divider_20_slid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2">
      <draw:frame draw:name="Google Shape;158;p76" presentation:style-name="TITLE-title" draw:layer="backgroundobjects" svg:width="19.049cm" svg:height="4.973cm" svg:x="3.175cm" svg:y="2.338cm" presentation:class="title" presentation:placeholder="true" presentation:user-transformed="true">
        <draw:text-box/>
      </draw:frame>
      <draw:frame draw:name="Google Shape;160;p76" presentation:style-name="Mpr8" draw:text-style-name="MP8" draw:layer="backgroundobjects" svg:width="5.913cm" svg:height="0.982cm" svg:x="1.27cm" svg:y="13.014cm" presentation:class="date-time" presentation:user-transformed="true">
        <draw:text-box>
          <text:p/>
        </draw:text-box>
      </draw:frame>
      <draw:frame draw:name="Google Shape;161;p76" presentation:style-name="Mpr8" draw:text-style-name="MP8" draw:layer="backgroundobjects" svg:width="8.046cm" svg:height="0.982cm" svg:x="8.685cm" svg:y="13.014cm" presentation:class="footer" presentation:user-transformed="true">
        <draw:text-box>
          <text:p/>
        </draw:text-box>
      </draw:frame>
      <draw:frame draw:name="Google Shape;162;p76" presentation:style-name="Mpr8" draw:text-style-name="MP10" draw:layer="backgroundobjects" svg:width="5.913cm" svg:height="0.982cm" svg:x="18.21cm" svg:y="13.014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2">
      <draw:frame draw:name="Google Shape;225;g34119d947f7_1_474" presentation:style-name="simple-light-2-title" draw:layer="backgroundobjects" svg:width="23.667cm" svg:height="5.701cm" svg:x="0.866cm" svg:y="2.068cm" presentation:class="title" presentation:placeholder="true" presentation:user-transformed="true">
        <draw:text-box/>
      </draw:frame>
      <draw:frame draw:name="Google Shape;227;g34119d947f7_1_474" presentation:style-name="Mpr11" draw:text-style-name="MP13" draw:layer="backgroundobjects" svg:width="1.523cm" svg:height="1.092cm" svg:x="23.535cm" svg:y="12.953cm" presentation:class="page-number" presentation:user-transformed="true">
        <draw:text-box>
          <text:p text:style-name="MP12"><text:span text:style-name="MT3"><text:page-number>&lt;number&gt;</text:page-number></text:span></text:p>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14;p77" presentation:style-name="TITLE_5f_AND_5f_TWO_5f_COLUMNS-title" draw:layer="backgroundobjects" svg:width="23.667cm" svg:height="1.59cm" svg:x="0.866cm" svg:y="1.236cm" presentation:class="title" presentation:placeholder="true" presentation:user-transformed="true">
        <draw:text-box/>
      </draw:frame>
      <draw:frame draw:name="Google Shape;15;p77" presentation:style-name="TITLE_5f_AND_5f_TWO_5f_COLUMNS-outline1" draw:layer="backgroundobjects" svg:width="11.11cm" svg:height="9.489cm" svg:x="0.866cm" svg:y="3.201cm" presentation:class="outline" presentation:placeholder="true" presentation:user-transformed="true">
        <draw:text-box/>
      </draw:frame>
      <draw:frame draw:name="Google Shape;16;p77" presentation:style-name="TITLE_5f_AND_5f_TWO_5f_COLUMNS-outline1" draw:layer="backgroundobjects" svg:width="11.11cm" svg:height="9.489cm" svg:x="13.423cm" svg:y="3.201cm" presentation:class="outline" presentation:placeholder="true" presentation:user-transformed="true">
        <draw:text-box/>
      </draw:frame>
      <draw:frame draw:name="Google Shape;17;p77" presentation:style-name="Mpr14" draw:text-style-name="MP13" draw:layer="backgroundobjects" svg:width="1.523cm" svg:height="1.092cm" svg:x="23.535cm" svg:y="12.953cm" presentation:class="page-number" presentation:user-transformed="true">
        <draw:text-box>
          <text:p text:style-name="MP12"><text:span text:style-name="MT3"><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slide_20_ELIXIR_5f_1" style:display-name="Title slide ELIXIR_1" style:page-layout-name="PM1" draw:style-name="Mdp2">
      <draw:frame draw:name="Google Shape;19;g387f1b574d3_0_50" draw:style-name="Mgr8" draw:text-style-name="MP5" draw:layer="backgroundobjects" svg:width="25.399cm" svg:height="9.057cm" svg:x="0cm" svg:y="-0.577cm">
        <draw:image xlink:href="Pictures/100002010000080000000480310B4D60D3BBC837.png" xlink:type="simple" xlink:show="embed" xlink:actuate="onLoad">
          <text:p/>
        </draw:image>
      </draw:frame>
      <draw:custom-shape draw:name="Google Shape;20;g387f1b574d3_0_50" draw:style-name="Mgr4" draw:text-style-name="MP7" draw:layer="backgroundobjects" svg:width="8.13cm" svg:height="0.905cm" svg:x="16.742cm" svg:y="12.857cm">
        <text:p text:style-name="MP6"><text:span text:style-name="MT4">elixi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g387f1b574d3_0_50" presentation:style-name="Title_20_slide_20_ELIXIR_5f_1-title" draw:layer="backgroundobjects" svg:width="13.661cm" svg:height="3.817cm" svg:x="11.339cm" svg:y="6.213cm" presentation:class="title" presentation:placeholder="true" presentation:user-transformed="true">
        <draw:text-box/>
      </draw:frame>
      <draw:frame draw:name="Google Shape;22;g387f1b574d3_0_50" draw:style-name="Mgr5" draw:text-style-name="MP5" draw:layer="backgroundobjects" svg:width="5.299cm" svg:height="3.993cm" svg:x="1.642cm" svg:y="9.313cm">
        <draw:image xlink:href="Pictures/10000201000009C40000075B0A51E3C3CD88BC07.png" xlink:type="simple" xlink:show="embed" xlink:actuate="onLoad">
          <text:p/>
        </draw:image>
      </draw:frame>
      <draw:custom-shape draw:name="Google Shape;23;g387f1b574d3_0_50" draw:style-name="Mgr4" draw:text-style-name="MP7" draw:layer="backgroundobjects" svg:width="7.809cm" svg:height="0.905cm" svg:x="17.191cm" svg:y="10.166cm">
        <text:p text:style-name="MP6"><text:span text:style-name="MT5">Follow us on social m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_20_ELIXIR_5f_1-title" draw:layer="backgroundobjects" svg:width="16.931cm" svg:height="9.524cm" svg:x="1.059cm" svg:y="1.93cm" presentation:class="page"/>
        <draw:frame presentation:style-name="Title_20_slide_20_ELIXIR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86"/>
    <meta:generator>LibreOfficeDev/6.0.5.2$Linux_X86_64 LibreOffice_project/</meta:generator>
  </office:meta>
</office:document-meta>
</file>