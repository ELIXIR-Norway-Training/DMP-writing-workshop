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1E00000067519981A9C4292562.png" manifest:media-type="image/png"/>
  <manifest:file-entry manifest:full-path="Pictures/100002010000038400000233509A5FD84F6B0834.png" manifest:media-type="image/png"/>
  <manifest:file-entry manifest:full-path="Pictures/10000201000004860000042A3A2BD5FC10F1B2C2.png" manifest:media-type="image/png"/>
  <manifest:file-entry manifest:full-path="Pictures/100002010000022F00000319CE4016C673E7585A.png" manifest:media-type="image/png"/>
  <manifest:file-entry manifest:full-path="Pictures/1000020100000535000003AC917C3A2178C49C0B.png" manifest:media-type="image/png"/>
  <manifest:file-entry manifest:full-path="Pictures/10000201000005D100000643D1C73E1E3C19B05D.png" manifest:media-type="image/png"/>
  <manifest:file-entry manifest:full-path="Pictures/10000201000008000000029800A017C30FD5D3E2.png" manifest:media-type="image/png"/>
  <manifest:file-entry manifest:full-path="Pictures/10000201000003D90000012D8232E339FEA4BE04.png" manifest:media-type="image/png"/>
  <manifest:file-entry manifest:full-path="Pictures/1000020100000800000005A87429A934D158A4D1.png" manifest:media-type="image/png"/>
  <manifest:file-entry manifest:full-path="Pictures/100002010000010F000000B60939EE7473DC96AC.png" manifest:media-type="image/png"/>
  <manifest:file-entry manifest:full-path="Pictures/10000201000002590000035130EB28235CFCBEB5.png" manifest:media-type="image/png"/>
  <manifest:file-entry manifest:full-path="Pictures/1000020100000800000006129C498E2C5ABF3C41.png" manifest:media-type="image/png"/>
  <manifest:file-entry manifest:full-path="Pictures/10000201000003E800000190282504CE7808A1CF.png" manifest:media-type="image/png"/>
  <manifest:file-entry manifest:full-path="Pictures/100002010000024A0000033EBD0E4519AC7C845B.png" manifest:media-type="image/png"/>
  <manifest:file-entry manifest:full-path="Pictures/10000201000001920000006659D040AACCB7BCC5.png" manifest:media-type="image/png"/>
  <manifest:file-entry manifest:full-path="Pictures/10000201000000640000006D4F43EAC208643CD3.png" manifest:media-type="image/png"/>
  <manifest:file-entry manifest:full-path="Pictures/100002010000007200000027FA84B0254A923D8A.png" manifest:media-type="image/png"/>
  <manifest:file-entry manifest:full-path="Pictures/100002010000012C000000D0A5176DFA0FC2DED0.png" manifest:media-type="image/png"/>
  <manifest:file-entry manifest:full-path="Pictures/10000201000000B1000000D66713A2414261FC79.png" manifest:media-type="image/png"/>
  <manifest:file-entry manifest:full-path="Pictures/1000020100000384000001D3AABFC367368E9B98.png" manifest:media-type="image/png"/>
  <manifest:file-entry manifest:full-path="Pictures/10000201000002D10000021D5E407EA801F3AABC.png" manifest:media-type="image/png"/>
  <manifest:file-entry manifest:full-path="Pictures/10000201000004B0000004B0F8DB1F3763AE048A.png" manifest:media-type="image/png"/>
  <manifest:file-entry manifest:full-path="Pictures/100002010000010E000000A980C1533D2BEB681C.png" manifest:media-type="image/png"/>
  <manifest:file-entry manifest:full-path="Pictures/10000201000002EE00000132BB556BE18EA9050C.png" manifest:media-type="image/png"/>
  <manifest:file-entry manifest:full-path="Pictures/10000201000001C200000064DC82F9BC06ACC6B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rbel" svg:font-family="Corbel"/>
    <style:font-face style:name="Exo 2" svg:font-family="'Exo 2'"/>
    <style:font-face style:name="Georgia" svg:font-family="Georgi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solid" draw:fill-color="#9e51ad"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a484b"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4176a5"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32b89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8aba56"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67028"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ac54b"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9cm" fo:padding-bottom="0.19cm" fo:padding-left="0.19cm" fo:padding-right="0.19cm" fo:wrap-option="wrap"/>
    </style:style>
    <style:style style:name="gr12" style:family="graphic" style:parent-style-name="standard">
      <style:graphic-properties draw:stroke="solid" svg:stroke-width="0.423cm" svg:stroke-color="#9e51a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423cm" svg:stroke-color="#fa484b"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423cm" svg:stroke-color="#f6702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423cm" svg:stroke-color="#b7b7b7"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423cm" svg:stroke-color="#eeeeee"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ffffff" draw:opacity="81%"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00a933"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21"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24" style:family="graphic" style:parent-style-name="standard">
      <style:graphic-properties draw:stroke="solid" svg:stroke-width="0.053cm" svg:stroke-color="#000000"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none" draw:textarea-vertical-align="middle" draw:auto-grow-height="false" draw:fit-to-size="shrink-to-fit" style:shrink-to-fit="true" fo:min-height="0cm" fo:min-width="0cm" fo:padding-top="0cm" fo:padding-bottom="0cm" fo:padding-left="0cm" fo:padding-right="0cm" fo:wrap-option="wrap"/>
    </style:style>
    <style:style style:name="gr2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2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4d4948"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f47d20" draw:opacity="46%"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005472" draw:opacity="34%"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3cm" fo:padding-bottom="0.23cm" fo:padding-left="0.23cm" fo:padding-right="0.23cm" fo:wrap-option="wrap"/>
    </style:style>
    <style:style style:name="gr37" style:family="graphic" style:parent-style-name="standard">
      <style:graphic-properties draw:stroke="solid" svg:stroke-width="0.212cm" svg:stroke-color="#4d494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40" style:family="graphic" style:parent-style-name="standard">
      <style:graphic-properties draw:stroke="none" svg:stroke-width="0cm" draw:fill="solid" draw:fill-color="#172b4b" draw:textarea-vertical-align="middle"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none" svg:stroke-width="0cm" draw:fill="solid" draw:fill-color="#c23669" draw:textarea-vertical-align="middle" draw:auto-grow-height="false" draw:fit-to-size="false" style:shrink-to-fit="false" fo:min-height="0cm" fo:min-width="0cm" fo:padding-top="0.127cm" fo:padding-bottom="0.127cm" fo:padding-left="0.254cm" fo:padding-right="0.254cm" fo:wrap-option="wrap"/>
    </style:style>
    <style:style style:name="gr42" style:family="graphic" style:parent-style-name="standard">
      <style:graphic-properties draw:stroke="solid" svg:stroke-width="0.106cm" svg:stroke-color="#c236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44" style:family="graphic" style:parent-style-name="standard">
      <style:graphic-properties draw:stroke="none" svg:stroke-width="0cm" draw:fill="none" draw:textarea-vertical-align="bottom" draw:auto-grow-height="false" draw:fit-to-size="shrink-to-fit" style:shrink-to-fit="true" fo:min-height="0cm" fo:min-width="0cm" fo:padding-top="0.254cm" fo:padding-bottom="0.254cm" fo:padding-left="0.254cm" fo:padding-right="0.254cm" fo:wrap-option="wrap"/>
    </style:style>
    <style:style style:name="gr4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0.689cm, 3.834cm)" draw:image-opacity="100%" style:mirror="none"/>
    </style:style>
    <style:style style:name="gr4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73cm, 1.444cm, 0cm)" draw:image-opacity="100%" style:mirror="none"/>
    </style:style>
    <style:style style:name="gr4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626cm, 0cm, 7.191cm, 3.804cm)" draw:image-opacity="100%" style:mirror="none"/>
    </style:style>
    <style:style style:name="gr4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166cm, 3.862cm, 3.551cm, 3.757cm)" draw:image-opacity="100%" style:mirror="none"/>
    </style:style>
    <style:style style:name="gr4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2cm, 0cm, 0cm, 3.8cm)" draw:image-opacity="100%" style:mirror="none"/>
    </style:style>
    <style:style style:name="pr1" style:family="presentation" style:parent-style-name="Title_20_slide_20_ELIXIR-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 style:family="presentation" style:parent-style-name="Title_20_slide_20_ELIXIR-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3" style:family="presentation" style:parent-style-name="Title_20_slide_20_ELIXIR-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4" style:family="presentation" style:parent-style-name="Title_20_slide_20_ELIXIR-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12"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13"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imple-light-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BJECT-title">
      <style:graphic-properties draw:stroke="none" svg:stroke-width="0cm" draw:fill="none" draw:textarea-vertical-align="middle" draw:auto-grow-height="false" draw:fit-to-size="shrink-to-fit" style:shrink-to-fit="true" fo:min-height="2.386cm" fo:padding-top="0cm" fo:padding-bottom="0cm" fo:padding-left="0cm" fo:padding-right="0cm" fo:wrap-option="wrap"/>
    </style:style>
    <style:style style:name="pr28"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OBJECT-title" style:list-style-name="L16">
      <style:graphic-properties draw:stroke="none" svg:stroke-width="0cm" draw:fill="none" draw:textarea-vertical-align="middle" draw:auto-grow-height="false" draw:fit-to-size="shrink-to-fit" style:shrink-to-fit="true" fo:min-height="2.386cm" fo:padding-top="0cm" fo:padding-bottom="0cm" fo:padding-left="0cm" fo:padding-right="0cm" fo:wrap-option="wrap"/>
    </style:style>
    <style:style style:name="pr30" style:family="presentation" style:parent-style-name="OBJECT-outline1" style:list-style-name="L17">
      <style:graphic-properties draw:stroke="none" svg:stroke-width="0cm" draw:fill="none" draw:textarea-vertical-align="top" draw:auto-grow-height="false" draw:fit-to-size="shrink-to-fit" style:shrink-to-fit="true" fo:min-height="8.036cm" fo:padding-top="0cm" fo:padding-bottom="0cm" fo:padding-left="0cm" fo:padding-right="0cm" fo:wrap-option="wrap"/>
    </style:style>
    <style:style style:name="pr31" style:family="presentation" style:parent-style-name="OBJEC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Defaul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Default_20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Default_20_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Default_20_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Default_20_2-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Default_20_2-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1" style:family="paragraph">
      <style:paragraph-properties fo:margin-left="0cm" fo:margin-right="0cm" fo:margin-top="0.141cm" fo:margin-bottom="0cm" fo:line-height="100%" fo:text-align="end"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cm" fo:margin-right="0cm" fo:margin-top="0.106cm" fo:margin-bottom="0cm" fo:line-height="100%" fo:text-align="end"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3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solid" draw:fill-color="#9e51ad"/>
      <style:paragraph-properties fo:text-align="start" style:font-independent-line-spacing="true"/>
      <style:text-properties fo:font-size="14pt"/>
    </style:style>
    <style:style style:name="P12" style:family="paragraph">
      <loext:graphic-properties draw:fill="solid" draw:fill-color="#fa484b"/>
      <style:paragraph-properties fo:text-align="start" style:font-independent-line-spacing="true"/>
      <style:text-properties fo:font-size="14pt"/>
    </style:style>
    <style:style style:name="P13" style:family="paragraph">
      <loext:graphic-properties draw:fill="solid" draw:fill-color="#4176a5"/>
      <style:paragraph-properties fo:text-align="start" style:font-independent-line-spacing="true"/>
      <style:text-properties fo:font-size="14pt"/>
    </style:style>
    <style:style style:name="P14" style:family="paragraph">
      <loext:graphic-properties draw:fill="solid" draw:fill-color="#32b890"/>
      <style:paragraph-properties fo:text-align="start" style:font-independent-line-spacing="true"/>
      <style:text-properties fo:font-size="14pt"/>
    </style:style>
    <style:style style:name="P15" style:family="paragraph">
      <loext:graphic-properties draw:fill="solid" draw:fill-color="#8aba56"/>
      <style:paragraph-properties fo:text-align="start" style:font-independent-line-spacing="true"/>
      <style:text-properties fo:font-size="14pt"/>
    </style:style>
    <style:style style:name="P16" style:family="paragraph">
      <loext:graphic-properties draw:fill="solid" draw:fill-color="#f67028"/>
      <style:paragraph-properties fo:text-align="start" style:font-independent-line-spacing="true"/>
      <style:text-properties fo:font-size="14pt"/>
    </style:style>
    <style:style style:name="P17" style:family="paragraph">
      <loext:graphic-properties draw:fill="solid" draw:fill-color="#fac54b"/>
      <style:paragraph-properties fo:text-align="start" style:font-independent-line-spacing="true"/>
      <style:text-properties fo:font-size="14pt"/>
    </style:style>
    <style:style style:name="P18" style:family="paragraph">
      <loext:graphic-properties draw:fill="solid" draw:fill-color="#ffffff" draw:opacity="81%"/>
      <style:paragraph-properties fo:text-align="start" style:font-independent-line-spacing="true"/>
      <style:text-properties fo:font-size="14pt"/>
    </style:style>
    <style:style style:name="P19" style:family="paragraph">
      <loext:graphic-properties draw:fill="solid" draw:fill-color="#00a933"/>
      <style:paragraph-properties fo:text-align="start" style:font-independent-line-spacing="true"/>
      <style:text-properties fo:font-size="14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loext:graphic-properties draw:fill="none" draw:fill-color="#ffffff"/>
      <style:paragraph-properties fo:text-align="start" style:font-independent-line-spacing="true"/>
      <style:text-properties fo:font-size="11pt"/>
    </style:style>
    <style:style style:name="P22"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3" style:family="paragraph">
      <loext:graphic-properties draw:fill="solid" draw:fill-color="#4d4948"/>
      <style:paragraph-properties fo:text-align="start" style:font-independent-line-spacing="true"/>
      <style:text-properties fo:font-size="14pt"/>
    </style:style>
    <style:style style:name="P24" style:family="paragraph">
      <loext:graphic-properties draw:fill="solid" draw:fill-color="#f47d20" draw:opacity="46%"/>
      <style:paragraph-properties fo:text-align="start" style:font-independent-line-spacing="true"/>
      <style:text-properties fo:font-size="14pt"/>
    </style:style>
    <style:style style:name="P25" style:family="paragraph">
      <loext:graphic-properties draw:fill="solid" draw:fill-color="#005472" draw:opacity="34%"/>
      <style:paragraph-properties fo:text-align="start" style:font-independent-line-spacing="true"/>
      <style:text-properties fo:font-size="14pt"/>
    </style:style>
    <style:style style:name="P26" style:family="paragraph">
      <loext:graphic-properties draw:fill="solid" draw:fill-color="#ffffff"/>
      <style:paragraph-properties fo:text-align="start" style:font-independent-line-spacing="true"/>
      <style:text-properties fo:font-size="14pt"/>
    </style:style>
    <style:style style:name="P27" style:family="paragraph">
      <loext:graphic-properties draw:fill="gradient" draw:fill-gradient-name="Gradient_20_2"/>
      <style:paragraph-properties fo:text-align="start" style:font-independent-line-spacing="true"/>
      <style:text-properties fo:font-size="14pt"/>
    </style:style>
    <style:style style:name="P28" style:family="paragraph">
      <loext:graphic-properties draw:fill="gradient" draw:fill-gradient-name="Gradient_20_3"/>
      <style:paragraph-properties fo:text-align="start" style:font-independent-line-spacing="true"/>
      <style:text-properties fo:font-size="14pt"/>
    </style:style>
    <style:style style:name="P29" style:family="paragraph">
      <loext:graphic-properties draw:fill="gradient" draw:fill-gradient-name="Gradient_20_4"/>
      <style:paragraph-properties fo:text-align="start" style:font-independent-line-spacing="true"/>
      <style:text-properties fo:font-size="14pt"/>
    </style:style>
    <style:style style:name="P30"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31" style:family="paragraph">
      <style:paragraph-properties fo:margin-left="1.27cm" fo:margin-right="0cm" fo:margin-top="0.494cm" fo:margin-bottom="0cm" fo:line-height="115%" fo:text-align="start" fo:text-indent="0cm" style:writing-mode="lr-tb">
        <style:tab-stops>
          <style:tab-stop style:position="0cm"/>
        </style:tab-stops>
      </style:paragraph-properties>
    </style:style>
    <style:style style:name="P32" style:family="paragraph">
      <style:paragraph-properties fo:margin-left="0cm" fo:margin-right="0cm" fo:margin-top="0.494cm" fo:margin-bottom="0.141cm" fo:line-height="115%" fo:text-align="start"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34"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3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36" style:family="paragraph">
      <loext:graphic-properties draw:fill="none"/>
      <style:paragraph-properties fo:text-align="start" style:font-independent-line-spacing="true"/>
      <style:text-properties fo:font-size="11pt"/>
    </style:style>
    <style:style style:name="P37"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8"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3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loext:graphic-properties draw:fill="none"/>
      <style:paragraph-properties fo:margin-left="1.27cm" fo:margin-right="0cm" fo:margin-top="0cm" fo:margin-bottom="0cm" fo:line-height="115%" fo:text-align="start" fo:text-indent="-0.634cm" style:writing-mode="lr-tb" style:font-independent-line-spacing="true">
        <style:tab-stops>
          <style:tab-stop style:position="0cm"/>
        </style:tab-stops>
      </style:paragraph-properties>
      <style:text-properties fo:font-variant="normal" fo:text-transform="none" fo:color="#59595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loext:graphic-properties draw:fill="solid" draw:fill-color="#172b4b"/>
      <style:paragraph-properties fo:text-align="start" style:font-independent-line-spacing="true"/>
      <style:text-properties fo:font-size="14pt"/>
    </style:style>
    <style:style style:name="P42" style:family="paragraph">
      <loext:graphic-properties draw:fill="solid" draw:fill-color="#c23669"/>
      <style:paragraph-properties fo:text-align="start" style:font-independent-line-spacing="true"/>
      <style:text-properties fo:font-size="14pt"/>
    </style:style>
    <style:style style:name="P4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Open Sans" fo:font-size="34pt" fo:letter-spacing="normal" fo:font-style="normal" style:text-underline-style="none" fo:font-weight="bold" style:font-name-asian="Open Sans" style:font-size-asian="34pt" style:font-style-asian="normal" style:font-weight-asian="bold" style:font-name-complex="Open Sans" style:font-size-complex="34pt" style:font-style-complex="normal" style:font-weight-complex="bold"/>
    </style:style>
    <style:style style:name="T3" style:family="text">
      <style:text-properties fo:font-variant="normal" fo:text-transform="none" fo:color="#4d4848"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rbel" fo:font-size="7pt" fo:letter-spacing="normal" fo:font-style="normal" style:text-underline-style="none" fo:font-weight="normal" style:font-name-asian="Corbel" style:font-size-asian="7pt" style:font-style-asian="normal" style:font-weight-asian="normal" style:font-name-complex="Corbel" style:font-size-complex="7pt" style:font-style-complex="normal" style:font-weight-complex="normal"/>
    </style:style>
    <style:style style:name="T5" style:family="text">
      <style:text-properties fo:font-variant="normal" fo:text-transform="none" fo:color="#3399ff" style:text-line-through-style="none" style:text-line-through-type="none" style:text-position="0% 100%" style:font-name="Corbel" fo:font-size="7pt" fo:letter-spacing="normal" fo:font-style="normal" style:text-underline-style="solid" style:text-underline-width="auto" style:text-underline-color="font-color" fo:font-weight="normal" style:font-name-asian="Corbel" style:font-size-asian="7pt" style:font-style-asian="normal" style:font-weight-asian="normal" style:font-name-complex="Corbel" style:font-size-complex="7pt" style:font-style-complex="normal" style:font-weight-complex="normal"/>
    </style:style>
    <style:style style:name="T6" style:family="text">
      <style:text-properties fo:font-variant="normal" fo:text-transform="none" fo:color="#595959" style:text-line-through-style="none" style:text-line-through-type="none" style:text-position="0% 100%" style:font-name="Corbel" fo:font-size="28pt" fo:letter-spacing="normal" fo:font-style="normal" style:text-underline-style="none" fo:font-weight="bold" style:font-name-asian="Corbel" style:font-size-asian="28pt" style:font-style-asian="normal" style:font-weight-asian="bold" style:font-name-complex="Corbel" style:font-size-complex="28pt" style:font-style-complex="normal" style:font-weight-complex="bold"/>
    </style:style>
    <style:style style:name="T7" style:family="text">
      <style:text-properties fo:font-variant="normal" fo:text-transform="none" fo:color="#595959" style:text-line-through-style="none" style:text-line-through-type="none" style:text-position="0% 100%" style:font-name="Corbel" fo:font-size="8pt" fo:letter-spacing="normal" fo:font-style="normal" style:text-underline-style="none" fo:font-weight="normal" style:font-name-asian="Corbel" style:font-size-asian="8pt" style:font-style-asian="normal" style:font-weight-asian="normal" style:font-name-complex="Corbel" style:font-size-complex="8pt" style:font-style-complex="normal" style:font-weight-complex="normal"/>
    </style:style>
    <style:style style:name="T8" style:family="text">
      <style:text-properties fo:font-variant="normal" fo:text-transform="none" fo:color="#0097a7" style:text-line-through-style="none" style:text-line-through-type="none" style:text-position="0% 100%" style:font-name="Corbel" fo:font-size="8pt" fo:letter-spacing="normal" fo:font-style="normal" style:text-underline-style="solid" style:text-underline-width="auto" style:text-underline-color="font-color" fo:font-weight="normal" style:font-name-asian="Corbel" style:font-size-asian="8pt" style:font-style-asian="normal" style:font-weight-asian="normal" style:font-name-complex="Corbel" style:font-size-complex="8pt" style:font-style-complex="normal" style:font-weight-complex="normal"/>
    </style:style>
    <style:style style:name="T9" style:family="text">
      <style:text-properties fo:font-variant="normal" fo:text-transform="none" fo:color="#fa484b"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0" style:family="text">
      <style:text-properties fo:font-variant="normal" fo:text-transform="none" fo:color="#f67028"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1" style:family="text">
      <style:text-properties fo:font-variant="normal" fo:text-transform="none" fo:color="#9e51ad"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2" style:family="text">
      <style:text-properties fo:font-variant="normal" fo:text-transform="none" fo:color="#666666"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3" style:family="text">
      <style:text-properties fo:font-variant="normal" fo:text-transform="none" fo:color="#eeeeee"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4" style:family="text">
      <style:text-properties fo:font-variant="normal" fo:text-transform="none" fo:color="#434343" style:text-line-through-style="none" style:text-line-through-type="none" style:text-position="0% 100%" style:font-name="Corbel" fo:font-size="21pt" fo:letter-spacing="normal" fo:font-style="normal" style:text-underline-style="none" fo:font-weight="bold" style:font-name-asian="Corbel" style:font-size-asian="21pt" style:font-style-asian="normal" style:font-weight-asian="bold" style:font-name-complex="Corbel" style:font-size-complex="21pt" style:font-style-complex="normal" style:font-weight-complex="bold"/>
    </style:style>
    <style:style style:name="T15" style:family="text">
      <style:text-properties fo:font-variant="normal" fo:text-transform="none" fo:color="#434343"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Corbel" fo:font-size="13pt" fo:letter-spacing="normal" fo:font-style="normal" style:text-underline-style="none" fo:font-weight="normal" style:font-name-asian="Corbel" style:font-size-asian="13pt" style:font-style-asian="normal" style:font-weight-asian="normal" style:font-name-complex="Corbel" style:font-size-complex="13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Corbel" fo:font-size="12pt" fo:letter-spacing="normal" fo:font-style="italic" style:text-underline-style="none" fo:font-weight="normal" style:font-name-asian="Corbel" style:font-size-asian="12pt" style:font-style-asian="italic" style:font-weight-asian="normal" style:font-name-complex="Corbel" style:font-size-complex="12pt" style:font-style-complex="italic" style:font-weight-complex="normal"/>
    </style:style>
    <style:style style:name="T18" style:family="text">
      <style:text-properties fo:font-variant="normal" fo:text-transform="none" fo:color="#434343"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19" style:family="text">
      <style:text-properties fo:font-variant="normal" fo:text-transform="none" fo:color="#434343" style:text-line-through-style="none" style:text-line-through-type="none" style:text-position="0% 100%" style:font-name="Corbel" fo:font-size="12pt" fo:letter-spacing="normal" fo:font-style="normal" style:text-underline-style="none" fo:font-weight="bold" style:font-name-asian="Corbel" style:font-size-asian="12pt" style:font-style-asian="normal" style:font-weight-asian="bold" style:font-name-complex="Corbel" style:font-size-complex="12pt" style:font-style-complex="normal" style:font-weight-complex="bold"/>
    </style:style>
    <style:style style:name="T20" style:family="text">
      <style:text-properties fo:font-variant="normal" fo:text-transform="none" fo:color="#434343"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21" style:family="text">
      <style:text-properties fo:font-variant="normal" fo:text-transform="none"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Corbel" fo:font-size="22.5pt" fo:letter-spacing="normal" fo:font-style="normal" style:text-underline-style="none" fo:font-weight="bold" style:font-name-asian="Corbel" style:font-size-asian="22.5pt" style:font-style-asian="normal" style:font-weight-asian="bold" style:font-name-complex="Corbel" style:font-size-complex="22.5pt" style:font-style-complex="normal" style:font-weight-complex="bold"/>
    </style:style>
    <style:style style:name="T23" style:family="text">
      <style:text-properties fo:font-variant="normal" fo:text-transform="none" fo:color="#434343" style:text-line-through-style="none" style:text-line-through-type="none" style:text-position="0% 100%" style:font-name="Corbel" fo:font-size="15pt" fo:letter-spacing="normal" fo:font-style="normal" style:text-underline-style="none" fo:font-weight="bold" style:font-name-asian="Corbel" style:font-size-asian="15pt" style:font-style-asian="normal" style:font-weight-asian="bold" style:font-name-complex="Corbel" style:font-size-complex="15pt" style:font-style-complex="normal" style:font-weight-complex="bold"/>
    </style:style>
    <style:style style:name="T24" style:family="text">
      <style:text-properties fo:font-variant="normal" fo:text-transform="none" fo:color="#0000ff" style:text-line-through-style="none" style:text-line-through-type="none" style:text-position="0% 100%" style:font-name="Corbel" fo:font-size="9pt" fo:letter-spacing="normal" fo:font-style="normal" style:text-underline-style="solid" style:text-underline-width="auto" style:text-underline-color="font-color" fo:font-weight="normal" style:font-name-asian="Corbel" style:font-size-asian="9pt" style:font-style-asian="normal" style:font-weight-asian="normal" style:font-name-complex="Corbel" style:font-size-complex="9pt" style:font-style-complex="normal" style:font-weight-complex="normal"/>
    </style:style>
    <style:style style:name="T25" style:family="text">
      <style:text-properties fo:font-variant="normal" fo:text-transform="none" fo:color="#4bacc6" style:text-line-through-style="none" style:text-line-through-type="none" style:text-position="0% 100%" style:font-name="Corbel" fo:font-size="9pt" fo:letter-spacing="normal" fo:font-style="normal" style:text-underline-style="none" fo:font-weight="normal" style:font-name-asian="Corbel" style:font-size-asian="9pt" style:font-style-asian="normal" style:font-weight-asian="normal" style:font-name-complex="Corbel" style:font-size-complex="9pt" style:font-style-complex="normal" style:font-weight-complex="normal"/>
    </style:style>
    <style:style style:name="T26"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bold" style:font-name-asian="Corbel" style:font-size-asian="22pt" style:font-style-asian="normal" style:font-weight-asian="bold" style:font-name-complex="Corbel" style:font-size-complex="22pt" style:font-style-complex="normal" style:font-weight-complex="bold"/>
    </style:style>
    <style:style style:name="T27" style:family="text">
      <style:text-properties fo:font-variant="normal" fo:text-transform="none" fo:color="#888888"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style:style style:name="T29"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1" style:family="text">
      <style:text-properties fo:font-variant="normal" fo:text-transform="none" fo:color="#434343"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32" style:family="text">
      <style:text-properties fo:font-variant="normal" fo:text-transform="none" fo:color="#000000" style:text-line-through-style="none" style:text-line-through-type="none" style:text-position="0% 100%" style:font-name="Corbel" fo:font-size="32pt" fo:letter-spacing="normal" fo:font-style="normal" style:text-underline-style="none" fo:font-weight="bold" style:font-name-asian="Corbel" style:font-size-asian="32pt" style:font-style-asian="normal" style:font-weight-asian="bold" style:font-name-complex="Corbel" style:font-size-complex="32pt" style:font-style-complex="normal" style:font-weight-complex="bold"/>
    </style:style>
    <style:style style:name="T33" style:family="text">
      <style:text-properties fo:font-variant="normal" fo:text-transform="none" fo:color="#0097a7"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style:style style:name="T34"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35" style:family="text">
      <style:text-properties fo:font-variant="normal" fo:text-transform="none" fo:color="#4d4948"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36" style:family="text">
      <style:text-properties fo:font-variant="normal" fo:text-transform="none" fo:color="#4d4948"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T37" style:family="text">
      <style:text-properties fo:font-variant="normal" fo:text-transform="none" fo:color="#4d4948" style:text-line-through-style="none" style:text-line-through-type="none" style:text-position="0% 100%" style:font-name="Corbel" fo:font-size="11pt" fo:letter-spacing="normal" fo:font-style="normal" style:text-underline-style="none" fo:font-weight="bold" style:font-name-asian="Corbel" style:font-size-asian="11pt" style:font-style-asian="normal" style:font-weight-asian="bold" style:font-name-complex="Corbel" style:font-size-complex="11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9"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40" style:family="text">
      <style:text-properties fo:font-variant="normal" fo:text-transform="none" fo:color="#0097a7"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1" style:family="text">
      <style:text-properties fo:font-variant="normal" fo:text-transform="none" fo:color="#595959"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42" style:family="text">
      <style:text-properties fo:font-variant="normal" fo:text-transform="none" fo:color="#4d4948" style:text-line-through-style="none" style:text-line-through-type="none" style:text-position="0% 100%" style:font-name="Corbel" fo:font-size="19pt" fo:letter-spacing="normal" fo:font-style="normal" style:text-underline-style="none" fo:font-weight="normal" style:font-name-asian="Corbel" style:font-size-asian="19pt" style:font-style-asian="normal" style:font-weight-asian="normal" style:font-name-complex="Corbel" style:font-size-complex="19pt" style:font-style-complex="normal" style:font-weight-complex="normal"/>
    </style:style>
    <style:style style:name="T43"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44"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45" style:family="text">
      <style:text-properties fo:font-variant="normal" fo:text-transform="none" fo:color="#4d4948" style:text-line-through-style="none" style:text-line-through-type="none" style:text-position="0% 100%" style:font-name="Arial" fo:font-size="31pt" fo:letter-spacing="normal" fo:font-style="normal" style:text-underline-style="none" fo:font-weight="bold" style:font-name-asian="Arial" style:font-size-asian="31pt" style:font-style-asian="normal" style:font-weight-asian="bold" style:font-name-complex="Arial" style:font-size-complex="31pt" style:font-style-complex="normal" style:font-weight-complex="bold"/>
    </style:style>
    <style:style style:name="T46" style:family="text">
      <style:text-properties fo:font-variant="normal" fo:text-transform="none" fo:color="#4d4948" style:text-line-through-style="none" style:text-line-through-type="none" style:text-position="0% 100%" style:font-name="Corbel" fo:font-size="31pt" fo:letter-spacing="normal" fo:font-style="normal" style:text-underline-style="none" fo:font-weight="bold" style:font-name-asian="Corbel" style:font-size-asian="31pt" style:font-style-asian="normal" style:font-weight-asian="bold" style:font-name-complex="Corbel" style:font-size-complex="31pt" style:font-style-complex="normal" style:font-weight-complex="bold"/>
    </style:style>
    <style:style style:name="T47" style:family="text">
      <style:text-properties fo:font-variant="normal" fo:text-transform="none" fo:color="#4d4948" style:text-line-through-style="none" style:text-line-through-type="none" style:text-position="0% 100%" style:font-name="Corbel" fo:font-size="24pt" fo:letter-spacing="normal" fo:font-style="normal" style:text-underline-style="none" fo:font-weight="normal" style:font-name-asian="Corbel" style:font-size-asian="24pt" style:font-style-asian="normal" style:font-weight-asian="normal" style:font-name-complex="Corbel" style:font-size-complex="24pt" style:font-style-complex="normal" style:font-weight-complex="normal"/>
    </style:style>
    <style:style style:name="T48"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normal" style:font-name-asian="Corbel" style:font-size-asian="22pt" style:font-style-asian="normal" style:font-weight-asian="normal" style:font-name-complex="Corbel" style:font-size-complex="22pt" style:font-style-complex="normal" style:font-weight-complex="normal"/>
    </style:style>
    <style:style style:name="T49"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normal" style:font-name-asian="Corbel" style:font-size-asian="17pt" style:font-style-asian="normal" style:font-weight-asian="normal" style:font-name-complex="Corbel" style:font-size-complex="17pt" style:font-style-complex="normal" style:font-weight-complex="normal"/>
    </style:style>
    <style:style style:name="T50" style:family="text">
      <style:text-properties fo:font-variant="normal" fo:text-transform="none" fo:color="#4d4948"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52"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53" style:family="text">
      <style:text-properties fo:font-variant="normal" fo:text-transform="none" fo:color="#0097a7" style:text-line-through-style="none" style:text-line-through-type="none" style:text-position="0% 100%" style:font-name="Corbel" fo:font-size="10pt" fo:letter-spacing="normal" fo:font-style="normal" style:text-underline-style="solid" style:text-underline-width="auto" style:text-underline-color="font-color" fo:font-weight="normal" style:font-name-asian="Corbel" style:font-size-asian="10pt" style:font-style-asian="normal" style:font-weight-asian="normal" style:font-name-complex="Corbel" style:font-size-complex="10pt" style:font-style-complex="normal" style:font-weight-complex="normal"/>
    </style:style>
    <style:style style:name="T54" style:family="text">
      <style:text-properties fo:font-variant="normal" fo:text-transform="none" fo:color="#0097a7" style:text-line-through-style="none" style:text-line-through-type="none" style:text-position="0% 100%" style:font-name="Corbel" fo:font-size="10pt" fo:letter-spacing="normal" fo:font-style="normal" style:text-underline-style="none" fo:font-weight="normal" style:font-name-asian="Corbel" style:font-size-asian="10pt" style:font-style-asian="normal" style:font-weight-asian="normal" style:font-name-complex="Corbel" style:font-size-complex="1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rbel" fo:font-size="10pt" fo:letter-spacing="normal" fo:font-style="normal" style:text-underline-style="none" fo:font-weight="normal" style:font-name-asian="Corbel" style:font-size-asian="10pt" style:font-style-asian="normal" style:font-weight-asian="normal" style:font-name-complex="Corbel" style:font-size-complex="10pt" style:font-style-complex="normal" style:font-weight-complex="normal"/>
    </style:style>
    <style:style style:name="T56" style:family="text">
      <style:text-properties fo:font-variant="normal" fo:text-transform="none" fo:color="#4d4948" style:text-line-through-style="none" style:text-line-through-type="none" style:text-position="0% 100%" style:font-name="Corbel" fo:font-size="21pt" fo:letter-spacing="normal" fo:font-style="normal" style:text-underline-style="none" fo:font-weight="normal" style:font-name-asian="Corbel" style:font-size-asian="21pt" style:font-style-asian="normal" style:font-weight-asian="normal" style:font-name-complex="Corbel" style:font-size-complex="21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58" style:family="text">
      <style:text-properties fo:font-variant="normal" fo:text-transform="none" fo:color="#4d4948" style:text-line-through-style="none" style:text-line-through-type="none" style:text-position="0% 100%" style:font-name="Corbel" fo:font-size="31pt" fo:letter-spacing="normal" fo:font-style="normal" style:text-underline-style="none" fo:font-weight="normal" style:font-name-asian="Corbel" style:font-size-asian="31pt" style:font-style-asian="normal" style:font-weight-asian="normal" style:font-name-complex="Corbel" style:font-size-complex="31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orbel" fo:font-size="36pt" fo:letter-spacing="normal" fo:font-style="normal" style:text-underline-style="none" fo:font-weight="bold" style:font-name-asian="Corbel" style:font-size-asian="36pt" style:font-style-asian="normal" style:font-weight-asian="bold" style:font-name-complex="Corbel" style:font-size-complex="36pt" style:font-style-complex="normal" style:font-weight-complex="bold"/>
    </style:style>
    <style:style style:name="T60" style:family="text">
      <style:text-properties fo:font-variant="normal" fo:text-transform="none" fo:color="#0097a7" style:text-line-through-style="none" style:text-line-through-type="none" style:text-position="0% 100%" style:font-name="Corbel" fo:font-size="9pt" fo:letter-spacing="normal" fo:font-style="normal" style:text-underline-style="solid" style:text-underline-width="auto" style:text-underline-color="font-color" fo:font-weight="normal" style:font-name-asian="Corbel" style:font-size-asian="9pt" style:font-style-asian="normal" style:font-weight-asian="normal" style:font-name-complex="Corbel" style:font-size-complex="9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rbel" fo:font-size="9pt" fo:letter-spacing="normal" fo:font-style="normal" style:text-underline-style="none" fo:font-weight="normal" style:font-name-asian="Corbel" style:font-size-asian="9pt" style:font-style-asian="normal" style:font-weight-asian="normal" style:font-name-complex="Corbel" style:font-size-complex="9pt" style:font-style-complex="normal" style:font-weight-complex="normal"/>
    </style:style>
    <style:style style:name="T62" style:family="text">
      <style:text-properties fo:font-variant="normal" fo:text-transform="none" fo:color="#4d4948" style:text-line-through-style="none" style:text-line-through-type="none" style:text-position="0% 100%" style:font-name="Corbel" fo:font-size="29.8999996185303pt" fo:letter-spacing="normal" fo:font-style="normal" style:text-underline-style="none" fo:font-weight="bold" style:font-name-asian="Corbel" style:font-size-asian="29.8999996185303pt" style:font-style-asian="normal" style:font-weight-asian="bold" style:font-name-complex="Corbel" style:font-size-complex="29.8999996185303pt" style:font-style-complex="normal" style:font-weight-complex="bold"/>
    </style:style>
    <style:style style:name="T63" style:family="text">
      <style:text-properties fo:font-variant="normal" fo:text-transform="none" fo:color="#4d4948"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64" style:family="text">
      <style:text-properties fo:font-variant="normal" fo:text-transform="none" fo:color="#4d4948" style:text-line-through-style="none" style:text-line-through-type="none" style:text-position="0% 100%" style:font-name="Corbel" fo:font-size="14pt" fo:letter-spacing="normal" fo:font-style="italic" style:text-underline-style="none" fo:font-weight="bold" style:font-name-asian="Corbel" style:font-size-asian="14pt" style:font-style-asian="italic" style:font-weight-asian="bold" style:font-name-complex="Corbel" style:font-size-complex="14pt" style:font-style-complex="italic" style:font-weight-complex="bold"/>
    </style:style>
    <style:style style:name="T65" style:family="text">
      <style:text-properties fo:font-variant="normal" fo:text-transform="none" fo:color="#4d4948" style:text-line-through-style="none" style:text-line-through-type="none" style:text-position="0% 100%" style:font-name="Corbel" fo:font-size="14pt" fo:letter-spacing="normal" fo:font-style="italic" style:text-underline-style="none" fo:font-weight="normal" style:font-name-asian="Corbel" style:font-size-asian="14pt" style:font-style-asian="italic" style:font-weight-asian="normal" style:font-name-complex="Corbel" style:font-size-complex="14pt" style:font-style-complex="italic" style:font-weight-complex="normal"/>
    </style:style>
    <style:style style:name="T6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7" style:family="text">
      <style:text-properties fo:font-variant="normal" fo:text-transform="none" fo:color="#353535" style:text-line-through-style="none" style:text-line-through-type="none" style:text-position="0% 100%" style:font-name="Georgia" fo:font-size="11pt" fo:letter-spacing="normal"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T68" style:family="text">
      <style:text-properties fo:font-variant="normal" fo:text-transform="none" fo:color="#0097a7" style:text-line-through-style="none" style:text-line-through-type="none" style:text-position="0% 100%" style:font-name="Exo 2" fo:font-size="18pt" fo:letter-spacing="normal" fo:font-style="normal" style:text-underline-style="solid" style:text-underline-width="auto" style:text-underline-color="font-color" fo:font-weight="normal" style:font-name-asian="Exo 2" style:font-size-asian="18pt" style:font-style-asian="normal" style:font-weight-asian="normal" style:font-name-complex="Exo 2" style:font-size-complex="18pt" style:font-style-complex="normal" style:font-weight-complex="normal"/>
    </style:style>
    <style:style style:name="T69" style:family="text">
      <style:text-properties fo:font-variant="normal" fo:text-transform="none" fo:color="#172b4b" style:text-line-through-style="none" style:text-line-through-type="none" style:text-position="0% 100%" style:font-name="Exo 2" fo:font-size="18pt" fo:letter-spacing="normal" fo:font-style="normal" style:text-underline-style="none" fo:font-weight="normal" style:font-name-asian="Exo 2" style:font-size-asian="18pt" style:font-style-asian="normal" style:font-weight-asian="normal" style:font-name-complex="Exo 2" style:font-size-complex="18pt" style:font-style-complex="normal" style:font-weight-complex="normal"/>
    </style:style>
    <style:style style:name="T70" style:family="text">
      <style:text-properties fo:font-variant="normal" fo:text-transform="none" fo:color="#4d4948"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71" style:family="text">
      <style:text-properties fo:font-variant="normal" fo:text-transform="none" fo:color="#4bacc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Open Sans" fo:font-size="52pt" fo:letter-spacing="normal" fo:font-style="normal" style:text-underline-style="none" fo:font-weight="normal" style:font-name-asian="Open Sans" style:font-size-asian="52pt" style:font-style-asian="normal" style:font-weight-asian="normal" style:font-name-complex="Open Sans" style:font-size-complex="52pt" style:font-style-complex="normal" style:font-weight-complex="normal"/>
    </style:style>
    <style:style style:name="T73" style:family="text">
      <style:text-properties fo:font-variant="normal" fo:text-transform="none" fo:color="#595959" style:text-line-through-style="none" style:text-line-through-type="none" style:text-position="0% 100%" style:font-name="Open Sans" fo:font-size="28pt" fo:letter-spacing="normal" fo:font-style="normal" style:text-underline-style="none" fo:font-weight="normal" style:font-name-asian="Open Sans" style:font-size-asian="28pt" style:font-style-asian="normal" style:font-weight-asian="normal" style:font-name-complex="Open Sans" style:font-size-complex="28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7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Arial" fo:font-size="22pt" fo:letter-spacing="normal" fo:font-style="normal" style:text-underline-style="solid" style:text-underline-width="auto" style:text-underline-color="font-color" fo:font-weight="normal" style:font-name-asian="Arial" style:font-size-asian="22pt" style:font-style-asian="normal" style:font-weight-asian="normal" style:font-name-complex="Arial" style:font-size-complex="2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234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407cm" text:min-label-width="0.863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407cm" text:min-label-width="0.8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1.659cm" text:min-label-width="0.881cm"/>
        <style:text-properties style:font-name="Arial" fo:color="#4d494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35353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49cm" text:min-label-width="1.02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9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draw:frame draw:name="Google Shape;305;p68" presentation:style-name="pr1" draw:text-style-name="P2" draw:layer="layout" svg:width="11.94cm" svg:height="1.536cm" svg:x="12.433cm" svg:y="8.366cm" presentation:class="subtitle" presentation:user-transformed="true">
          <draw:text-box>
            <text:p text:style-name="P1"><text:span text:style-name="T1">Korbinian Bösl</text:span></text:p>
          </draw:text-box>
        </draw:frame>
        <draw:frame draw:name="Google Shape;306;p68" presentation:style-name="pr2" draw:text-style-name="P4" draw:layer="layout" svg:width="13.24cm" svg:height="5.076cm" svg:x="11.133cm" svg:y="3.369cm" presentation:class="title" presentation:user-transformed="true">
          <draw:text-box>
            <text:p text:style-name="P3"><text:span text:style-name="T2">Data Management Requirements</text:span></text:p>
          </draw:text-box>
        </draw:frame>
        <draw:frame draw:name="Google Shape;307;p68" presentation:style-name="pr3" draw:text-style-name="P6" draw:layer="layout" svg:width="9.401cm" svg:height="0.749cm" svg:x="14.973cm" svg:y="9.936cm" presentation:class="outline" presentation:user-transformed="true">
          <draw:text-box>
            <text:p text:style-name="P5"><text:span text:style-name="T3">Data management coordinator</text:span></text:p>
            <text:p text:style-name="P5"><text:span text:style-name="T3">ELIXIR Norwayy</text:span></text:p>
          </draw:text-box>
        </draw:frame>
        <draw:custom-shape draw:name="Google Shape;308;p68" draw:style-name="gr1" draw:text-style-name="P7" draw:layer="layout" svg:width="19.492cm" svg:height="1.539cm" svg:x="6.359cm" svg:y="13.667cm">
          <text:p text:style-name="P3"><text:span text:style-name="T4">Illustrative Icons from </text:span><text:span text:style-name="T5"><text:a xlink:href="https://fontawesome.com/" xlink:type="simple">Font Awesome</text:a></text:span><text:span text:style-name="T4"><text:s/>licensed under</text:span><text:span text:style-name="T5"><text:a xlink:href="http://creativecommons.org/licenses/by/4.0/" xlink:type="simple"> Creative Commons Attribution 4.0 International License</text:a></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9;p68" draw:style-name="gr2" draw:text-style-name="P8" draw:layer="layout" svg:width="4.037cm" svg:height="2.711cm" svg:x="11.564cm" svg:y="10.82cm">
          <draw:image xlink:href="Pictures/100002010000010F000000B60939EE7473DC96AC.png" xlink:type="simple" xlink:show="embed" xlink:actuate="onLoad">
            <text:p/>
          </draw:image>
        </draw:frame>
        <presentation:notes draw:style-name="dp2">
          <draw:frame draw:name="Google Shape;302;g387ab3d6262_1_61:notes" presentation:style-name="pr4" draw:text-style-name="P9" draw:layer="layout" svg:width="15.239cm" svg:height="10.001cm" svg:x="1.905cm" svg:y="12.224cm" presentation:class="notes" presentation:placeholder="true" presentation:user-transformed="true">
            <draw:text-box/>
          </draw:frame>
          <draw:page-thumbnail draw:name="Google Shape;303;g387ab3d6262_1_61:notes" draw:style-name="gr3" draw:layer="layout" svg:width="15.239cm" svg:height="8.572cm" svg:x="1.905cm" svg:y="3.175cm" draw:page-number="1" presentation:class="page"/>
        </presentation:notes>
      </draw:page>
      <draw:page draw:name="Life cycle&#10;" draw:style-name="dp1" draw:master-page-name="TITLE_5f_AND_5f_BODY" presentation:presentation-page-layout-name="AL1T1">
        <draw:frame draw:name="Google Shape;314;p69" presentation:style-name="pr5" draw:text-style-name="P10" draw:layer="layout" svg:width="23.667cm" svg:height="1.59cm" svg:x="0.866cm" svg:y="1.236cm" presentation:class="title" presentation:user-transformed="true">
          <draw:text-box>
            <text:p text:style-name="P3"><text:span text:style-name="T6">Life cycle</text:span><text:span text:style-name="T6"><text:line-break/></text:span><text:span text:style-name="T6"/></text:p>
          </draw:text-box>
        </draw:frame>
        <draw:g draw:name="Google Shape;315;p69" xml:id="id6" draw:id="id6">
          <draw:custom-shape draw:name="Google Shape;316;p69" draw:style-name="gr4" draw:text-style-name="P11" draw:layer="layout" svg:width="0.107cm" svg:height="0.067cm" svg:x="10.215cm" svg:y="6.502cm">
            <text:p text:style-name="P3"><text:span text:style-name="T30"/></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317;p69" draw:style-name="gr4" draw:text-style-name="P11" draw:layer="layout" svg:width="2.478cm" svg:height="3.33cm" svg:x="8.577cm" svg:y="4.635cm">
            <text:p text:style-name="P3"><text:span text:style-name="T30"/></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318;p69" draw:style-name="gr4" draw:text-style-name="P11" draw:layer="layout" svg:width="0.099cm" svg:height="0.067cm" svg:x="9.795cm" svg:y="6.589cm">
            <text:p text:style-name="P3"><text:span text:style-name="T30"/></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319;p69" xml:id="id7" draw:id="id7">
          <draw:custom-shape draw:name="Google Shape;320;p69" draw:style-name="gr5" draw:text-style-name="P12" draw:layer="layout" svg:width="0.117cm" svg:height="0.107cm" svg:x="11.235cm" svg:y="4.501cm">
            <text:p text:style-name="P3"><text:span text:style-name="T30"/></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321;p69" draw:style-name="gr5" draw:text-style-name="P12" draw:layer="layout" svg:width="3.612cm" svg:height="2.799cm" svg:x="9.537cm" svg:y="3.016cm">
            <text:p text:style-name="P3"><text:span text:style-name="T30"/></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322;p69" draw:style-name="gr5" draw:text-style-name="P12" draw:layer="layout" svg:width="0.107cm" svg:height="0.065cm" svg:x="12.219cm" svg:y="4.588cm">
            <text:p text:style-name="P3"><text:span text:style-name="T30"/></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323;p69" draw:style-name="gr5" draw:text-style-name="P12" draw:layer="layout" svg:width="0.107cm" svg:height="0.065cm" svg:x="11.496cm" svg:y="4.588cm">
            <text:p text:style-name="P3"><text:span text:style-name="T30"/></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324;p69" xml:id="id5" draw:id="id5">
          <draw:custom-shape draw:name="Google Shape;325;p69" draw:style-name="gr6" draw:text-style-name="P13" draw:layer="layout" svg:width="0.117cm" svg:height="0.117cm" svg:x="9.392cm" svg:y="8.903cm">
            <text:p text:style-name="P3"><text:span text:style-name="T30"/></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326;p69" draw:style-name="gr6" draw:text-style-name="P13" draw:layer="layout" svg:width="0.109cm" svg:height="0.062cm" svg:x="9.816cm" svg:y="8.992cm">
            <text:p text:style-name="P3"><text:span text:style-name="T30"/></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327;p69" draw:style-name="gr6" draw:text-style-name="P13" draw:layer="layout" svg:width="0.107cm" svg:height="0.062cm" svg:x="10.284cm" svg:y="8.992cm">
            <text:p text:style-name="P3"><text:span text:style-name="T30"/></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328;p69" draw:style-name="gr6" draw:text-style-name="P13" draw:layer="layout" svg:width="3.049cm" svg:height="3.422cm" svg:x="8.704cm" svg:y="7.388cm">
            <text:p text:style-name="P3"><text:span text:style-name="T30"/></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329;p69" draw:style-name="gr6" draw:text-style-name="P13" draw:layer="layout" svg:width="0.107cm" svg:height="0.07cm" svg:x="10.941cm" svg:y="8.987cm">
            <text:p text:style-name="P3"><text:span text:style-name="T30"/></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330;p69" xml:id="id4" draw:id="id4">
          <draw:custom-shape draw:name="Google Shape;331;p69" draw:style-name="gr7" draw:text-style-name="P14" draw:layer="layout" svg:width="0.107cm" svg:height="0.065cm" svg:x="13.044cm" svg:y="10.533cm">
            <text:p text:style-name="P3"><text:span text:style-name="T30"/></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332;p69" draw:style-name="gr7" draw:text-style-name="P14" draw:layer="layout" svg:width="0.102cm" svg:height="0.067cm" svg:x="12.208cm" svg:y="10.617cm">
            <text:p text:style-name="P3"><text:span text:style-name="T30"/></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333;p69" draw:style-name="gr7" draw:text-style-name="P14" draw:layer="layout" svg:width="3.443cm" svg:height="2.265cm" svg:x="10.957cm" svg:y="9.005cm">
            <text:p text:style-name="P3"><text:span text:style-name="T30"/></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334;p69" draw:style-name="gr7" draw:text-style-name="P14" draw:layer="layout" svg:width="0.099cm" svg:height="0.141cm" svg:x="11.696cm" svg:y="10.446cm">
            <text:p text:style-name="P3"><text:span text:style-name="T30"/></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335;p69" xml:id="id3" draw:id="id3">
          <draw:custom-shape draw:name="Google Shape;336;p69" draw:style-name="gr8" draw:text-style-name="P15" draw:layer="layout" svg:width="0.131cm" svg:height="0.133cm" svg:x="14.58cm" svg:y="8.871cm">
            <text:p text:style-name="P3"><text:span text:style-name="T30"/></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337;p69" draw:style-name="gr8" draw:text-style-name="P15" draw:layer="layout" svg:width="0.117cm" svg:height="0.117cm" svg:x="14.096cm" svg:y="9.599cm">
            <text:p text:style-name="P3"><text:span text:style-name="T30"/></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338;p69" draw:style-name="gr8" draw:text-style-name="P15" draw:layer="layout" svg:width="0.131cm" svg:height="0.133cm" svg:x="14.759cm" svg:y="8.871cm">
            <text:p text:style-name="P3"><text:span text:style-name="T30"/></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339;p69" draw:style-name="gr8" draw:text-style-name="P15" draw:layer="layout" svg:width="0.123cm" svg:height="0.154cm" svg:x="14.514cm" svg:y="9.689cm">
            <text:p text:style-name="P3"><text:span text:style-name="T30"/></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340;p69" draw:style-name="gr8" draw:text-style-name="P15" draw:layer="layout" svg:width="0.107cm" svg:height="0.067cm" svg:x="14.987cm" svg:y="9.683cm">
            <text:p text:style-name="P3"><text:span text:style-name="T30"/></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341;p69" draw:style-name="gr8" draw:text-style-name="P15" draw:layer="layout" svg:width="0.133cm" svg:height="0.128cm" svg:x="14.943cm" svg:y="8.871cm">
            <text:p text:style-name="P3"><text:span text:style-name="T30"/></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342;p69" draw:style-name="gr8" draw:text-style-name="P15" draw:layer="layout" svg:width="3.065cm" svg:height="3.152cm" svg:x="13.599cm" svg:y="7.675cm">
            <text:p text:style-name="P3"><text:span text:style-name="T30"/></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343;p69" xml:id="id1" draw:id="id1">
          <draw:custom-shape draw:name="Google Shape;344;p69" draw:style-name="gr9" draw:text-style-name="P16" draw:layer="layout" svg:width="0.117cm" svg:height="0.117cm" svg:x="13.976cm" svg:y="4.769cm">
            <text:p text:style-name="P3"><text:span text:style-name="T30"/></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345;p69" draw:style-name="gr9" draw:text-style-name="P16" draw:layer="layout" svg:width="0.104cm" svg:height="0.067cm" svg:x="14.36cm" svg:y="4.94cm">
            <text:p text:style-name="P3"><text:span text:style-name="T30"/></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346;p69" draw:style-name="gr9" draw:text-style-name="P16" draw:layer="layout" svg:width="3.099cm" svg:height="2.786cm" svg:x="12.777cm" svg:y="3.016cm">
            <text:p text:style-name="P3"><text:span text:style-name="T30"/></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347;p69" xml:id="id2" draw:id="id2">
          <draw:custom-shape draw:name="Google Shape;348;p69" draw:style-name="gr10" draw:text-style-name="P17" draw:layer="layout" svg:width="0.107cm" svg:height="0.067cm" svg:x="15.965cm" svg:y="7.07cm">
            <text:p text:style-name="P3"><text:span text:style-name="T30"/></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349;p69" draw:style-name="gr10" draw:text-style-name="P17" draw:layer="layout" svg:width="0.125cm" svg:height="0.157cm" svg:x="15.44cm" svg:y="7.073cm">
            <text:p text:style-name="P3"><text:span text:style-name="T30"/></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350;p69" draw:style-name="gr10" draw:text-style-name="P17" draw:layer="layout" svg:width="2.486cm" svg:height="3.62cm" svg:x="14.335cm" svg:y="4.654cm">
            <text:p text:style-name="P3"><text:span text:style-name="T30"/></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351;p69" draw:style-name="gr11" draw:text-style-name="P7" draw:layer="layout" svg:width="20.997cm" svg:height="0.719cm" svg:x="0.173cm" svg:y="13.455cm">
          <text:p text:style-name="P3"><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Google Shape;311;g3414daac41a_0_1167:notes" draw:style-name="gr3" draw:layer="layout" svg:width="16.932cm" svg:height="9.524cm" svg:x="1.059cm" svg:y="1.905cm" draw:page-number="2" presentation:class="page"/>
          <draw:frame draw:name="Google Shape;312;g3414daac41a_0_1167:notes" presentation:style-name="pr6" draw:text-style-name="P9" draw:layer="layout" svg:width="15.239cm" svg:height="11.429cm" svg:x="1.905cm" svg:y="12.065cm" presentation:class="notes" presentation:placeholder="true" presentation:user-transformed="true">
            <draw:text-box/>
          </draw:frame>
        </presentation:notes>
      </draw:page>
      <draw:page draw:name="Requirements" draw:style-name="dp1" draw:master-page-name="TITLE_5f_AND_5f_BODY" presentation:presentation-page-layout-name="AL1T1">
        <draw:custom-shape draw:name="Google Shape;356;p70" draw:style-name="gr12" draw:text-style-name="P7" xml:id="id14" draw:id="id14" draw:layer="layout" svg:width="12.803cm" svg:height="12.803cm" draw:transform="rotate (1.5707963267949) translate (6.277cm 13.456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name="Google Shape;357;p70" presentation:style-name="pr5" draw:text-style-name="P10" draw:layer="layout" svg:width="23.667cm" svg:height="1.59cm" svg:x="0.866cm" svg:y="1.236cm" presentation:class="title" presentation:user-transformed="true">
          <draw:text-box>
            <text:p text:style-name="P3"><text:span text:style-name="T6">Requirements</text:span></text:p>
          </draw:text-box>
        </draw:frame>
        <draw:g draw:name="Google Shape;358;p70">
          <draw:custom-shape draw:name="Google Shape;359;p70" draw:style-name="gr4" draw:text-style-name="P11" draw:layer="layout" svg:width="0.107cm" svg:height="0.067cm" svg:x="10.215cm" svg:y="6.502cm">
            <text:p text:style-name="P3"><text:span text:style-name="T30"/></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360;p70" draw:style-name="gr4" draw:text-style-name="P11" draw:layer="layout" svg:width="2.478cm" svg:height="3.33cm" svg:x="8.577cm" svg:y="4.635cm">
            <text:p text:style-name="P3"><text:span text:style-name="T30"/></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361;p70" draw:style-name="gr4" draw:text-style-name="P11" draw:layer="layout" svg:width="0.099cm" svg:height="0.067cm" svg:x="9.795cm" svg:y="6.589cm">
            <text:p text:style-name="P3"><text:span text:style-name="T30"/></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362;p70">
          <draw:custom-shape draw:name="Google Shape;363;p70" draw:style-name="gr5" draw:text-style-name="P12" draw:layer="layout" svg:width="0.117cm" svg:height="0.107cm" svg:x="11.235cm" svg:y="4.501cm">
            <text:p text:style-name="P3"><text:span text:style-name="T30"/></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364;p70" draw:style-name="gr5" draw:text-style-name="P12" draw:layer="layout" svg:width="3.612cm" svg:height="2.799cm" svg:x="9.537cm" svg:y="3.016cm">
            <text:p text:style-name="P3"><text:span text:style-name="T30"/></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365;p70" draw:style-name="gr5" draw:text-style-name="P12" draw:layer="layout" svg:width="0.107cm" svg:height="0.065cm" svg:x="12.219cm" svg:y="4.588cm">
            <text:p text:style-name="P3"><text:span text:style-name="T30"/></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366;p70" draw:style-name="gr5" draw:text-style-name="P12" draw:layer="layout" svg:width="0.107cm" svg:height="0.065cm" svg:x="11.496cm" svg:y="4.588cm">
            <text:p text:style-name="P3"><text:span text:style-name="T30"/></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367;p70">
          <draw:custom-shape draw:name="Google Shape;368;p70" draw:style-name="gr6" draw:text-style-name="P13" draw:layer="layout" svg:width="0.117cm" svg:height="0.117cm" svg:x="9.392cm" svg:y="8.903cm">
            <text:p text:style-name="P3"><text:span text:style-name="T30"/></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369;p70" draw:style-name="gr6" draw:text-style-name="P13" draw:layer="layout" svg:width="0.109cm" svg:height="0.062cm" svg:x="9.816cm" svg:y="8.992cm">
            <text:p text:style-name="P3"><text:span text:style-name="T30"/></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370;p70" draw:style-name="gr6" draw:text-style-name="P13" draw:layer="layout" svg:width="0.107cm" svg:height="0.062cm" svg:x="10.284cm" svg:y="8.992cm">
            <text:p text:style-name="P3"><text:span text:style-name="T30"/></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371;p70" draw:style-name="gr6" draw:text-style-name="P13" draw:layer="layout" svg:width="3.049cm" svg:height="3.422cm" svg:x="8.704cm" svg:y="7.388cm">
            <text:p text:style-name="P3"><text:span text:style-name="T30"/></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372;p70" draw:style-name="gr6" draw:text-style-name="P13" draw:layer="layout" svg:width="0.107cm" svg:height="0.07cm" svg:x="10.941cm" svg:y="8.987cm">
            <text:p text:style-name="P3"><text:span text:style-name="T30"/></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373;p70">
          <draw:custom-shape draw:name="Google Shape;374;p70" draw:style-name="gr7" draw:text-style-name="P14" draw:layer="layout" svg:width="0.107cm" svg:height="0.065cm" svg:x="13.044cm" svg:y="10.533cm">
            <text:p text:style-name="P3"><text:span text:style-name="T30"/></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375;p70" draw:style-name="gr7" draw:text-style-name="P14" draw:layer="layout" svg:width="0.102cm" svg:height="0.067cm" svg:x="12.208cm" svg:y="10.617cm">
            <text:p text:style-name="P3"><text:span text:style-name="T30"/></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376;p70" draw:style-name="gr7" draw:text-style-name="P14" draw:layer="layout" svg:width="3.443cm" svg:height="2.265cm" svg:x="10.957cm" svg:y="9.005cm">
            <text:p text:style-name="P3"><text:span text:style-name="T30"/></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377;p70" draw:style-name="gr7" draw:text-style-name="P14" draw:layer="layout" svg:width="0.099cm" svg:height="0.141cm" svg:x="11.696cm" svg:y="10.446cm">
            <text:p text:style-name="P3"><text:span text:style-name="T30"/></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378;p70">
          <draw:custom-shape draw:name="Google Shape;379;p70" draw:style-name="gr8" draw:text-style-name="P15" draw:layer="layout" svg:width="0.131cm" svg:height="0.133cm" svg:x="14.58cm" svg:y="8.871cm">
            <text:p text:style-name="P3"><text:span text:style-name="T30"/></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380;p70" draw:style-name="gr8" draw:text-style-name="P15" draw:layer="layout" svg:width="0.117cm" svg:height="0.117cm" svg:x="14.096cm" svg:y="9.599cm">
            <text:p text:style-name="P3"><text:span text:style-name="T30"/></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381;p70" draw:style-name="gr8" draw:text-style-name="P15" draw:layer="layout" svg:width="0.131cm" svg:height="0.133cm" svg:x="14.759cm" svg:y="8.871cm">
            <text:p text:style-name="P3"><text:span text:style-name="T30"/></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382;p70" draw:style-name="gr8" draw:text-style-name="P15" draw:layer="layout" svg:width="0.123cm" svg:height="0.154cm" svg:x="14.514cm" svg:y="9.689cm">
            <text:p text:style-name="P3"><text:span text:style-name="T30"/></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383;p70" draw:style-name="gr8" draw:text-style-name="P15" draw:layer="layout" svg:width="0.107cm" svg:height="0.067cm" svg:x="14.987cm" svg:y="9.683cm">
            <text:p text:style-name="P3"><text:span text:style-name="T30"/></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384;p70" draw:style-name="gr8" draw:text-style-name="P15" draw:layer="layout" svg:width="0.133cm" svg:height="0.128cm" svg:x="14.943cm" svg:y="8.871cm">
            <text:p text:style-name="P3"><text:span text:style-name="T30"/></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385;p70" draw:style-name="gr8" draw:text-style-name="P15" draw:layer="layout" svg:width="3.065cm" svg:height="3.152cm" svg:x="13.599cm" svg:y="7.675cm">
            <text:p text:style-name="P3"><text:span text:style-name="T30"/></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386;p70">
          <draw:custom-shape draw:name="Google Shape;387;p70" draw:style-name="gr9" draw:text-style-name="P16" draw:layer="layout" svg:width="0.117cm" svg:height="0.117cm" svg:x="13.976cm" svg:y="4.769cm">
            <text:p text:style-name="P3"><text:span text:style-name="T30"/></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388;p70" draw:style-name="gr9" draw:text-style-name="P16" draw:layer="layout" svg:width="0.104cm" svg:height="0.067cm" svg:x="14.36cm" svg:y="4.94cm">
            <text:p text:style-name="P3"><text:span text:style-name="T30"/></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389;p70" draw:style-name="gr9" draw:text-style-name="P16" draw:layer="layout" svg:width="3.099cm" svg:height="2.786cm" svg:x="12.777cm" svg:y="3.016cm">
            <text:p text:style-name="P3"><text:span text:style-name="T30"/></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390;p70">
          <draw:custom-shape draw:name="Google Shape;391;p70" draw:style-name="gr10" draw:text-style-name="P17" draw:layer="layout" svg:width="0.107cm" svg:height="0.067cm" svg:x="15.965cm" svg:y="7.07cm">
            <text:p text:style-name="P3"><text:span text:style-name="T30"/></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392;p70" draw:style-name="gr10" draw:text-style-name="P17" draw:layer="layout" svg:width="0.125cm" svg:height="0.157cm" svg:x="15.44cm" svg:y="7.073cm">
            <text:p text:style-name="P3"><text:span text:style-name="T30"/></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393;p70" draw:style-name="gr10" draw:text-style-name="P17" draw:layer="layout" svg:width="2.486cm" svg:height="3.62cm" svg:x="14.335cm" svg:y="4.654cm">
            <text:p text:style-name="P3"><text:span text:style-name="T30"/></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394;p70" draw:style-name="gr13" draw:text-style-name="P7" xml:id="id12" draw:id="id12" draw:layer="layout" svg:width="11.477cm" svg:height="11.477cm" draw:transform="rotate (1.5707963267949) translate (6.94cm 12.883cm)">
          <text:p text:style-name="P3"><text:span text:style-name="T30"/></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395;p70" draw:style-name="gr14" draw:text-style-name="P7" xml:id="id13" draw:id="id13" draw:layer="layout" svg:width="12.374cm" svg:height="1.525cm" svg:x="1.037cm" svg:y="3.646cm">
          <text:p text:style-name="P3"><text:span text:style-name="T9">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70" draw:style-name="gr15" draw:text-style-name="P7" xml:id="id10" draw:id="id10" draw:layer="layout" svg:width="10.171cm" svg:height="10.171cm" draw:transform="rotate (1.5707963267949) translate (7.617cm 12.23cm)">
          <text:p text:style-name="P3"/>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397;p70" draw:style-name="gr14" draw:text-style-name="P7" xml:id="id11" draw:id="id11" draw:layer="layout" svg:width="12.374cm" svg:height="1.525cm" svg:x="19.401cm" svg:y="10.074cm">
          <text:p text:style-name="P3"><text:span text:style-name="T10">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70" draw:style-name="gr14" draw:text-style-name="P7" xml:id="id15" draw:id="id15" draw:layer="layout" svg:width="12.374cm" svg:height="1.525cm" svg:x="19.401cm" svg:y="3.64cm">
          <text:p text:style-name="P3"><text:span text:style-name="T11">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70" draw:style-name="gr16" draw:text-style-name="P7" xml:id="id8" draw:id="id8" draw:layer="layout" svg:width="8.938cm" svg:height="8.938cm" draw:transform="rotate (1.5707963267949) translate (8.233cm 11.613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00;p70" draw:style-name="gr14" draw:text-style-name="P7" xml:id="id9" draw:id="id9" draw:layer="layout" svg:width="12.374cm" svg:height="2.541cm" svg:x="1.037cm" svg:y="10.074cm">
          <text:p text:style-name="P3"><text:span text:style-name="T12">Project</text:span></text:p>
          <text:p text:style-name="P3"><text:span text:style-name="T12">&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70" draw:style-name="gr11" draw:text-style-name="P7" draw:layer="layout" svg:width="20.997cm" svg:height="0.719cm" svg:x="0.173cm" svg:y="13.455cm">
          <text:p text:style-name="P3"><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Google Shape;353;g3414daac41a_0_1208:notes" draw:style-name="gr3" draw:layer="layout" svg:width="16.932cm" svg:height="9.524cm" svg:x="1.059cm" svg:y="1.905cm" draw:page-number="3" presentation:class="page"/>
          <draw:frame draw:name="Google Shape;354;g3414daac41a_0_1208:notes" presentation:style-name="pr7" draw:text-style-name="P9" draw:layer="layout" svg:width="15.239cm" svg:height="11.429cm" svg:x="1.905cm" svg:y="12.065cm" presentation:class="notes" presentation:placeholder="true" presentation:user-transformed="true">
            <draw:text-box/>
          </draw:frame>
        </presentation:notes>
      </draw:page>
      <draw:page draw:name="Requirements" draw:style-name="dp1" draw:master-page-name="TITLE_5f_AND_5f_BODY" presentation:presentation-page-layout-name="AL1T1">
        <draw:custom-shape draw:name="Google Shape;406;p71" draw:style-name="gr17" draw:text-style-name="P7" draw:layer="layout" svg:width="12.803cm" svg:height="12.803cm" draw:transform="rotate (1.5707963267949) translate (6.277cm 13.456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name="Google Shape;407;p71" presentation:style-name="pr5" draw:text-style-name="P10" draw:layer="layout" svg:width="23.667cm" svg:height="1.59cm" svg:x="0.866cm" svg:y="1.236cm" presentation:class="title" presentation:user-transformed="true">
          <draw:text-box>
            <text:p text:style-name="P3"><text:span text:style-name="T6">Requirements</text:span></text:p>
          </draw:text-box>
        </draw:frame>
        <draw:g draw:name="Google Shape;408;p71">
          <draw:custom-shape draw:name="Google Shape;409;p71" draw:style-name="gr4" draw:text-style-name="P11" draw:layer="layout" svg:width="0.107cm" svg:height="0.067cm" svg:x="10.215cm" svg:y="6.502cm">
            <text:p text:style-name="P3"><text:span text:style-name="T30"/></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410;p71" draw:style-name="gr4" draw:text-style-name="P11" draw:layer="layout" svg:width="2.478cm" svg:height="3.33cm" svg:x="8.577cm" svg:y="4.635cm">
            <text:p text:style-name="P3"><text:span text:style-name="T30"/></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411;p71" draw:style-name="gr4" draw:text-style-name="P11" draw:layer="layout" svg:width="0.099cm" svg:height="0.067cm" svg:x="9.795cm" svg:y="6.589cm">
            <text:p text:style-name="P3"><text:span text:style-name="T30"/></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412;p71">
          <draw:custom-shape draw:name="Google Shape;413;p71" draw:style-name="gr5" draw:text-style-name="P12" draw:layer="layout" svg:width="0.117cm" svg:height="0.107cm" svg:x="11.235cm" svg:y="4.501cm">
            <text:p text:style-name="P3"><text:span text:style-name="T30"/></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414;p71" draw:style-name="gr5" draw:text-style-name="P12" draw:layer="layout" svg:width="3.612cm" svg:height="2.799cm" svg:x="9.537cm" svg:y="3.016cm">
            <text:p text:style-name="P3"><text:span text:style-name="T30"/></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415;p71" draw:style-name="gr5" draw:text-style-name="P12" draw:layer="layout" svg:width="0.107cm" svg:height="0.065cm" svg:x="12.219cm" svg:y="4.588cm">
            <text:p text:style-name="P3"><text:span text:style-name="T30"/></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416;p71" draw:style-name="gr5" draw:text-style-name="P12" draw:layer="layout" svg:width="0.107cm" svg:height="0.065cm" svg:x="11.496cm" svg:y="4.588cm">
            <text:p text:style-name="P3"><text:span text:style-name="T30"/></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417;p71">
          <draw:custom-shape draw:name="Google Shape;418;p71" draw:style-name="gr6" draw:text-style-name="P13" draw:layer="layout" svg:width="0.117cm" svg:height="0.117cm" svg:x="9.392cm" svg:y="8.903cm">
            <text:p text:style-name="P3"><text:span text:style-name="T30"/></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419;p71" draw:style-name="gr6" draw:text-style-name="P13" draw:layer="layout" svg:width="0.109cm" svg:height="0.062cm" svg:x="9.816cm" svg:y="8.992cm">
            <text:p text:style-name="P3"><text:span text:style-name="T30"/></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420;p71" draw:style-name="gr6" draw:text-style-name="P13" draw:layer="layout" svg:width="0.107cm" svg:height="0.062cm" svg:x="10.284cm" svg:y="8.992cm">
            <text:p text:style-name="P3"><text:span text:style-name="T30"/></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421;p71" draw:style-name="gr6" draw:text-style-name="P13" draw:layer="layout" svg:width="3.049cm" svg:height="3.422cm" svg:x="8.704cm" svg:y="7.388cm">
            <text:p text:style-name="P3"><text:span text:style-name="T30"/></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422;p71" draw:style-name="gr6" draw:text-style-name="P13" draw:layer="layout" svg:width="0.107cm" svg:height="0.07cm" svg:x="10.941cm" svg:y="8.987cm">
            <text:p text:style-name="P3"><text:span text:style-name="T30"/></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423;p71">
          <draw:custom-shape draw:name="Google Shape;424;p71" draw:style-name="gr7" draw:text-style-name="P14" draw:layer="layout" svg:width="0.107cm" svg:height="0.065cm" svg:x="13.044cm" svg:y="10.533cm">
            <text:p text:style-name="P3"><text:span text:style-name="T30"/></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425;p71" draw:style-name="gr7" draw:text-style-name="P14" draw:layer="layout" svg:width="0.102cm" svg:height="0.067cm" svg:x="12.208cm" svg:y="10.617cm">
            <text:p text:style-name="P3"><text:span text:style-name="T30"/></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426;p71" draw:style-name="gr7" draw:text-style-name="P14" draw:layer="layout" svg:width="3.443cm" svg:height="2.265cm" svg:x="10.957cm" svg:y="9.005cm">
            <text:p text:style-name="P3"><text:span text:style-name="T30"/></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427;p71" draw:style-name="gr7" draw:text-style-name="P14" draw:layer="layout" svg:width="0.099cm" svg:height="0.141cm" svg:x="11.696cm" svg:y="10.446cm">
            <text:p text:style-name="P3"><text:span text:style-name="T30"/></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428;p71">
          <draw:custom-shape draw:name="Google Shape;429;p71" draw:style-name="gr8" draw:text-style-name="P15" draw:layer="layout" svg:width="0.131cm" svg:height="0.133cm" svg:x="14.58cm" svg:y="8.871cm">
            <text:p text:style-name="P3"><text:span text:style-name="T30"/></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430;p71" draw:style-name="gr8" draw:text-style-name="P15" draw:layer="layout" svg:width="0.117cm" svg:height="0.117cm" svg:x="14.096cm" svg:y="9.599cm">
            <text:p text:style-name="P3"><text:span text:style-name="T30"/></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431;p71" draw:style-name="gr8" draw:text-style-name="P15" draw:layer="layout" svg:width="0.131cm" svg:height="0.133cm" svg:x="14.759cm" svg:y="8.871cm">
            <text:p text:style-name="P3"><text:span text:style-name="T30"/></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432;p71" draw:style-name="gr8" draw:text-style-name="P15" draw:layer="layout" svg:width="0.123cm" svg:height="0.154cm" svg:x="14.514cm" svg:y="9.689cm">
            <text:p text:style-name="P3"><text:span text:style-name="T30"/></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433;p71" draw:style-name="gr8" draw:text-style-name="P15" draw:layer="layout" svg:width="0.107cm" svg:height="0.067cm" svg:x="14.987cm" svg:y="9.683cm">
            <text:p text:style-name="P3"><text:span text:style-name="T30"/></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434;p71" draw:style-name="gr8" draw:text-style-name="P15" draw:layer="layout" svg:width="0.133cm" svg:height="0.128cm" svg:x="14.943cm" svg:y="8.871cm">
            <text:p text:style-name="P3"><text:span text:style-name="T30"/></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435;p71" draw:style-name="gr8" draw:text-style-name="P15" draw:layer="layout" svg:width="3.065cm" svg:height="3.152cm" svg:x="13.599cm" svg:y="7.675cm">
            <text:p text:style-name="P3"><text:span text:style-name="T30"/></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436;p71">
          <draw:custom-shape draw:name="Google Shape;437;p71" draw:style-name="gr9" draw:text-style-name="P16" draw:layer="layout" svg:width="0.117cm" svg:height="0.117cm" svg:x="13.976cm" svg:y="4.769cm">
            <text:p text:style-name="P3"><text:span text:style-name="T30"/></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438;p71" draw:style-name="gr9" draw:text-style-name="P16" draw:layer="layout" svg:width="0.104cm" svg:height="0.067cm" svg:x="14.36cm" svg:y="4.94cm">
            <text:p text:style-name="P3"><text:span text:style-name="T30"/></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439;p71" draw:style-name="gr9" draw:text-style-name="P16" draw:layer="layout" svg:width="3.099cm" svg:height="2.786cm" svg:x="12.777cm" svg:y="3.016cm">
            <text:p text:style-name="P3"><text:span text:style-name="T30"/></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440;p71">
          <draw:custom-shape draw:name="Google Shape;441;p71" draw:style-name="gr10" draw:text-style-name="P17" draw:layer="layout" svg:width="0.107cm" svg:height="0.067cm" svg:x="15.965cm" svg:y="7.07cm">
            <text:p text:style-name="P3"><text:span text:style-name="T30"/></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442;p71" draw:style-name="gr10" draw:text-style-name="P17" draw:layer="layout" svg:width="0.125cm" svg:height="0.157cm" svg:x="15.44cm" svg:y="7.073cm">
            <text:p text:style-name="P3"><text:span text:style-name="T30"/></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443;p71" draw:style-name="gr10" draw:text-style-name="P17" draw:layer="layout" svg:width="2.486cm" svg:height="3.62cm" svg:x="14.335cm" svg:y="4.654cm">
            <text:p text:style-name="P3"><text:span text:style-name="T30"/></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444;p71" draw:style-name="gr13" draw:text-style-name="P7" draw:layer="layout" svg:width="11.477cm" svg:height="11.477cm" draw:transform="rotate (1.5707963267949) translate (6.94cm 12.883cm)">
          <text:p text:style-name="P3"><text:span text:style-name="T30"/></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45;p71" draw:style-name="gr14" draw:text-style-name="P7" draw:layer="layout" svg:width="12.374cm" svg:height="1.525cm" svg:x="1.037cm" svg:y="3.646cm">
          <text:p text:style-name="P3"><text:span text:style-name="T9">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71" draw:style-name="gr17" draw:text-style-name="P7" draw:layer="layout" svg:width="10.171cm" svg:height="10.171cm" draw:transform="rotate (1.5707963267949) translate (7.617cm 12.23cm)">
          <text:p text:style-name="P3"/>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47;p71" draw:style-name="gr14" draw:text-style-name="P7" draw:layer="layout" svg:width="12.374cm" svg:height="1.525cm" svg:x="19.401cm" svg:y="10.074cm">
          <text:p text:style-name="P3"><text:span text:style-name="T13">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71" draw:style-name="gr14" draw:text-style-name="P7" draw:layer="layout" svg:width="12.374cm" svg:height="1.525cm" svg:x="19.401cm" svg:y="3.64cm">
          <text:p text:style-name="P3"><text:span text:style-name="T13">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71" draw:style-name="gr17" draw:text-style-name="P7" draw:layer="layout" svg:width="8.938cm" svg:height="8.938cm" draw:transform="rotate (1.5707963267949) translate (8.233cm 11.613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50;p71" draw:style-name="gr14" draw:text-style-name="P7" draw:layer="layout" svg:width="12.374cm" svg:height="2.541cm" svg:x="1.037cm" svg:y="10.074cm">
          <text:p text:style-name="P3"><text:span text:style-name="T13">Project</text:span></text:p>
          <text:p text:style-name="P3"><text:span text:style-name="T13">&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71" draw:style-name="gr11" draw:text-style-name="P7" draw:layer="layout" svg:width="20.997cm" svg:height="0.719cm" svg:x="0.173cm" svg:y="13.455cm">
          <text:p text:style-name="P3"><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3;g3414daac41a_0_1257:notes" draw:style-name="gr3" draw:layer="layout" svg:width="16.932cm" svg:height="9.524cm" svg:x="1.059cm" svg:y="1.905cm" draw:page-number="4" presentation:class="page"/>
          <draw:frame draw:name="Google Shape;404;g3414daac41a_0_1257:notes" presentation:style-name="pr8" draw:text-style-name="P9" draw:layer="layout" svg:width="15.239cm" svg:height="11.429cm" svg:x="1.905cm" svg:y="12.065cm" presentation:class="notes" presentation:placeholder="true" presentation:user-transformed="true">
            <draw:text-box/>
          </draw:frame>
        </presentation:notes>
      </draw:page>
      <draw:page draw:name="Data Management plan?" draw:style-name="dp1" draw:master-page-name="TITLE_5f_AND_5f_BODY" presentation:presentation-page-layout-name="AL1T1">
        <draw:custom-shape draw:name="Google Shape;456;p72" draw:style-name="gr13" draw:text-style-name="P7" draw:layer="layout" svg:width="11.477cm" svg:height="11.477cm" draw:transform="rotate (1.5707963267949) translate (6.94cm 12.883cm)">
          <text:p text:style-name="P3"><text:span text:style-name="T30"/></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57;p72" draw:style-name="gr15" draw:text-style-name="P7" draw:layer="layout" svg:width="10.171cm" svg:height="10.171cm" draw:transform="rotate (1.5707963267949) translate (7.617cm 12.23cm)">
          <text:p text:style-name="P3"/>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58;p72" draw:style-name="gr16" draw:text-style-name="P7" draw:layer="layout" svg:width="8.938cm" svg:height="8.938cm" draw:transform="rotate (1.5707963267949) translate (8.233cm 11.613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59;p72" draw:style-name="gr12" draw:text-style-name="P7" draw:layer="layout" svg:width="12.803cm" svg:height="12.803cm" draw:transform="rotate (1.5707963267949) translate (6.298cm 13.455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name="Google Shape;460;p72">
          <draw:custom-shape draw:name="Google Shape;461;p72" draw:style-name="gr4" draw:text-style-name="P11" draw:layer="layout" svg:width="0.107cm" svg:height="0.067cm" svg:x="10.215cm" svg:y="6.502cm">
            <text:p text:style-name="P3"><text:span text:style-name="T30"/></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462;p72" draw:style-name="gr4" draw:text-style-name="P11" draw:layer="layout" svg:width="2.478cm" svg:height="3.33cm" svg:x="8.577cm" svg:y="4.635cm">
            <text:p text:style-name="P3"><text:span text:style-name="T30"/></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463;p72" draw:style-name="gr4" draw:text-style-name="P11" draw:layer="layout" svg:width="0.099cm" svg:height="0.067cm" svg:x="9.795cm" svg:y="6.589cm">
            <text:p text:style-name="P3"><text:span text:style-name="T30"/></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464;p72">
          <draw:custom-shape draw:name="Google Shape;465;p72" draw:style-name="gr5" draw:text-style-name="P12" draw:layer="layout" svg:width="0.117cm" svg:height="0.107cm" svg:x="11.235cm" svg:y="4.501cm">
            <text:p text:style-name="P3"><text:span text:style-name="T30"/></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466;p72" draw:style-name="gr5" draw:text-style-name="P12" draw:layer="layout" svg:width="3.612cm" svg:height="2.799cm" svg:x="9.537cm" svg:y="3.016cm">
            <text:p text:style-name="P3"><text:span text:style-name="T30"/></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467;p72" draw:style-name="gr5" draw:text-style-name="P12" draw:layer="layout" svg:width="0.107cm" svg:height="0.065cm" svg:x="12.219cm" svg:y="4.588cm">
            <text:p text:style-name="P3"><text:span text:style-name="T30"/></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468;p72" draw:style-name="gr5" draw:text-style-name="P12" draw:layer="layout" svg:width="0.107cm" svg:height="0.065cm" svg:x="11.496cm" svg:y="4.588cm">
            <text:p text:style-name="P3"><text:span text:style-name="T30"/></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469;p72">
          <draw:custom-shape draw:name="Google Shape;470;p72" draw:style-name="gr6" draw:text-style-name="P13" draw:layer="layout" svg:width="0.117cm" svg:height="0.117cm" svg:x="9.392cm" svg:y="8.903cm">
            <text:p text:style-name="P3"><text:span text:style-name="T30"/></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471;p72" draw:style-name="gr6" draw:text-style-name="P13" draw:layer="layout" svg:width="0.109cm" svg:height="0.062cm" svg:x="9.816cm" svg:y="8.992cm">
            <text:p text:style-name="P3"><text:span text:style-name="T30"/></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472;p72" draw:style-name="gr6" draw:text-style-name="P13" draw:layer="layout" svg:width="0.107cm" svg:height="0.062cm" svg:x="10.284cm" svg:y="8.992cm">
            <text:p text:style-name="P3"><text:span text:style-name="T30"/></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473;p72" draw:style-name="gr6" draw:text-style-name="P13" draw:layer="layout" svg:width="3.049cm" svg:height="3.422cm" svg:x="8.704cm" svg:y="7.388cm">
            <text:p text:style-name="P3"><text:span text:style-name="T30"/></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474;p72" draw:style-name="gr6" draw:text-style-name="P13" draw:layer="layout" svg:width="0.107cm" svg:height="0.07cm" svg:x="10.941cm" svg:y="8.987cm">
            <text:p text:style-name="P3"><text:span text:style-name="T30"/></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475;p72">
          <draw:custom-shape draw:name="Google Shape;476;p72" draw:style-name="gr7" draw:text-style-name="P14" draw:layer="layout" svg:width="0.107cm" svg:height="0.065cm" svg:x="13.044cm" svg:y="10.533cm">
            <text:p text:style-name="P3"><text:span text:style-name="T30"/></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477;p72" draw:style-name="gr7" draw:text-style-name="P14" draw:layer="layout" svg:width="0.102cm" svg:height="0.067cm" svg:x="12.208cm" svg:y="10.617cm">
            <text:p text:style-name="P3"><text:span text:style-name="T30"/></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478;p72" draw:style-name="gr7" draw:text-style-name="P14" draw:layer="layout" svg:width="3.443cm" svg:height="2.265cm" svg:x="10.957cm" svg:y="9.005cm">
            <text:p text:style-name="P3"><text:span text:style-name="T30"/></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479;p72" draw:style-name="gr7" draw:text-style-name="P14" draw:layer="layout" svg:width="0.099cm" svg:height="0.141cm" svg:x="11.696cm" svg:y="10.446cm">
            <text:p text:style-name="P3"><text:span text:style-name="T30"/></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480;p72">
          <draw:custom-shape draw:name="Google Shape;481;p72" draw:style-name="gr8" draw:text-style-name="P15" draw:layer="layout" svg:width="0.131cm" svg:height="0.133cm" svg:x="14.58cm" svg:y="8.871cm">
            <text:p text:style-name="P3"><text:span text:style-name="T30"/></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482;p72" draw:style-name="gr8" draw:text-style-name="P15" draw:layer="layout" svg:width="0.117cm" svg:height="0.117cm" svg:x="14.096cm" svg:y="9.599cm">
            <text:p text:style-name="P3"><text:span text:style-name="T30"/></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483;p72" draw:style-name="gr8" draw:text-style-name="P15" draw:layer="layout" svg:width="0.131cm" svg:height="0.133cm" svg:x="14.759cm" svg:y="8.871cm">
            <text:p text:style-name="P3"><text:span text:style-name="T30"/></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484;p72" draw:style-name="gr8" draw:text-style-name="P15" draw:layer="layout" svg:width="0.123cm" svg:height="0.154cm" svg:x="14.514cm" svg:y="9.689cm">
            <text:p text:style-name="P3"><text:span text:style-name="T30"/></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485;p72" draw:style-name="gr8" draw:text-style-name="P15" draw:layer="layout" svg:width="0.107cm" svg:height="0.067cm" svg:x="14.987cm" svg:y="9.683cm">
            <text:p text:style-name="P3"><text:span text:style-name="T30"/></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486;p72" draw:style-name="gr8" draw:text-style-name="P15" draw:layer="layout" svg:width="0.133cm" svg:height="0.128cm" svg:x="14.943cm" svg:y="8.871cm">
            <text:p text:style-name="P3"><text:span text:style-name="T30"/></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487;p72" draw:style-name="gr8" draw:text-style-name="P15" draw:layer="layout" svg:width="3.065cm" svg:height="3.152cm" svg:x="13.599cm" svg:y="7.675cm">
            <text:p text:style-name="P3"><text:span text:style-name="T30"/></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488;p72">
          <draw:custom-shape draw:name="Google Shape;489;p72" draw:style-name="gr10" draw:text-style-name="P17" draw:layer="layout" svg:width="0.107cm" svg:height="0.067cm" svg:x="15.965cm" svg:y="7.07cm">
            <text:p text:style-name="P3"><text:span text:style-name="T30"/></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490;p72" draw:style-name="gr10" draw:text-style-name="P17" draw:layer="layout" svg:width="0.125cm" svg:height="0.157cm" svg:x="15.44cm" svg:y="7.073cm">
            <text:p text:style-name="P3"><text:span text:style-name="T30"/></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491;p72" draw:style-name="gr10" draw:text-style-name="P17" draw:layer="layout" svg:width="2.486cm" svg:height="3.62cm" svg:x="14.335cm" svg:y="4.654cm">
            <text:p text:style-name="P3"><text:span text:style-name="T30"/></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492;p72" draw:style-name="gr14" draw:text-style-name="P7" draw:layer="layout" svg:width="12.374cm" svg:height="1.525cm" svg:x="1.037cm" svg:y="3.646cm">
          <text:p text:style-name="P3"><text:span text:style-name="T9">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72" draw:style-name="gr14" draw:text-style-name="P7" draw:layer="layout" svg:width="12.374cm" svg:height="1.525cm" svg:x="19.401cm" svg:y="10.074cm">
          <text:p text:style-name="P3"><text:span text:style-name="T10">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72" draw:style-name="gr14" draw:text-style-name="P7" draw:layer="layout" svg:width="12.374cm" svg:height="1.525cm" svg:x="19.401cm" svg:y="3.64cm">
          <text:p text:style-name="P3"><text:span text:style-name="T11">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72" draw:style-name="gr14" draw:text-style-name="P7" draw:layer="layout" svg:width="12.374cm" svg:height="2.541cm" svg:x="1.037cm" svg:y="10.074cm">
          <text:p text:style-name="P3"><text:span text:style-name="T12">Project</text:span></text:p>
          <text:p text:style-name="P3"><text:span text:style-name="T12">&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72" draw:style-name="gr11" draw:text-style-name="P7" draw:layer="layout" svg:width="20.997cm" svg:height="0.719cm" svg:x="0.173cm" svg:y="13.455cm">
          <text:p text:style-name="P3"><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72" draw:style-name="gr18" draw:text-style-name="P18" draw:layer="layout" svg:width="25.16cm" svg:height="13.687cm" svg:x="0.308cm" svg:y="0cm">
          <text:p text:style-name="P3"><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8;p72" presentation:style-name="pr5" draw:text-style-name="P10" draw:layer="layout" svg:width="23.667cm" svg:height="1.59cm" svg:x="0.866cm" svg:y="1.236cm" presentation:class="title" presentation:user-transformed="true">
          <draw:text-box>
            <text:p text:style-name="P3"><text:span text:style-name="T6">Data Management plan?</text:span></text:p>
          </draw:text-box>
        </draw:frame>
        <draw:g draw:name="Google Shape;499;p72">
          <draw:custom-shape draw:name="Google Shape;500;p72" draw:style-name="gr9" draw:text-style-name="P16" draw:layer="layout" svg:width="0.117cm" svg:height="0.117cm" svg:x="13.976cm" svg:y="4.769cm">
            <text:p text:style-name="P3"><text:span text:style-name="T30"/></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501;p72" draw:style-name="gr9" draw:text-style-name="P16" draw:layer="layout" svg:width="0.104cm" svg:height="0.067cm" svg:x="14.36cm" svg:y="4.94cm">
            <text:p text:style-name="P3"><text:span text:style-name="T30"/></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502;p72" draw:style-name="gr9" draw:text-style-name="P16" draw:layer="layout" svg:width="3.099cm" svg:height="2.786cm" svg:x="12.777cm" svg:y="3.016cm">
            <text:p text:style-name="P3"><text:span text:style-name="T30"/></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presentation:notes draw:style-name="dp2">
          <draw:page-thumbnail draw:name="Google Shape;453;g3414daac41a_0_2574:notes" draw:style-name="gr3" draw:layer="layout" svg:width="16.932cm" svg:height="9.524cm" svg:x="1.059cm" svg:y="1.905cm" draw:page-number="5" presentation:class="page"/>
          <draw:frame draw:name="Google Shape;454;g3414daac41a_0_2574:notes" presentation:style-name="pr9" draw:text-style-name="P9" draw:layer="layout" svg:width="15.239cm" svg:height="11.429cm" svg:x="1.905cm" svg:y="12.065cm" presentation:class="notes" presentation:placeholder="true" presentation:user-transformed="true">
            <draw:text-box/>
          </draw:frame>
        </presentation:notes>
      </draw:page>
      <draw:page draw:name="Data Management plan?" draw:style-name="dp1" draw:master-page-name="TITLE_5f_AND_5f_BODY" presentation:presentation-page-layout-name="AL1T1">
        <draw:custom-shape draw:name="Google Shape;507;p73" draw:style-name="gr13" draw:text-style-name="P7" draw:layer="layout" svg:width="11.477cm" svg:height="11.477cm" draw:transform="rotate (1.5707963267949) translate (6.94cm 12.883cm)">
          <text:p text:style-name="P3"><text:span text:style-name="T30"/></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08;p73" draw:style-name="gr15" draw:text-style-name="P7" draw:layer="layout" svg:width="10.171cm" svg:height="10.171cm" draw:transform="rotate (1.5707963267949) translate (7.617cm 12.23cm)">
          <text:p text:style-name="P3"/>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09;p73" draw:style-name="gr16" draw:text-style-name="P7" draw:layer="layout" svg:width="8.938cm" svg:height="8.938cm" draw:transform="rotate (1.5707963267949) translate (8.233cm 11.613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10;p73" draw:style-name="gr12" draw:text-style-name="P7" draw:layer="layout" svg:width="12.803cm" svg:height="12.803cm" draw:transform="rotate (1.5707963267949) translate (6.298cm 13.455cm)">
          <text:p text:style-name="P3"/>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name="Google Shape;511;p73">
          <draw:custom-shape draw:name="Google Shape;512;p73" draw:style-name="gr4" draw:text-style-name="P11" draw:layer="layout" svg:width="0.107cm" svg:height="0.067cm" svg:x="10.215cm" svg:y="6.502cm">
            <text:p text:style-name="P3"><text:span text:style-name="T30"/></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513;p73" draw:style-name="gr4" draw:text-style-name="P11" draw:layer="layout" svg:width="2.478cm" svg:height="3.33cm" svg:x="8.577cm" svg:y="4.635cm">
            <text:p text:style-name="P3"><text:span text:style-name="T30"/></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514;p73" draw:style-name="gr4" draw:text-style-name="P11" draw:layer="layout" svg:width="0.099cm" svg:height="0.067cm" svg:x="9.795cm" svg:y="6.589cm">
            <text:p text:style-name="P3"><text:span text:style-name="T30"/></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515;p73">
          <draw:custom-shape draw:name="Google Shape;516;p73" draw:style-name="gr5" draw:text-style-name="P12" draw:layer="layout" svg:width="0.117cm" svg:height="0.107cm" svg:x="11.235cm" svg:y="4.501cm">
            <text:p text:style-name="P3"><text:span text:style-name="T30"/></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517;p73" draw:style-name="gr5" draw:text-style-name="P12" draw:layer="layout" svg:width="3.612cm" svg:height="2.799cm" svg:x="9.537cm" svg:y="3.016cm">
            <text:p text:style-name="P3"><text:span text:style-name="T30"/></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518;p73" draw:style-name="gr5" draw:text-style-name="P12" draw:layer="layout" svg:width="0.107cm" svg:height="0.065cm" svg:x="12.219cm" svg:y="4.588cm">
            <text:p text:style-name="P3"><text:span text:style-name="T30"/></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519;p73" draw:style-name="gr5" draw:text-style-name="P12" draw:layer="layout" svg:width="0.107cm" svg:height="0.065cm" svg:x="11.496cm" svg:y="4.588cm">
            <text:p text:style-name="P3"><text:span text:style-name="T30"/></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520;p73">
          <draw:custom-shape draw:name="Google Shape;521;p73" draw:style-name="gr6" draw:text-style-name="P13" draw:layer="layout" svg:width="0.117cm" svg:height="0.117cm" svg:x="9.392cm" svg:y="8.903cm">
            <text:p text:style-name="P3"><text:span text:style-name="T30"/></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522;p73" draw:style-name="gr6" draw:text-style-name="P13" draw:layer="layout" svg:width="0.109cm" svg:height="0.062cm" svg:x="9.816cm" svg:y="8.992cm">
            <text:p text:style-name="P3"><text:span text:style-name="T30"/></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523;p73" draw:style-name="gr6" draw:text-style-name="P13" draw:layer="layout" svg:width="0.107cm" svg:height="0.062cm" svg:x="10.284cm" svg:y="8.992cm">
            <text:p text:style-name="P3"><text:span text:style-name="T30"/></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524;p73" draw:style-name="gr6" draw:text-style-name="P13" draw:layer="layout" svg:width="3.049cm" svg:height="3.422cm" svg:x="8.704cm" svg:y="7.388cm">
            <text:p text:style-name="P3"><text:span text:style-name="T30"/></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525;p73" draw:style-name="gr6" draw:text-style-name="P13" draw:layer="layout" svg:width="0.107cm" svg:height="0.07cm" svg:x="10.941cm" svg:y="8.987cm">
            <text:p text:style-name="P3"><text:span text:style-name="T30"/></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526;p73">
          <draw:custom-shape draw:name="Google Shape;527;p73" draw:style-name="gr7" draw:text-style-name="P14" draw:layer="layout" svg:width="0.107cm" svg:height="0.065cm" svg:x="13.044cm" svg:y="10.533cm">
            <text:p text:style-name="P3"><text:span text:style-name="T30"/></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528;p73" draw:style-name="gr7" draw:text-style-name="P14" draw:layer="layout" svg:width="0.102cm" svg:height="0.067cm" svg:x="12.208cm" svg:y="10.617cm">
            <text:p text:style-name="P3"><text:span text:style-name="T30"/></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529;p73" draw:style-name="gr7" draw:text-style-name="P14" draw:layer="layout" svg:width="3.443cm" svg:height="2.265cm" svg:x="10.957cm" svg:y="9.005cm">
            <text:p text:style-name="P3"><text:span text:style-name="T30"/></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530;p73" draw:style-name="gr7" draw:text-style-name="P14" draw:layer="layout" svg:width="0.099cm" svg:height="0.141cm" svg:x="11.696cm" svg:y="10.446cm">
            <text:p text:style-name="P3"><text:span text:style-name="T30"/></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531;p73">
          <draw:custom-shape draw:name="Google Shape;532;p73" draw:style-name="gr8" draw:text-style-name="P15" draw:layer="layout" svg:width="0.131cm" svg:height="0.133cm" svg:x="14.58cm" svg:y="8.871cm">
            <text:p text:style-name="P3"><text:span text:style-name="T30"/></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533;p73" draw:style-name="gr8" draw:text-style-name="P15" draw:layer="layout" svg:width="0.117cm" svg:height="0.117cm" svg:x="14.096cm" svg:y="9.599cm">
            <text:p text:style-name="P3"><text:span text:style-name="T30"/></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534;p73" draw:style-name="gr8" draw:text-style-name="P15" draw:layer="layout" svg:width="0.131cm" svg:height="0.133cm" svg:x="14.759cm" svg:y="8.871cm">
            <text:p text:style-name="P3"><text:span text:style-name="T30"/></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535;p73" draw:style-name="gr8" draw:text-style-name="P15" draw:layer="layout" svg:width="0.123cm" svg:height="0.154cm" svg:x="14.514cm" svg:y="9.689cm">
            <text:p text:style-name="P3"><text:span text:style-name="T30"/></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536;p73" draw:style-name="gr8" draw:text-style-name="P15" draw:layer="layout" svg:width="0.107cm" svg:height="0.067cm" svg:x="14.987cm" svg:y="9.683cm">
            <text:p text:style-name="P3"><text:span text:style-name="T30"/></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537;p73" draw:style-name="gr8" draw:text-style-name="P15" draw:layer="layout" svg:width="0.133cm" svg:height="0.128cm" svg:x="14.943cm" svg:y="8.871cm">
            <text:p text:style-name="P3"><text:span text:style-name="T30"/></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538;p73" draw:style-name="gr8" draw:text-style-name="P15" draw:layer="layout" svg:width="3.065cm" svg:height="3.152cm" svg:x="13.599cm" svg:y="7.675cm">
            <text:p text:style-name="P3"><text:span text:style-name="T30"/></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539;p73">
          <draw:custom-shape draw:name="Google Shape;540;p73" draw:style-name="gr10" draw:text-style-name="P17" draw:layer="layout" svg:width="0.107cm" svg:height="0.067cm" svg:x="15.965cm" svg:y="7.07cm">
            <text:p text:style-name="P3"><text:span text:style-name="T30"/></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541;p73" draw:style-name="gr10" draw:text-style-name="P17" draw:layer="layout" svg:width="0.125cm" svg:height="0.157cm" svg:x="15.44cm" svg:y="7.073cm">
            <text:p text:style-name="P3"><text:span text:style-name="T30"/></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542;p73" draw:style-name="gr10" draw:text-style-name="P17" draw:layer="layout" svg:width="2.486cm" svg:height="3.62cm" svg:x="14.335cm" svg:y="4.654cm">
            <text:p text:style-name="P3"><text:span text:style-name="T30"/></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543;p73" draw:style-name="gr14" draw:text-style-name="P7" draw:layer="layout" svg:width="12.374cm" svg:height="1.525cm" svg:x="19.401cm" svg:y="3.64cm">
          <text:p text:style-name="P3"><text:span text:style-name="T11">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73" draw:style-name="gr14" draw:text-style-name="P7" draw:layer="layout" svg:width="12.374cm" svg:height="2.541cm" svg:x="1.037cm" svg:y="10.074cm">
          <text:p text:style-name="P3"><text:span text:style-name="T12">Project</text:span></text:p>
          <text:p text:style-name="P3"><text:span text:style-name="T12">&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73" draw:style-name="gr11" draw:text-style-name="P7" draw:layer="layout" svg:width="20.997cm" svg:height="0.719cm" svg:x="0.173cm" svg:y="13.455cm">
          <text:p text:style-name="P3"><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73" draw:style-name="gr18" draw:text-style-name="P18" draw:layer="layout" svg:width="25.16cm" svg:height="13.687cm" svg:x="-0.085cm" svg:y="0cm">
          <text:p text:style-name="P3"><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7;p73" presentation:style-name="pr5" draw:text-style-name="P10" draw:layer="layout" svg:width="23.667cm" svg:height="1.59cm" svg:x="0.866cm" svg:y="1.236cm" presentation:class="title" presentation:user-transformed="true">
          <draw:text-box>
            <text:p text:style-name="P3"><text:span text:style-name="T6">Data Management plan?</text:span></text:p>
          </draw:text-box>
        </draw:frame>
        <draw:g draw:name="Google Shape;548;p73">
          <draw:custom-shape draw:name="Google Shape;549;p73" draw:style-name="gr9" draw:text-style-name="P16" draw:layer="layout" svg:width="0.117cm" svg:height="0.117cm" svg:x="13.976cm" svg:y="4.769cm">
            <text:p text:style-name="P3"><text:span text:style-name="T30"/></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550;p73" draw:style-name="gr9" draw:text-style-name="P16" draw:layer="layout" svg:width="0.104cm" svg:height="0.067cm" svg:x="14.36cm" svg:y="4.94cm">
            <text:p text:style-name="P3"><text:span text:style-name="T30"/></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551;p73" draw:style-name="gr9" draw:text-style-name="P16" draw:layer="layout" svg:width="3.099cm" svg:height="2.786cm" svg:x="12.777cm" svg:y="3.016cm">
            <text:p text:style-name="P3"><text:span text:style-name="T30"/></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custom-shape draw:name="Google Shape;552;p73" draw:style-name="gr14" draw:text-style-name="P7" draw:layer="layout" svg:width="12.374cm" svg:height="1.525cm" svg:x="1.037cm" svg:y="3.646cm">
          <text:p text:style-name="P3"><text:span text:style-name="T9">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73" draw:style-name="gr14" draw:text-style-name="P7" draw:layer="layout" svg:width="12.374cm" svg:height="1.525cm" svg:x="19.401cm" svg:y="10.074cm">
          <text:p text:style-name="P3"><text:span text:style-name="T10">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73" draw:style-name="gr19" draw:text-style-name="P19" xml:id="id17" draw:id="id17" draw:layer="layout" svg:width="2.289cm" svg:height="1.779cm" svg:x="23.11cm" svg:y="11.006cm">
          <text:p text:style-name="P3"><text:span text:style-name="T30"/></text:p>
          <draw:enhanced-geometry draw:mirror-horizontal="false" draw:mirror-vertical="false" drawooo:sub-view-size="6928 5386" draw:text-areas="0 0 ?f0 ?f1" svg:viewBox="0 0 0 0" draw:type="ooxml-non-primitive" draw:enhanced-path="M 6801 738 L 6859 816 6898 884 6917 971 6927 1048 6917 1146 6898 1223 6859 1301 6801 1359 3570 4648 2959 5259 2901 5317 2823 5356 2746 5375 2658 5385 2571 5375 2493 5356 2426 5317 2358 5259 1746 4648 126 2998 78 2940 39 2863 10 2785 0 2688 10 2610 39 2523 78 2455 126 2387 738 1766 796 1708 873 1669 951 1650 1038 1640 1126 1650 1203 1669 1271 1708 1339 1766 2658 3105 5588 127 5656 69 5734 30 5802 1 5899 1 5976 1 6064 30 6132 69 6199 127 6801 738 Z N">
            <draw:equation draw:name="f0" draw:formula="logwidth"/>
            <draw:equation draw:name="f1" draw:formula="logheight"/>
          </draw:enhanced-geometry>
        </draw:custom-shape>
        <draw:custom-shape draw:name="Google Shape;555;p73" draw:style-name="gr19" draw:text-style-name="P19" xml:id="id16" draw:id="id16" draw:layer="layout" svg:width="2.289cm" svg:height="1.779cm" svg:x="0.759cm" svg:y="5.077cm">
          <text:p text:style-name="P3"><text:span text:style-name="T30"/></text:p>
          <draw:enhanced-geometry draw:mirror-horizontal="false" draw:mirror-vertical="false" drawooo:sub-view-size="6928 5386" draw:text-areas="0 0 ?f0 ?f1" svg:viewBox="0 0 0 0" draw:type="ooxml-non-primitive" draw:enhanced-path="M 6801 738 L 6859 816 6898 884 6917 971 6927 1048 6917 1146 6898 1223 6859 1301 6801 1359 3570 4648 2959 5259 2901 5317 2823 5356 2746 5375 2658 5385 2571 5375 2493 5356 2426 5317 2358 5259 1746 4648 126 2998 78 2940 39 2863 10 2785 0 2688 10 2610 39 2523 78 2455 126 2387 738 1766 796 1708 873 1669 951 1650 1038 1640 1126 1650 1203 1669 1271 1708 1339 1766 2658 3105 5588 127 5656 69 5734 30 5802 1 5899 1 5976 1 6064 30 6132 69 6199 127 6801 738 Z N">
            <draw:equation draw:name="f0" draw:formula="logwidth"/>
            <draw:equation draw:name="f1" draw:formula="logheight"/>
          </draw:enhanced-geometry>
        </draw:custom-shape>
        <draw:custom-shape draw:name="Google Shape;556;p73" draw:style-name="gr19" draw:text-style-name="P19" draw:layer="layout" svg:width="4.656cm" svg:height="3.619cm" svg:x="10.715cm" svg:y="6.331cm">
          <text:p text:style-name="P3"><text:span text:style-name="T30"/></text:p>
          <draw:enhanced-geometry draw:mirror-horizontal="false" draw:mirror-vertical="false" drawooo:sub-view-size="6928 5386" draw:text-areas="0 0 ?f0 ?f1" svg:viewBox="0 0 0 0" draw:type="ooxml-non-primitive" draw:enhanced-path="M 6801 738 L 6859 816 6898 884 6917 971 6927 1048 6917 1146 6898 1223 6859 1301 6801 1359 3570 4648 2959 5259 2901 5317 2823 5356 2746 5375 2658 5385 2571 5375 2493 5356 2426 5317 2358 5259 1746 4648 126 2998 78 2940 39 2863 10 2785 0 2688 10 2610 39 2523 78 2455 126 2387 738 1766 796 1708 873 1669 951 1650 1038 1640 1126 1650 1203 1669 1271 1708 1339 1766 2658 3105 5588 127 5656 69 5734 30 5802 1 5899 1 5976 1 6064 30 6132 69 6199 127 6801 738 Z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0.001s" smil:targetElement="id17" smil:type="fade" smil:subtype="crossfade"/>
                </anim:par>
              </anim:par>
            </anim:par>
          </anim:seq>
        </anim:par>
        <presentation:notes draw:style-name="dp2">
          <draw:page-thumbnail draw:name="Google Shape;504;g3414daac41a_0_2624:notes" draw:style-name="gr3" draw:layer="layout" svg:width="16.932cm" svg:height="9.524cm" svg:x="1.059cm" svg:y="1.905cm" draw:page-number="6" presentation:class="page"/>
          <draw:frame draw:name="Google Shape;505;g3414daac41a_0_2624:notes" presentation:style-name="pr10" draw:text-style-name="P9"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2T19">
        <draw:custom-shape draw:name="Google Shape;561;p74" draw:style-name="gr20" draw:text-style-name="P7" draw:layer="layout" svg:width="23.666cm" svg:height="1.589cm" svg:x="0.866cm" svg:y="1.236cm">
          <text:p text:style-name="P20"><text:span text:style-name="T14">“</text:span><text:span text:style-name="T14">National Strategy on access to and sharing of 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2;p74" draw:style-name="gr21" draw:text-style-name="P8" draw:layer="layout" svg:width="7.492cm" svg:height="10.612cm" svg:x="0.423cm" svg:y="3.25cm">
          <draw:image xlink:href="Pictures/100002010000024A0000033EBD0E4519AC7C845B.png" xlink:type="simple" xlink:show="embed" xlink:actuate="onLoad">
            <text:p/>
          </draw:image>
        </draw:frame>
        <draw:custom-shape draw:name="Google Shape;563;p74" draw:style-name="gr22" draw:text-style-name="P7" draw:layer="layout" svg:width="17.033cm" svg:height="4.819cm" svg:x="8.158cm" svg:y="8.054cm">
          <text:p xml:id="id18" text:id="id18" text:style-name="P3"><text:span text:style-name="T15">Basic principles:</text:span></text:p>
          <text:p xml:id="id19" text:id="id19" text:style-name="P3"><text:span text:style-name="T15"/></text:p>
          <text:list text:style-name="L6">
            <text:list-item>
              <text:p xml:id="id20" text:id="id20" text:style-name="P3"><text:span text:style-name="T16">Research data must be as open as possible, as closed as necessary.</text:span></text:p>
            </text:list-item>
            <text:list-item>
              <text:p xml:id="id21" text:id="id21" text:style-name="P3"><text:span text:style-name="T16">Research data should be managed and curated to take full advantage of their potential. </text:span></text:p>
            </text:list-item>
            <text:list-item>
              <text:p xml:id="id22" text:id="id22" text:style-name="P3"><text:span text:style-name="T16">Decisions concerning archiving and management of ­research data must be taken within the research community. </text:span></text:p>
            </text:list-item>
          </text:list>
          <text:p xml:id="id23" text:id="id23" text:style-name="P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74" draw:style-name="gr23" draw:text-style-name="P7" draw:layer="layout" svg:width="16.396cm" svg:height="0.549cm" svg:x="8.914cm" svg:y="13.595cm">
          <text:p text:style-name="P3"><text:span text:style-name="T60"><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74" draw:style-name="gr24" draw:text-style-name="P7" draw:layer="layout" svg:width="15.75cm" svg:height="3.043cm" svg:x="8.818cm" svg:y="3.517cm">
          <text:p text:style-name="P3"><text:span text:style-name="T17">Publicly funded research data</text:span><text:span text:style-name="T18"> refers to:</text:span></text:p>
          <text:p text:style-name="P3"><text:span text:style-name="T18">(i) </text:span><text:span text:style-name="T19">data collected or generated</text:span><text:span text:style-name="T18"> for use for or as a result of publicly funded ­research, and</text:span></text:p>
          <text:p text:style-name="P3"><text:span text:style-name="T18"><text:s/></text:span></text:p>
          <text:p text:style-name="P3"><text:span text:style-name="T18">(ii) </text:span><text:span text:style-name="T19">data underpinning publications</text:span><text:span text:style-name="T18"> that are the result of publicly funded ­research, regardless of the source of th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74" draw:style-name="gr23" draw:text-style-name="P7" draw:layer="layout" svg:width="3.221cm" svg:height="0.73cm" svg:x="22.145cm" svg:y="2.223cm">
          <text:p text:style-name="P3"><text:span text:style-name="T20">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7;p74" draw:style-name="gr2" draw:text-style-name="P8" draw:layer="layout" svg:width="1.458cm" svg:height="1.589cm" svg:x="23.619cm" svg:y="0.184cm">
          <draw:image xlink:href="Pictures/10000201000000640000006D4F43EAC208643CD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name="Google Shape;558;g3414daac41a_0_1306:notes" draw:style-name="gr3" draw:layer="layout" svg:width="16.931cm" svg:height="9.523cm" svg:x="1.059cm" svg:y="1.905cm" draw:page-number="7" presentation:class="page"/>
          <draw:frame draw:name="Google Shape;559;g3414daac41a_0_1306:notes" presentation:style-name="pr11" draw:text-style-name="P21" draw:layer="layout" svg:width="15.238cm" svg:height="11.428cm" svg:x="1.905cm" svg:y="12.065cm" presentation:class="notes" presentation:user-transformed="true">
            <draw:text-box>
              <text:p text:style-name="P3"><text:span text:style-name="T21">The strategy focus on three basic principles:</text:span></text:p>
            </draw:text-box>
          </draw:frame>
        </presentation:notes>
      </draw:page>
      <draw:page draw:name="page8" draw:style-name="dp1" draw:master-page-name="BLANK">
        <draw:custom-shape draw:name="Google Shape;572;p75" draw:style-name="gr25" draw:text-style-name="P7" draw:layer="layout" svg:width="22.857cm" svg:height="2.383cm" svg:x="1.079cm" svg:y="0.958cm">
          <text:p text:style-name="P20"><text:span text:style-name="T22">The Research Council of Norway’s Policy for Open Access to Research Data</text:span><text:span text:style-name="T22"><text:line-break/></text:span><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75" draw:style-name="gr26" draw:text-style-name="P7" draw:layer="layout" svg:width="14.896cm" svg:height="8.284cm" svg:x="9.231cm" svg:y="3.343cm">
          <text:p text:style-name="P20"><text:span text:style-name="T15"/></text:p>
          <text:p text:style-name="P22"><text:span text:style-name="T15">“… </text:span><text:span text:style-name="T15">requiring that R&amp;D-performing institutions or companies should assess whether projects receiving funding from the Research Council must develop a </text:span><text:span text:style-name="T23">data management plan</text:span><text:span text:style-name="T15">.”</text:span></text:p>
          <text:p text:style-name="P22"><text:span text:style-name="T15"/></text:p>
          <text:p text:style-name="P22"><text:span text:style-name="T15">“</text:span><text:span text:style-name="T15">The </text:span><text:span text:style-name="T23">FAIR Guiding Principles</text:span><text:span text:style-name="T15"> for scientific data management and stewardship are included as a main principle in the Research Council’s policy”</text:span></text:p>
          <text:p text:style-name="P22"><text:span text:style-name="T15"/></text:p>
          <text:p text:style-name="P22"><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4;p75" draw:style-name="gr2" draw:text-style-name="P8" draw:layer="layout" svg:width="7.767cm" svg:height="10.973cm" svg:x="0.479cm" svg:y="2.954cm">
          <draw:image xlink:href="Pictures/10000201000002590000035130EB28235CFCBEB5.png" xlink:type="simple" xlink:show="embed" xlink:actuate="onLoad">
            <text:p/>
          </draw:image>
        </draw:frame>
        <draw:custom-shape draw:name="Google Shape;575;p75" draw:style-name="gr1" draw:text-style-name="P7" draw:layer="layout" svg:width="22.073cm" svg:height="0.76cm" svg:x="3.033cm" svg:y="13.367cm">
          <text:p text:style-name="P3"><text:span text:style-name="T24"><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75" draw:style-name="gr23" draw:text-style-name="P7" draw:layer="layout" svg:width="8.111cm" svg:height="0.73cm" svg:x="17.466cm" svg:y="2.223cm">
          <text:p text:style-name="P3"><text:span text:style-name="T20">Original 2014, updated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7;p75" draw:style-name="gr2" draw:text-style-name="P8" draw:layer="layout" svg:width="3.202cm" svg:height="3.202cm" svg:x="22.66cm" svg:y="-0.728cm">
          <draw:image xlink:href="Pictures/10000201000004B0000004B0F8DB1F3763AE048A.png" xlink:type="simple" xlink:show="embed" xlink:actuate="onLoad">
            <text:p/>
          </draw:image>
        </draw:frame>
        <presentation:notes draw:style-name="dp2">
          <draw:page-thumbnail draw:name="Google Shape;569;g3414daac41a_0_1316:notes" draw:style-name="gr3" draw:layer="layout" svg:width="16.931cm" svg:height="9.523cm" svg:x="1.059cm" svg:y="1.905cm" draw:page-number="8" presentation:class="page"/>
          <draw:frame draw:name="Google Shape;570;g3414daac41a_0_1316:notes" presentation:style-name="pr12" draw:text-style-name="P21" draw:layer="layout" svg:width="15.238cm" svg:height="11.428cm" svg:x="1.905cm" svg:y="12.065cm" presentation:class="notes" presentation:user-transformed="true">
            <draw:text-box>
              <text:p text:style-name="P3"><text:span text:style-name="T21">following the new national strategy in 2017, RCN also updated their policy for open access.</text:span></text:p>
              <text:p text:style-name="P3"><text:span text:style-name="T21"/></text:p>
              <text:p text:style-name="P3"><text:span text:style-name="T21">Most were as before, but they also included that:</text:span></text:p>
              <text:p text:style-name="P3"><text:span text:style-name="T21"/></text:p>
              <text:p text:style-name="P3"><text:span text:style-name="T21">We will come back to this in a bit.</text:span></text:p>
            </draw:text-box>
          </draw:frame>
        </presentation:notes>
      </draw:page>
      <draw:page draw:name="page9" draw:style-name="dp1" draw:master-page-name="BLANK">
        <draw:custom-shape draw:name="Google Shape;582;p76" draw:style-name="gr27" draw:text-style-name="P7" draw:layer="layout" svg:width="0.505cm" svg:height="0.074cm" svg:x="3.49cm" svg:y="13.614cm">
          <text:p text:style-name="P3"><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76" draw:style-name="gr1" draw:text-style-name="P7" draw:layer="layout" svg:width="22.073cm" svg:height="0.76cm" svg:x="0cm" svg:y="12.943cm">
          <text:p text:style-name="P3"><text:span text:style-name="T24"><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76" draw:style-name="gr1" draw:text-style-name="P7" draw:layer="layout" svg:width="6.247cm" svg:height="1.3cm" svg:x="0.136cm" svg:y="1.639cm">
          <text:p text:style-name="P3"><text:span text:style-name="T26">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5;p76" xml:id="id37" draw:id="id37">
          <draw:custom-shape draw:name="Google Shape;586;p76" draw:style-name="gr28" draw:text-style-name="P23" draw:layer="layout" svg:width="0.604cm" svg:height="0.778cm" svg:x="3.23cm" svg:y="11.25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587;p76" draw:style-name="gr28" draw:text-style-name="P23" draw:layer="layout" svg:width="0.097cm" svg:height="0.097cm" svg:x="3.529cm" svg:y="11.768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588;p76" draw:style-name="gr28" draw:text-style-name="P23" draw:layer="layout" svg:width="0.118cm" svg:height="0.118cm" svg:x="3.866cm" svg:y="11.409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589;p76" draw:style-name="gr28" draw:text-style-name="P23" draw:layer="layout" svg:width="0.358cm" svg:height="0.357cm" svg:x="3.572cm" svg:y="11.465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name="Google Shape;590;p76" xml:id="id27" draw:id="id27">
          <draw:custom-shape draw:name="Google Shape;591;p76" draw:style-name="gr28" draw:text-style-name="P23" draw:layer="layout" svg:width="0.757cm" svg:height="0.812cm" svg:x="2.971cm" svg:y="4.475cm">
            <text:p text:style-name="P3"><text:span text:style-name="T30"/></text:p>
            <draw:enhanced-geometry draw:mirror-horizontal="false" draw:mirror-vertical="false" drawooo:sub-view-size="113752 122140" draw:text-areas="0 0 ?f0 ?f1" svg:viewBox="0 0 0 0"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592;p76" draw:style-name="gr28" draw:text-style-name="P23" draw:layer="layout" svg:width="0.754cm" svg:height="0.812cm" svg:x="3.496cm" svg:y="4.594cm">
            <text:p text:style-name="P3"><text:span text:style-name="T30"/></text:p>
            <draw:enhanced-geometry draw:mirror-horizontal="false" draw:mirror-vertical="false" drawooo:sub-view-size="113416 122140" draw:text-areas="0 0 ?f0 ?f1" svg:viewBox="0 0 0 0"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593;p76" xml:id="id33" draw:id="id33">
          <draw:custom-shape draw:name="Google Shape;594;p76" draw:style-name="gr28" draw:text-style-name="P23" draw:layer="layout" svg:width="0.757cm" svg:height="0.812cm" svg:x="2.971cm" svg:y="8.618cm">
            <text:p text:style-name="P3"><text:span text:style-name="T30"/></text:p>
            <draw:enhanced-geometry draw:mirror-horizontal="false" draw:mirror-vertical="false" drawooo:sub-view-size="113752 122140" draw:text-areas="0 0 ?f0 ?f1" svg:viewBox="0 0 0 0"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595;p76" draw:style-name="gr28" draw:text-style-name="P23" draw:layer="layout" svg:width="0.754cm" svg:height="0.812cm" svg:x="3.496cm" svg:y="8.736cm">
            <text:p text:style-name="P3"><text:span text:style-name="T30"/></text:p>
            <draw:enhanced-geometry draw:mirror-horizontal="false" draw:mirror-vertical="false" drawooo:sub-view-size="113416 122140" draw:text-areas="0 0 ?f0 ?f1" svg:viewBox="0 0 0 0"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596;p76" xml:id="id35" draw:id="id35">
          <draw:custom-shape draw:name="Google Shape;597;p76" draw:style-name="gr28" draw:text-style-name="P23" draw:layer="layout" svg:width="0.757cm" svg:height="0.812cm" svg:x="2.971cm" svg:y="9.828cm">
            <text:p text:style-name="P3"><text:span text:style-name="T30"/></text:p>
            <draw:enhanced-geometry draw:mirror-horizontal="false" draw:mirror-vertical="false" drawooo:sub-view-size="113752 122140" draw:text-areas="0 0 ?f0 ?f1" svg:viewBox="0 0 0 0"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598;p76" draw:style-name="gr28" draw:text-style-name="P23" draw:layer="layout" svg:width="0.754cm" svg:height="0.812cm" svg:x="3.496cm" svg:y="9.947cm">
            <text:p text:style-name="P3"><text:span text:style-name="T30"/></text:p>
            <draw:enhanced-geometry draw:mirror-horizontal="false" draw:mirror-vertical="false" drawooo:sub-view-size="113416 122140" draw:text-areas="0 0 ?f0 ?f1" svg:viewBox="0 0 0 0"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599;p76" xml:id="id25" draw:id="id25">
          <draw:custom-shape draw:name="Google Shape;600;p76" draw:style-name="gr28" draw:text-style-name="P23" draw:layer="layout" svg:width="0.115cm" svg:height="0.115cm" svg:x="3.553cm" svg:y="3.595cm">
            <text:p text:style-name="P3"><text:span text:style-name="T30"/></text:p>
            <draw:enhanced-geometry draw:mirror-horizontal="false" draw:mirror-vertical="false" drawooo:sub-view-size="20977 20977" draw:text-areas="0 0 ?f0 ?f1" svg:viewBox="0 0 0 0"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601;p76" draw:style-name="gr28" draw:text-style-name="P23" draw:layer="layout" svg:width="0.203cm" svg:height="0.159cm" svg:x="3.697cm" svg:y="3.898cm">
            <text:p text:style-name="P3"><text:span text:style-name="T30"/></text:p>
            <draw:enhanced-geometry draw:mirror-horizontal="false" draw:mirror-vertical="false" drawooo:sub-view-size="36918 28948" draw:text-areas="0 0 ?f0 ?f1" svg:viewBox="0 0 0 0"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602;p76" draw:style-name="gr28" draw:text-style-name="P23" draw:layer="layout" svg:width="0.924cm" svg:height="1.156cm" svg:x="3.148cm" svg:y="3.075cm">
            <text:p text:style-name="P3"><text:span text:style-name="T30"/></text:p>
            <draw:enhanced-geometry draw:mirror-horizontal="false" draw:mirror-vertical="false" drawooo:sub-view-size="167808 209760" draw:text-areas="0 0 ?f0 ?f1" svg:viewBox="0 0 0 0"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g draw:name="Google Shape;603;p76" xml:id="id31" draw:id="id31">
          <draw:custom-shape draw:name="Google Shape;604;p76" draw:style-name="gr28" draw:text-style-name="P23" draw:layer="layout" svg:width="0.174cm" svg:height="0.174cm" svg:x="3.8cm" svg:y="7.283cm">
            <text:p text:style-name="P3"><text:span text:style-name="T30"/></text:p>
            <draw:enhanced-geometry draw:mirror-horizontal="false" draw:mirror-vertical="false" drawooo:sub-view-size="38807 38806" draw:text-areas="0 0 ?f0 ?f1" svg:viewBox="0 0 0 0" draw:type="ooxml-non-primitive" draw:enhanced-path="M 1 0 L 1 38806 38806 38806 1 0 Z N">
              <draw:equation draw:name="f0" draw:formula="logwidth"/>
              <draw:equation draw:name="f1" draw:formula="logheight"/>
            </draw:enhanced-geometry>
          </draw:custom-shape>
          <draw:custom-shape draw:name="Google Shape;605;p76" draw:style-name="gr28" draw:text-style-name="P23" draw:layer="layout" svg:width="0.755cm" svg:height="0.944cm" svg:x="3.233cm" svg:y="7.268cm">
            <text:p text:style-name="P3"><text:span text:style-name="T30"/></text:p>
            <draw:enhanced-geometry draw:mirror-horizontal="false" draw:mirror-vertical="false" drawooo:sub-view-size="167808 209760" draw:text-areas="0 0 ?f0 ?f1" svg:viewBox="0 0 0 0" draw:type="ooxml-non-primitive" draw:enhanced-path="M 111802 94602 L 113900 95860 134875 116836 136134 118514 136134 122709 134875 124388 113900 145364 111802 146622 108026 146412 105299 143685 105090 139910 106348 137812 123758 120612 106348 103412 105090 101314 105299 97538 108026 94811 111802 94602 Z M 56006 94602 L 59782 94811 62508 97538 62718 101314 61460 103412 44050 120612 61460 137812 62928 139910 62718 143685 59782 146622 56006 146832 53908 145364 32932 124388 31674 122709 31674 118514 32932 116836 53908 95860 56006 94602 Z M 87889 73416 L 91665 73835 94392 76982 94392 79289 83904 163193 83484 165081 80548 167598 78660 167808 78031 167808 75933 167179 73416 164032 73416 161935 83904 78031 84533 75723 87889 73416 Z M 5244 0 L 3146 210 210 3146 0 5244 0 204516 210 206613 3146 209550 5244 209760 162564 209760 164661 209550 167598 206613 167808 204516 167808 52440 120612 52440 118514 52230 115578 49294 115368 47196 115368 0 Z N">
              <draw:equation draw:name="f0" draw:formula="logwidth"/>
              <draw:equation draw:name="f1" draw:formula="logheight"/>
            </draw:enhanced-geometry>
          </draw:custom-shape>
        </draw:g>
        <draw:custom-shape draw:name="Google Shape;606;p76" draw:style-name="gr28" draw:text-style-name="P23" xml:id="id29" draw:id="id29" draw:layer="layout" svg:width="0.925cm" svg:height="1.043cm" svg:x="3.148cm" svg:y="5.797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custom-shape draw:name="Google Shape;607;p76" draw:style-name="gr11" draw:text-style-name="P7" draw:layer="layout" svg:width="23.627cm" svg:height="1.057cm" svg:x="-0.022cm" svg:y="13.218cm">
          <text:p text:style-name="P3"><text:span text:style-name="T27"/></text:p>
          <text:p text:style-name="P3"><text:span text:style-name="T27">Illustrative Icons from </text:span><text:span text:style-name="T28"><text:a xlink:href="https://thenounproject.com/vectorslab933/" xlink:type="simple">VectorLab</text:a></text:span><text:span text:style-name="T27">, </text:span><text:span text:style-name="T28"><text:a xlink:href="https://thenounproject.com/zulfahmiabadi/" xlink:type="simple">Zulfahmi Al Ridhawi</text:a></text:span><text:span text:style-name="T27">, </text:span><text:span text:style-name="T28"><text:a xlink:href="https://thenounproject.com/deemakdaksina/" xlink:type="simple">Deemak Daksina</text:a></text:span><text:span text:style-name="T27"><text:s/>&amp; </text:span><text:span text:style-name="T28"><text:a xlink:href="https://thenounproject.com/vectorsmarket/" xlink:type="simple">Vectorsmarket</text:a></text:span><text:span text:style-name="T27"><text:s/>at Noun Project licensed under </text:span><text:span text:style-name="T28"><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76" draw:style-name="gr14" draw:text-style-name="P7" xml:id="id24" draw:id="id24" draw:layer="layout" svg:width="14.876cm" svg:height="1.947cm" svg:x="4.251cm" svg:y="3.055cm">
          <text:p text:style-name="P3"><text:span text:style-name="T29">… </text:span><text:span text:style-name="T29">must be stored/archived in a safe and secure ma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76" draw:style-name="gr14" draw:text-style-name="P7" xml:id="id26" draw:id="id26" draw:layer="layout" svg:width="10.901cm" svg:height="1.821cm" svg:x="4.251cm" svg:y="4.353cm">
          <text:p text:style-name="P3"><text:span text:style-name="T29">… </text:span><text:span text:style-name="T29">must be made accessible for reuse. </text:span></text:p>
          <text:p text:style-name="P3"><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76" draw:style-name="gr14" draw:text-style-name="P7" xml:id="id28" draw:id="id28" draw:layer="layout" svg:width="18.536cm" svg:height="1.947cm" svg:x="4.251cm" svg:y="5.827cm">
          <text:p text:style-name="P3"><text:span text:style-name="T29">… </text:span><text:span text:style-name="T29">should be made accessible at an early stage [latest at pub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76" draw:style-name="gr14" draw:text-style-name="P7" xml:id="id30" draw:id="id30" draw:layer="layout" svg:width="15.462cm" svg:height="1.229cm" svg:x="4.251cm" svg:y="7.125cm">
          <text:p text:style-name="P3"><text:span text:style-name="T29">… </text:span><text:span text:style-name="T29">must be accompanied by standardised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76" draw:style-name="gr14" draw:text-style-name="P7" xml:id="id32" draw:id="id32" draw:layer="layout" svg:width="19.255cm" svg:height="1.947cm" svg:x="4.251cm" svg:y="8.423cm">
          <text:p text:style-name="P3"><text:span text:style-name="T29">… </text:span><text:span text:style-name="T29">must be provided with a license for access, reuse and re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76" draw:style-name="gr14" draw:text-style-name="P7" xml:id="id34" draw:id="id34" draw:layer="layout" svg:width="15.825cm" svg:height="1.229cm" svg:x="4.251cm" svg:y="9.722cm">
          <text:p text:style-name="P3"><text:span text:style-name="T29">… </text:span><text:span text:style-name="T29">should preferably be made accessible at no char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76" draw:style-name="gr14" draw:text-style-name="P7" xml:id="id36" draw:id="id36" draw:layer="layout" svg:width="15.576cm" svg:height="1.229cm" svg:x="4.251cm" svg:y="11.231cm">
          <text:p text:style-name="P3"><text:span text:style-name="T29">... must be described in a data management 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p76" draw:style-name="gr2" draw:text-style-name="P8" draw:layer="layout" svg:width="3.202cm" svg:height="3.202cm" svg:x="22.66cm" svg:y="-0.728cm">
          <draw:image xlink:href="Pictures/10000201000004B0000004B0F8DB1F3763AE048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001s" smil:targetElement="id30" smil:type="fade" smil:subtype="crossfad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001s" smil:targetElement="id32" smil:type="fade" smil:subtype="crossfad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frame draw:name="Google Shape;579;g3414daac41a_0_1325:notes" presentation:style-name="pr12" draw:text-style-name="P21" draw:layer="layout" svg:width="15.238cm" svg:height="11.428cm" svg:x="1.905cm" svg:y="12.065cm" presentation:class="notes" presentation:user-transformed="true">
            <draw:text-box>
              <text:p text:style-name="P3"><text:span text:style-name="T21">Approved by the research-performing institution, and made available if possible.</text:span></text:p>
            </draw:text-box>
          </draw:frame>
          <draw:page-thumbnail draw:name="Google Shape;580;g3414daac41a_0_1325:notes" draw:style-name="gr3" draw:layer="layout" svg:width="12.699cm" svg:height="9.523cm" svg:x="3.176cm" svg:y="1.905cm" draw:page-number="9" presentation:class="page"/>
        </presentation:notes>
      </draw:page>
      <draw:page draw:name="page10" draw:style-name="dp1" draw:master-page-name="BLANK">
        <draw:custom-shape draw:name="Google Shape;620;p77" draw:style-name="gr29" draw:text-style-name="P24" draw:layer="layout" svg:width="12.244cm" svg:height="12.041cm" svg:x="3.355cm" svg:y="0.442cm">
          <text:p text:style-name="P3"><text:span text:style-name="T5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1;p77" draw:style-name="gr30" draw:text-style-name="P25" draw:layer="layout" svg:width="12.244cm" svg:height="12.041cm" svg:x="10.55cm" svg:y="0.341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2;p77" draw:style-name="gr22" draw:text-style-name="P7" draw:layer="layout" svg:width="14.577cm" svg:height="1.672cm" svg:x="6.25cm" svg:y="12.615cm">
          <text:p text:style-name="P3"><text:span text:style-name="T31">“</text:span><text:span text:style-name="T31">As open as possible - as closed as necess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77" draw:style-name="gr22" draw:text-style-name="P7" draw:layer="layout" svg:width="4.314cm" svg:height="3.807cm" svg:x="4.678cm" svg:y="4.912cm">
          <text:p text:style-name="P3"><text:span text:style-name="T32">Open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4;p77" draw:style-name="gr2" draw:text-style-name="P8" draw:layer="layout" svg:width="10.938cm" svg:height="3.341cm" svg:x="11.199cm" svg:y="4.585cm">
          <draw:image xlink:href="Pictures/10000201000003D90000012D8232E339FEA4BE04.png" xlink:type="simple" xlink:show="embed" xlink:actuate="onLoad">
            <text:p/>
          </draw:image>
        </draw:frame>
        <presentation:notes draw:style-name="dp2">
          <draw:page-thumbnail draw:name="Google Shape;617;g3414daac41a_0_1362:notes" draw:style-name="gr3" draw:layer="layout" svg:width="16.932cm" svg:height="9.524cm" svg:x="1.059cm" svg:y="1.905cm" draw:page-number="10" presentation:class="page"/>
          <draw:frame draw:name="Google Shape;618;g3414daac41a_0_1362:notes" presentation:style-name="pr13" draw:text-style-name="P9" draw:layer="layout" svg:width="15.239cm" svg:height="11.429cm" svg:x="1.905cm" svg:y="12.065cm" presentation:class="notes" presentation:placeholder="true" presentation:user-transformed="true">
            <draw:text-box/>
          </draw:frame>
        </presentation:notes>
      </draw:page>
      <draw:page draw:name="page11" draw:style-name="dp1" draw:master-page-name="simple-light-2">
        <draw:custom-shape draw:name="Google Shape;629;p78" draw:style-name="gr31" draw:text-style-name="P8" xml:id="id38" draw:id="id38" draw:layer="layout" svg:width="3.445cm" svg:height="0.034cm" svg:x="3.824cm" svg:y="7.6cm">
          <text:p/>
          <draw:enhanced-geometry draw:mirror-horizontal="false" draw:mirror-vertical="false" svg:viewBox="0 0 21600 21600" draw:type="mso-spt32" draw:enhanced-path="M 0 0 L 21600 21600 N"/>
        </draw:custom-shape>
        <draw:custom-shape draw:name="Google Shape;630;p78" draw:style-name="gr31" draw:text-style-name="P8" xml:id="id40" draw:id="id40" draw:layer="layout" svg:width="4.146cm" svg:height="0.001cm" svg:x="10.682cm" svg:y="7.635cm">
          <text:p/>
          <draw:enhanced-geometry draw:mirror-horizontal="false" draw:mirror-vertical="false" svg:viewBox="0 0 21600 21600" draw:type="mso-spt32" draw:enhanced-path="M 0 0 L 21600 21600 N"/>
        </draw:custom-shape>
        <draw:custom-shape draw:name="Google Shape;631;p78" draw:style-name="gr31" draw:text-style-name="P8" xml:id="id42" draw:id="id42" draw:layer="layout" svg:width="3.707cm" svg:height="0.032cm" draw:transform="rotate (-3.14159265358979) translate (21.758cm 7.635cm)">
          <text:p/>
          <draw:enhanced-geometry draw:mirror-horizontal="true" draw:mirror-vertical="false" svg:viewBox="0 0 21600 21600" draw:type="mso-spt32" draw:enhanced-path="M 0 0 L 21600 21600 N"/>
        </draw:custom-shape>
        <draw:frame draw:name="Google Shape;633;p78" draw:style-name="gr2" draw:text-style-name="P8" draw:layer="layout" svg:width="15.159cm" svg:height="4.914cm" svg:x="5.739cm" svg:y="0.557cm">
          <draw:image xlink:href="Pictures/10000201000008000000029800A017C30FD5D3E2.png" xlink:type="simple" xlink:show="embed" xlink:actuate="onLoad">
            <text:p/>
          </draw:image>
        </draw:frame>
        <draw:g draw:name="Google Shape;634;p78">
          <draw:custom-shape draw:name="Google Shape;635;p78" draw:style-name="gr9" draw:text-style-name="P16" draw:layer="layout" svg:width="3.153cm" svg:height="3.153cm" svg:x="0.669cm" svg:y="6.0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36;p78">
            <draw:custom-shape draw:name="Google Shape;637;p78" draw:style-name="gr32" draw:text-style-name="P26" draw:layer="layout" svg:width="1.527cm" svg:height="1.967cm" svg:x="1.377cm" svg:y="6.633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638;p78" draw:style-name="gr32" draw:text-style-name="P26" draw:layer="layout" svg:width="0.246cm" svg:height="0.248cm" svg:x="2.133cm" svg:y="7.941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639;p78" draw:style-name="gr32" draw:text-style-name="P26" draw:layer="layout" svg:width="0.301cm" svg:height="0.301cm" svg:x="2.985cm" svg:y="7.035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640;p78" draw:style-name="gr32" draw:text-style-name="P26" draw:layer="layout" svg:width="0.906cm" svg:height="0.904cm" svg:x="2.241cm" svg:y="7.175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641;p78" xml:id="id41" draw:id="id41">
          <draw:custom-shape draw:name="Google Shape;632;p78" draw:style-name="gr33" draw:text-style-name="P27" draw:layer="layout" svg:width="3.153cm" svg:height="3.153cm" svg:x="14.897cm" svg:y="6.058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42;p78">
            <draw:custom-shape draw:name="Google Shape;643;p78" draw:style-name="gr32" draw:text-style-name="P26" draw:layer="layout" svg:width="0.235cm" svg:height="0.932cm" svg:x="16.816cm" svg:y="7.867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644;p78" draw:style-name="gr32" draw:text-style-name="P26" draw:layer="layout" svg:width="0.234cm" svg:height="0.672cm" svg:x="16.477cm" svg:y="8.127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645;p78" draw:style-name="gr32" draw:text-style-name="P26" draw:layer="layout" svg:width="0.234cm" svg:height="0.422cm" svg:x="16.136cm" svg:y="8.378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646;p78">
            <draw:custom-shape draw:name="Google Shape;647;p78" draw:style-name="gr32" draw:text-style-name="P26" draw:layer="layout" svg:width="0.638cm" svg:height="0.27cm" svg:x="15.496cm" svg:y="7.867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648;p78" draw:style-name="gr32" draw:text-style-name="P26" draw:layer="layout" svg:width="0.401cm" svg:height="0.519cm" svg:x="15.615cm" svg:y="7.307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649;p78">
            <draw:custom-shape draw:name="Google Shape;650;p78" draw:style-name="gr32" draw:text-style-name="P26" draw:layer="layout" svg:width="0.07cm" svg:height="0.071cm" svg:x="16.694cm" svg:y="6.85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651;p78" draw:style-name="gr32" draw:text-style-name="P26" draw:layer="layout" svg:width="0.07cm" svg:height="0.07cm" svg:x="16.484cm" svg:y="6.849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652;p78" draw:style-name="gr32" draw:text-style-name="P26" draw:layer="layout" svg:width="0.069cm" svg:height="0.07cm" svg:x="16.905cm" svg:y="6.849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653;p78" draw:style-name="gr32" draw:text-style-name="P26" draw:layer="layout" svg:width="0.917cm" svg:height="0.598cm" svg:x="16.278cm" svg:y="6.586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654;p78" draw:style-name="gr32" draw:text-style-name="P26" draw:layer="layout" svg:width="0.622cm" svg:height="0.188cm" svg:x="16.419cm" svg:y="7.227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655;p78" xml:id="id43" draw:id="id43">
          <draw:custom-shape draw:name="Google Shape;656;p78" draw:style-name="gr34" draw:text-style-name="P28" draw:layer="layout" svg:width="3.153cm" svg:height="3.153cm" svg:x="21.76cm" svg:y="6.058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57;p78" draw:style-name="gr32" draw:text-style-name="P26" draw:layer="layout" svg:width="0.928cm" svg:height="1.047cm" svg:x="22.228cm" svg:y="6.549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658;p78">
            <draw:custom-shape draw:name="Google Shape;659;p78" draw:style-name="gr32" draw:text-style-name="P26" draw:layer="layout" svg:width="0.928cm" svg:height="0.414cm" svg:x="23.439cm" svg:y="7.94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660;p78" draw:style-name="gr32" draw:text-style-name="P26" draw:layer="layout" svg:width="0.928cm" svg:height="0.414cm" svg:x="23.439cm" svg:y="8.282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661;p78" draw:style-name="gr32" draw:text-style-name="P26" draw:layer="layout" svg:width="0.928cm" svg:height="0.41cm" svg:x="23.439cm" svg:y="7.601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662;p78" xml:id="id39" draw:id="id39">
          <draw:custom-shape draw:name="Google Shape;663;p78" draw:style-name="gr35" draw:text-style-name="P29" draw:layer="layout" svg:width="3.153cm" svg:height="3.153cm" svg:x="7.269cm" svg:y="6.058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64;p78">
            <draw:custom-shape draw:name="Google Shape;665;p78" draw:style-name="gr36" draw:text-style-name="P26" draw:layer="layout" svg:width="0.21cm" svg:height="0.176cm" svg:x="8.188cm" svg:y="8.191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666;p78" draw:style-name="gr36" draw:text-style-name="P26" draw:layer="layout" svg:width="0.209cm" svg:height="0.203cm" svg:x="7.877cm" svg:y="7.841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667;p78" draw:style-name="gr36" draw:text-style-name="P26" draw:layer="layout" svg:width="0.192cm" svg:height="0.166cm" svg:x="8.037cm" svg:y="8.02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668;p78" draw:style-name="gr36" draw:text-style-name="P26" draw:layer="layout" svg:width="0.228cm" svg:height="0.972cm" svg:x="7.691cm" svg:y="6.947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669;p78" draw:style-name="gr36" draw:text-style-name="P26" draw:layer="layout" svg:width="0.242cm" svg:height="0.98cm" svg:x="9.759cm" svg:y="6.947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670;p78" draw:style-name="gr36" draw:text-style-name="P26" draw:layer="layout" svg:width="1.611cm" svg:height="1.126cm" svg:x="8.263cm" svg:y="6.71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671;p78" draw:style-name="gr36" draw:text-style-name="P26" draw:layer="layout" svg:width="0.284cm" svg:height="0.166cm" svg:x="8.379cm" svg:y="8.362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672;p78" draw:style-name="gr36" draw:text-style-name="P26" draw:layer="layout" svg:width="1.999cm" svg:height="1.808cm" svg:x="7.816cm" svg:y="6.705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673;p78"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frame draw:name="Google Shape;626;g3414daac41a_0_1370:notes" presentation:style-name="pr14" draw:text-style-name="P9" draw:layer="layout" svg:width="17.27cm" svg:height="12.571cm" svg:x="2.159cm" svg:y="13.271cm" presentation:class="notes" presentation:placeholder="true" presentation:user-transformed="true">
            <draw:text-box/>
          </draw:frame>
          <draw:page-thumbnail draw:name="Google Shape;627;g3414daac41a_0_1370:notes" draw:style-name="gr3" draw:layer="layout" svg:width="18.623cm" svg:height="10.475cm" svg:x="1.482cm" svg:y="2.123cm" draw:page-number="11" presentation:class="page"/>
        </presentation:notes>
      </draw:page>
      <draw:page draw:name="page12" draw:style-name="dp1" draw:master-page-name="simple-light-2">
        <draw:custom-shape draw:name="Google Shape;678;p79"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679;p79"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680;p79"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682;p79">
          <draw:custom-shape draw:name="Google Shape;683;p79"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84;p79">
            <draw:custom-shape draw:name="Google Shape;685;p79"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686;p79"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687;p79"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688;p79"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689;p79">
          <draw:custom-shape draw:name="Google Shape;681;p79"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90;p79">
            <draw:custom-shape draw:name="Google Shape;691;p79"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692;p79"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693;p79"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694;p79">
            <draw:custom-shape draw:name="Google Shape;695;p79"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696;p79"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697;p79">
            <draw:custom-shape draw:name="Google Shape;698;p79"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699;p79"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700;p79"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701;p79"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702;p79"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703;p79">
          <draw:custom-shape draw:name="Google Shape;704;p79"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5;p79"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706;p79">
            <draw:custom-shape draw:name="Google Shape;707;p79"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708;p79"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709;p79"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710;p79">
          <draw:custom-shape draw:name="Google Shape;711;p79"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12;p79">
            <draw:custom-shape draw:name="Google Shape;713;p79"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714;p79"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715;p79"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716;p79"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717;p79"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718;p79"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719;p79"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720;p79"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721;p79"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2;p79"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3;p79"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724;p79" draw:style-name="gr23" draw:text-style-name="P7" draw:layer="layout" svg:width="3.221cm" svg:height="0.73cm" svg:x="22.145cm" svg:y="2.223cm">
          <text:p text:style-name="P3"><text:span text:style-name="T20">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5;p79" draw:style-name="gr14" draw:text-style-name="P7" draw:layer="layout" svg:width="23.951cm" svg:height="9.407cm" svg:x="0.729cm" svg:y="4.98cm">
          <text:p xml:id="id44" text:id="id44" text:style-name="P30"><text:span text:style-name="T34">Potential impact of the proposed research</text:span></text:p>
          <text:p xml:id="id45" text:id="id45" text:style-name="P30"><text:span text:style-name="T35">The extent to which the planned outputs are openly accessible to ensure reusability of the research outputs and enhance reproducibility</text:span></text:p>
          <text:p xml:id="id46" text:id="id46" text:style-name="P31"><text:span text:style-name="T36">FAIR, available and reusable data [software, algorithms, protocols, models, workflows, electronic notebooks, and other tools] </text:span></text:p>
          <text:p xml:id="id47" text:id="id47" text:style-name="P31"><text:span text:style-name="T36">Early sharing through pre-registration and preprints, open access to software, workflows, tools, etc</text:span></text:p>
          <text:p xml:id="id48" text:id="id48" text:style-name="P31"><text:span text:style-name="T37"/></text:p>
          <text:p xml:id="id49" text:id="id49" text:style-name="P30"><text:span text:style-name="T38"/></text:p>
          <text:p xml:id="id50" text:id="id50" text:style-name="P30"><text:span text:style-name="T38"/></text:p>
          <text:p xml:id="id51" text:id="id51" text:style-name="P32"><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79" draw:style-name="gr14" draw:text-style-name="P7" draw:layer="layout" svg:width="25.002cm" svg:height="0.932cm" svg:x="0.053cm" svg:y="12.936cm">
          <text:p text:style-name="P3"><text:span text:style-name="T39"><text:a xlink:href="https://www.forskningsradet.no/en/processing-grant-applications/processing-applications/assessment-open-science/" xlink:type="simple">https://www.forskningsradet.no/en/processing-grant-applications/processing-applications/assessment-open-science/</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7;p79" draw:style-name="gr37" draw:text-style-name="P7" xml:id="id53" draw:id="id53" draw:layer="layout" svg:width="2.287cm" svg:height="2.287cm" svg:x="11.803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8;p79" draw:style-name="gr38" draw:text-style-name="P8" xml:id="id52" draw:id="id52" draw:layer="layout" svg:width="0.001cm" svg:height="11.634cm" draw:transform="rotate (-1.5707963267949) translate (12.947cm 2.708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name="Google Shape;675;g3414daac41a_0_1418:notes" draw:style-name="gr3" draw:layer="layout" svg:width="16.932cm" svg:height="9.524cm" svg:x="1.059cm" svg:y="1.905cm" draw:page-number="12" presentation:class="page"/>
          <draw:frame draw:name="Google Shape;676;g3414daac41a_0_1418:notes" presentation:style-name="pr15" draw:text-style-name="P9" draw:layer="layout" svg:width="15.239cm" svg:height="11.429cm" svg:x="1.905cm" svg:y="12.065cm" presentation:class="notes" presentation:placeholder="true" presentation:user-transformed="true">
            <draw:text-box/>
          </draw:frame>
        </presentation:notes>
      </draw:page>
      <draw:page draw:name="page13" draw:style-name="dp1" draw:master-page-name="simple-light-2">
        <draw:custom-shape draw:name="Google Shape;733;p80"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734;p80"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735;p80"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737;p80">
          <draw:custom-shape draw:name="Google Shape;738;p80"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39;p80">
            <draw:custom-shape draw:name="Google Shape;740;p80"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741;p80"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742;p80"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743;p80"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744;p80">
          <draw:custom-shape draw:name="Google Shape;736;p80"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45;p80">
            <draw:custom-shape draw:name="Google Shape;746;p80"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747;p80"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748;p80"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749;p80">
            <draw:custom-shape draw:name="Google Shape;750;p80"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751;p80"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752;p80">
            <draw:custom-shape draw:name="Google Shape;753;p80"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754;p80"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755;p80"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756;p80"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757;p80"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758;p80">
          <draw:custom-shape draw:name="Google Shape;759;p80"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60;p80"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761;p80">
            <draw:custom-shape draw:name="Google Shape;762;p80"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763;p80"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764;p80"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765;p80">
          <draw:custom-shape draw:name="Google Shape;766;p80"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67;p80">
            <draw:custom-shape draw:name="Google Shape;768;p80"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769;p80"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770;p80"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771;p80"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772;p80"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773;p80"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774;p80"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775;p80"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776;p80"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7;p80"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8;p80"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779;p80" draw:style-name="gr23" draw:text-style-name="P7" draw:layer="layout" svg:width="3.221cm" svg:height="0.73cm" svg:x="22.145cm" svg:y="2.223cm">
          <text:p text:style-name="P3"><text:span text:style-name="T20">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p80" draw:style-name="gr14" draw:text-style-name="P7" draw:layer="layout" svg:width="23.951cm" svg:height="9.407cm" svg:x="0.729cm" svg:y="4.98cm">
          <text:p xml:id="id54" text:id="id54" text:style-name="P30"><text:span text:style-name="T34">Communication and exploitation</text:span></text:p>
          <text:p xml:id="id55" text:id="id55" text:style-name="P30"><text:span text:style-name="T41">The extent to which the appropriate open science practices are implemented as an integral part of the proposed project to ensure open sharing and wide distribution of research outputs.</text:span></text:p>
          <text:p xml:id="id56" text:id="id56" text:style-name="P31"><text:span text:style-name="T36">Early and open sharing <text:s/>(preprints or pre-registration and/or registration reports)</text:span></text:p>
          <text:p xml:id="id57" text:id="id57" text:style-name="P31"><text:span text:style-name="T36">Full and immediate open access publication</text:span></text:p>
          <text:p xml:id="id58" text:id="id58" text:style-name="P31"><text:span text:style-name="T37"/></text:p>
          <text:p xml:id="id59" text:id="id59" text:style-name="P30"><text:span text:style-name="T38"/></text:p>
          <text:p xml:id="id60" text:id="id60" text:style-name="P30"><text:span text:style-name="T38"/></text:p>
          <text:p xml:id="id61" text:id="id61" text:style-name="P32"><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1;p80" draw:style-name="gr14" draw:text-style-name="P7" draw:layer="layout" svg:width="25.002cm" svg:height="0.932cm" svg:x="0.053cm" svg:y="12.936cm">
          <text:p text:style-name="P3"><text:span text:style-name="T39"><text:a xlink:href="https://www.forskningsradet.no/en/processing-grant-applications/processing-applications/assessment-open-science/" xlink:type="simple">https://www.forskningsradet.no/en/processing-grant-applications/processing-applications/assessment-open-science/</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name="Google Shape;730;g3414daac41a_0_1472:notes" draw:style-name="gr3" draw:layer="layout" svg:width="16.932cm" svg:height="9.524cm" svg:x="1.059cm" svg:y="1.905cm" draw:page-number="13" presentation:class="page"/>
          <draw:frame draw:name="Google Shape;731;g3414daac41a_0_1472:notes" presentation:style-name="pr16" draw:text-style-name="P9" draw:layer="layout" svg:width="15.239cm" svg:height="11.429cm" svg:x="1.905cm" svg:y="12.065cm" presentation:class="notes" presentation:placeholder="true" presentation:user-transformed="true">
            <draw:text-box/>
          </draw:frame>
        </presentation:notes>
      </draw:page>
      <draw:page draw:name="page14" draw:style-name="dp1" draw:master-page-name="simple-light-2">
        <draw:custom-shape draw:name="Google Shape;786;p81"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787;p81"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788;p81"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790;p81">
          <draw:custom-shape draw:name="Google Shape;791;p81"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92;p81">
            <draw:custom-shape draw:name="Google Shape;793;p81"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794;p81"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795;p81"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796;p81"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797;p81">
          <draw:custom-shape draw:name="Google Shape;789;p81"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98;p81">
            <draw:custom-shape draw:name="Google Shape;799;p81"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800;p81"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801;p81"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802;p81">
            <draw:custom-shape draw:name="Google Shape;803;p81"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804;p81"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805;p81">
            <draw:custom-shape draw:name="Google Shape;806;p81"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807;p81"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808;p81"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809;p81"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810;p81"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811;p81">
          <draw:custom-shape draw:name="Google Shape;812;p81"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3;p81"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814;p81">
            <draw:custom-shape draw:name="Google Shape;815;p81"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16;p81"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17;p81"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818;p81">
          <draw:custom-shape draw:name="Google Shape;819;p81"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20;p81">
            <draw:custom-shape draw:name="Google Shape;821;p81"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822;p81"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823;p81"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824;p81"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825;p81"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826;p81"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827;p81"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828;p81"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829;p81"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0;p81"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1;p81"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832;p81" draw:style-name="gr14" draw:text-style-name="P7" draw:layer="layout" svg:width="23.951cm" svg:height="10.353cm" svg:x="0.729cm" svg:y="4.98cm">
          <text:p text:style-name="P20"><text:span text:style-name="T26">No full DMP required (- but helpful)</text:span></text:p>
          <text:p text:style-name="P20"><text:span text:style-name="T26"/></text:p>
          <text:p text:style-name="P20"><text:span text:style-name="T42">You should consider:</text:span></text:p>
          <text:p text:style-name="P20"><text:span text:style-name="T42"/></text:p>
          <text:p text:style-name="P20"><text:span text:style-name="T43">§§</text:span><text:span text:style-name="T44"><text:tab/></text:span><text:span text:style-name="T42">Ethical and Legal issues</text:span></text:p>
          <text:p text:style-name="P33"><text:span text:style-name="T42">Storage and computing (budgeting?)</text:span></text:p>
          <text:p text:style-name="P33"><text:span text:style-name="T42">Budgeting for RDM-personnel &amp; time effort</text:span></text:p>
          <text:p text:style-name="P30"><text:span text:style-name="T38"/></text:p>
          <text:p text:style-name="P30"><text:span text:style-name="T38"/></text:p>
          <text:p text:style-name="P32"><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33;p81">
          <draw:custom-shape draw:name="Google Shape;834;p81" draw:style-name="gr28" draw:text-style-name="P23" draw:layer="layout" svg:width="0.511cm" svg:height="0.228cm" svg:x="0.957cm" svg:y="10.359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35;p81" draw:style-name="gr28" draw:text-style-name="P23" draw:layer="layout" svg:width="0.511cm" svg:height="0.228cm" svg:x="0.957cm" svg:y="10.548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36;p81" draw:style-name="gr28" draw:text-style-name="P23" draw:layer="layout" svg:width="0.511cm" svg:height="0.225cm" svg:x="0.957cm" svg:y="10.172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name="Google Shape;837;p81">
          <draw:custom-shape draw:name="Google Shape;838;p81" draw:style-name="gr28" draw:text-style-name="P23" draw:layer="layout" svg:width="0.505cm" svg:height="0.33cm" svg:x="1.555cm" svg:y="10.601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839;p81" draw:style-name="gr28" draw:text-style-name="P23" draw:layer="layout" svg:width="0.343cm" svg:height="0.104cm" svg:x="1.632cm" svg:y="10.955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custom-shape draw:name="Google Shape;840;p81" draw:style-name="gr28" draw:text-style-name="P23" draw:layer="layout" svg:width="0.623cm" svg:height="0.692cm" svg:x="1.06cm" svg:y="11.173cm">
          <text:p text:style-name="P3"><text:span text:style-name="T30"/></text:p>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841;p81" draw:style-name="gr14" draw:text-style-name="P7" draw:layer="layout" svg:width="25.002cm" svg:height="0.932cm" svg:x="0.053cm" svg:y="12.936cm">
          <text:p text:style-name="P3"><text:span text:style-name="T39"><text:a xlink:href="https://www.forskningsradet.no/en/research-policy-strategy/open-science/research-data/" xlink:type="simple">https://www.forskningsradet.no/en/research-policy-strategy/open-science/research-data/</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3;g3414daac41a_0_1524:notes" draw:style-name="gr3" draw:layer="layout" svg:width="16.932cm" svg:height="9.524cm" svg:x="1.059cm" svg:y="1.905cm" draw:page-number="14" presentation:class="page"/>
          <draw:frame draw:name="Google Shape;784;g3414daac41a_0_1524:notes" presentation:style-name="pr17" draw:text-style-name="P9" draw:layer="layout" svg:width="15.239cm" svg:height="11.429cm" svg:x="1.905cm" svg:y="12.065cm" presentation:class="notes" presentation:placeholder="true" presentation:user-transformed="true">
            <draw:text-box/>
          </draw:frame>
        </presentation:notes>
      </draw:page>
      <draw:page draw:name="page15" draw:style-name="dp1" draw:master-page-name="simple-light-2">
        <draw:custom-shape draw:name="Google Shape;846;p82"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847;p82"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848;p82"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850;p82">
          <draw:custom-shape draw:name="Google Shape;851;p82"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52;p82">
            <draw:custom-shape draw:name="Google Shape;853;p82"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854;p82"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855;p82"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856;p82"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857;p82">
          <draw:custom-shape draw:name="Google Shape;849;p82"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58;p82">
            <draw:custom-shape draw:name="Google Shape;859;p82"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860;p82"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861;p82"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862;p82">
            <draw:custom-shape draw:name="Google Shape;863;p82"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864;p82"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865;p82">
            <draw:custom-shape draw:name="Google Shape;866;p82"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867;p82"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868;p82"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869;p82"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870;p82"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871;p82">
          <draw:custom-shape draw:name="Google Shape;872;p82"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3;p82"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874;p82">
            <draw:custom-shape draw:name="Google Shape;875;p82"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76;p82"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77;p82"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878;p82">
          <draw:custom-shape draw:name="Google Shape;879;p82"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80;p82">
            <draw:custom-shape draw:name="Google Shape;881;p82"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882;p82"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883;p82"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884;p82"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885;p82"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886;p82"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887;p82"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888;p82"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889;p82"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0;p82"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1;p82"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892;p82" draw:style-name="gr14" draw:text-style-name="P7" draw:layer="layout" svg:width="25.399cm" svg:height="12.449cm" svg:x="0.442cm" svg:y="3.948cm">
          <text:p xml:id="id62" text:id="id62" text:style-name="P20"><text:span text:style-name="T45">§§</text:span><text:span text:style-name="T46">Ethical and Legal issues</text:span></text:p>
          <text:p xml:id="id63" text:id="id63" text:style-name="P20"><text:span text:style-name="T46"/></text:p>
          <text:p xml:id="id64" text:id="id64" text:style-name="P34"><text:span text:style-name="T47">REK approval necessary (for sharing of data?)</text:span></text:p>
          <text:p xml:id="id65" text:id="id65" text:style-name="P34"><text:span text:style-name="T47">GDPR considerations</text:span></text:p>
          <text:p xml:id="id66" text:id="id66" text:style-name="P34"><text:span text:style-name="T47">IPR aspects</text:span></text:p>
          <text:p xml:id="id67" text:id="id67" text:style-name="P34"><text:span text:style-name="T47">Which Research Ethical Guidelines apply for this project?</text:span></text:p>
          <text:p xml:id="id68" text:id="id68" text:style-name="P34"><text:span text:style-name="T47">RRI</text:span></text:p>
          <text:p xml:id="id69" text:id="id69" text:style-name="P30"><text:span text:style-name="T38"/></text:p>
          <text:p xml:id="id70" text:id="id70" text:style-name="P30"><text:span text:style-name="T38"/></text:p>
          <text:p xml:id="id71" text:id="id71" text:style-name="P32"><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3;p82" draw:style-name="gr14" draw:text-style-name="P7" draw:layer="layout" svg:width="25.002cm" svg:height="0.932cm" svg:x="0.053cm" svg:y="12.936cm">
          <text:p text:style-name="P3"><text:span text:style-name="T39"><text:a xlink:href="https://www.forskningsradet.no/en/research-policy-strategy/open-science/research-data/" xlink:type="simple">https://www.forskningsradet.no/en/research-policy-strategy/open-science/research-data/</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name="Google Shape;843;g3414daac41a_0_1583:notes" draw:style-name="gr3" draw:layer="layout" svg:width="16.932cm" svg:height="9.524cm" svg:x="1.059cm" svg:y="1.905cm" draw:page-number="15" presentation:class="page"/>
          <draw:frame draw:name="Google Shape;844;g3414daac41a_0_1583:notes" presentation:style-name="pr18" draw:text-style-name="P9" draw:layer="layout" svg:width="15.239cm" svg:height="11.429cm" svg:x="1.905cm" svg:y="12.065cm" presentation:class="notes" presentation:placeholder="true" presentation:user-transformed="true">
            <draw:text-box/>
          </draw:frame>
        </presentation:notes>
      </draw:page>
      <draw:page draw:name="page16" draw:style-name="dp1" draw:master-page-name="simple-light-2">
        <draw:custom-shape draw:name="Google Shape;898;p83"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899;p83"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900;p83"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902;p83">
          <draw:custom-shape draw:name="Google Shape;903;p83"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04;p83">
            <draw:custom-shape draw:name="Google Shape;905;p83"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906;p83"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907;p83"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908;p83"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909;p83">
          <draw:custom-shape draw:name="Google Shape;901;p83"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10;p83">
            <draw:custom-shape draw:name="Google Shape;911;p83"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912;p83"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913;p83"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914;p83">
            <draw:custom-shape draw:name="Google Shape;915;p83"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916;p83"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917;p83">
            <draw:custom-shape draw:name="Google Shape;918;p83"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919;p83"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920;p83"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921;p83"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22;p83"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923;p83">
          <draw:custom-shape draw:name="Google Shape;924;p83"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5;p83"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926;p83">
            <draw:custom-shape draw:name="Google Shape;927;p83"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28;p83"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929;p83"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930;p83">
          <draw:custom-shape draw:name="Google Shape;931;p83"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32;p83">
            <draw:custom-shape draw:name="Google Shape;933;p83"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934;p83"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935;p83"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936;p83"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937;p83"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938;p83"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939;p83"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940;p83"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941;p83"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2;p83"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43;p83" draw:style-name="gr2" draw:text-style-name="P8" draw:layer="layout" svg:width="3.202cm" svg:height="3.202cm" svg:x="22.66cm" svg:y="-0.728cm">
          <draw:image xlink:href="Pictures/10000201000004B0000004B0F8DB1F3763AE048A.png" xlink:type="simple" xlink:show="embed" xlink:actuate="onLoad">
            <text:p/>
          </draw:image>
        </draw:frame>
        <draw:g draw:name="Google Shape;944;p83">
          <draw:custom-shape draw:name="Google Shape;945;p83" draw:style-name="gr28" draw:text-style-name="P23" draw:layer="layout" svg:width="0.735cm" svg:height="0.327cm" svg:x="0.23cm" svg:y="4.207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46;p83" draw:style-name="gr28" draw:text-style-name="P23" draw:layer="layout" svg:width="0.735cm" svg:height="0.327cm" svg:x="0.23cm" svg:y="4.478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g draw:name="Google Shape;947;p83">
            <draw:custom-shape draw:name="Google Shape;948;p83" draw:style-name="gr28" draw:text-style-name="P23" draw:layer="layout" svg:width="0.735cm" svg:height="0.324cm" svg:x="0.23cm" svg:y="3.939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name="Google Shape;949;p83">
              <draw:custom-shape draw:name="Google Shape;950;p83" draw:style-name="gr28" draw:text-style-name="P23" draw:layer="layout" svg:width="0.726cm" svg:height="0.474cm" svg:x="1.088cm" svg:y="4.554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51;p83" draw:style-name="gr28" draw:text-style-name="P23" draw:layer="layout" svg:width="0.493cm" svg:height="0.149cm" svg:x="1.2cm" svg:y="5.062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custom-shape draw:name="Google Shape;952;p83" draw:style-name="gr14" draw:text-style-name="P7" draw:layer="layout" svg:width="25.399cm" svg:height="7.027cm" svg:x="0.442cm" svg:y="3.948cm">
          <text:p xml:id="id72" text:id="id72" text:style-name="P33"><text:span text:style-name="T46">Storage and Computing</text:span></text:p>
          <text:p xml:id="id73" text:id="id73" text:style-name="P33"><text:span text:style-name="T46"/></text:p>
          <text:p xml:id="id74" text:id="id74" text:style-name="P35"><text:span text:style-name="T47">Is access to computing/storage secured?</text:span></text:p>
          <text:p xml:id="id75" text:id="id75" text:style-name="P35"><text:span text:style-name="T47">Will we have to pay for data storage (of sensitive data?)</text:span></text:p>
          <text:p xml:id="id76" text:id="id76" text:style-name="P35"><text:span text:style-name="T47">How will data be accessed &amp; transferr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3;p83" draw:style-name="gr14" draw:text-style-name="P7" draw:layer="layout" svg:width="25.002cm" svg:height="0.932cm" svg:x="0.053cm" svg:y="12.936cm">
          <text:p text:style-name="P3"><text:span text:style-name="T39"><text:a xlink:href="https://www.forskningsradet.no/en/research-policy-strategy/open-science/research-data/" xlink:type="simple">https://www.forskningsradet.no/en/research-policy-strategy/open-science/research-data/</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0.001s" smil:targetElement="id7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anim:sub-item="text" smil:attributeName="visibility" smil:to="visible"/>
                  <anim:transitionFilter smil:dur="0.001s" smil:targetElement="id7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anim:sub-item="text" smil:attributeName="visibility" smil:to="visible"/>
                  <anim:transitionFilter smil:dur="0.001s" smil:targetElement="id7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anim:sub-item="text" smil:attributeName="visibility" smil:to="visible"/>
                  <anim:transitionFilter smil:dur="0.001s" smil:targetElement="id7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anim:sub-item="text" smil:attributeName="visibility" smil:to="visible"/>
                  <anim:transitionFilter smil:dur="0.001s" smil:targetElement="id76" anim:sub-item="text" smil:type="fade" smil:subtype="crossfade"/>
                </anim:par>
              </anim:par>
            </anim:par>
          </anim:seq>
        </anim:par>
        <presentation:notes draw:style-name="dp2">
          <draw:page-thumbnail draw:name="Google Shape;895;g3414daac41a_0_1634:notes" draw:style-name="gr3" draw:layer="layout" svg:width="16.932cm" svg:height="9.524cm" svg:x="1.059cm" svg:y="1.905cm" draw:page-number="16" presentation:class="page"/>
          <draw:frame draw:name="Google Shape;896;g3414daac41a_0_1634:notes" presentation:style-name="pr19" draw:text-style-name="P9" draw:layer="layout" svg:width="15.239cm" svg:height="11.429cm" svg:x="1.905cm" svg:y="12.065cm" presentation:class="notes" presentation:placeholder="true" presentation:user-transformed="true">
            <draw:text-box/>
          </draw:frame>
        </presentation:notes>
      </draw:page>
      <draw:page draw:name="page17" draw:style-name="dp1" draw:master-page-name="simple-light-2">
        <draw:custom-shape draw:name="Google Shape;958;p84"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959;p84"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960;p84"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962;p84">
          <draw:custom-shape draw:name="Google Shape;963;p84"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64;p84">
            <draw:custom-shape draw:name="Google Shape;965;p84"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966;p84"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967;p84"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968;p84"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969;p84">
          <draw:custom-shape draw:name="Google Shape;961;p84"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70;p84">
            <draw:custom-shape draw:name="Google Shape;971;p84"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972;p84"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973;p84"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974;p84">
            <draw:custom-shape draw:name="Google Shape;975;p84"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976;p84"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977;p84">
            <draw:custom-shape draw:name="Google Shape;978;p84"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979;p84"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980;p84"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981;p84"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82;p84"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983;p84">
          <draw:custom-shape draw:name="Google Shape;984;p84"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5;p84"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986;p84">
            <draw:custom-shape draw:name="Google Shape;987;p84"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88;p84"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989;p84"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990;p84">
          <draw:custom-shape draw:name="Google Shape;991;p84"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92;p84">
            <draw:custom-shape draw:name="Google Shape;993;p84"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994;p84"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995;p84"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996;p84"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997;p84"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998;p84"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999;p84"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000;p84"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001;p84" draw:style-name="gr37" draw:text-style-name="P7" draw:layer="layout" svg:width="2.287cm" svg:height="2.287cm" svg:x="0.168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2;p84"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3;p84"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004;p84" draw:style-name="gr14" draw:text-style-name="P7" draw:layer="layout" svg:width="25.399cm" svg:height="8.945cm" svg:x="0.442cm" svg:y="3.948cm">
          <text:p text:style-name="P33"><text:span text:style-name="T46">Budgeting for RDM-personnel &amp; time effort</text:span></text:p>
          <text:p text:style-name="P33"><text:span text:style-name="T46"/></text:p>
          <text:p text:style-name="P35"><text:span text:style-name="T47">Will we need help from a Data Steward (and budget for this)?</text:span></text:p>
          <text:p text:style-name="P35"><text:span text:style-name="T47">Will we need with data analysis, data warehousing or deposition? </text:span></text:p>
          <text:p text:style-name="P30"><text:span text:style-name="T38"/></text:p>
          <text:p text:style-name="P30"><text:span text:style-name="T38"/></text:p>
          <text:p text:style-name="P32"><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5;p84" draw:style-name="gr28" draw:text-style-name="P23" draw:layer="layout" svg:width="0.963cm" svg:height="1.068cm" svg:x="0.442cm" svg:y="4.293cm">
          <text:p text:style-name="P3"><text:span text:style-name="T30"/></text:p>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1006;p84" draw:style-name="gr14" draw:text-style-name="P7" draw:layer="layout" svg:width="25.002cm" svg:height="0.932cm" svg:x="0.053cm" svg:y="12.936cm">
          <text:p text:style-name="P3"><text:span text:style-name="T39"><text:a xlink:href="https://www.forskningsradet.no/en/research-policy-strategy/open-science/research-data/" xlink:type="simple">https://www.forskningsradet.no/en/research-policy-strategy/open-science/research-data/</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5;g3414daac41a_0_1693:notes" draw:style-name="gr3" draw:layer="layout" svg:width="16.932cm" svg:height="9.524cm" svg:x="1.059cm" svg:y="1.905cm" draw:page-number="17" presentation:class="page"/>
          <draw:frame draw:name="Google Shape;956;g3414daac41a_0_1693:notes" presentation:style-name="pr20" draw:text-style-name="P9" draw:layer="layout" svg:width="15.239cm" svg:height="11.429cm" svg:x="1.905cm" svg:y="12.065cm" presentation:class="notes" presentation:placeholder="true" presentation:user-transformed="true">
            <draw:text-box/>
          </draw:frame>
        </presentation:notes>
      </draw:page>
      <draw:page draw:name="page18" draw:style-name="dp1" draw:master-page-name="simple-light-2">
        <draw:custom-shape draw:name="Google Shape;1011;p85"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012;p85"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013;p85"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015;p85">
          <draw:custom-shape draw:name="Google Shape;1016;p85"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17;p85">
            <draw:custom-shape draw:name="Google Shape;1018;p85"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019;p85"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020;p85"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021;p85"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022;p85">
          <draw:custom-shape draw:name="Google Shape;1014;p85"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23;p85">
            <draw:custom-shape draw:name="Google Shape;1024;p85"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025;p85"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026;p85"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027;p85">
            <draw:custom-shape draw:name="Google Shape;1028;p85"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029;p85"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030;p85">
            <draw:custom-shape draw:name="Google Shape;1031;p85"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032;p85"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033;p85"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034;p85"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035;p85"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036;p85">
          <draw:custom-shape draw:name="Google Shape;1037;p85"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8;p85"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039;p85">
            <draw:custom-shape draw:name="Google Shape;1040;p85"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041;p85"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042;p85"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043;p85">
          <draw:custom-shape draw:name="Google Shape;1044;p85"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45;p85">
            <draw:custom-shape draw:name="Google Shape;1046;p85"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047;p85"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048;p85"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049;p85"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050;p85"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051;p85"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052;p85"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053;p85"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054;p85" draw:style-name="gr37" draw:text-style-name="P7" draw:layer="layout" svg:width="2.287cm" svg:height="2.287cm" svg:x="3.809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5;p85"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56;p85"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057;p85" draw:style-name="gr23" draw:text-style-name="P7" draw:layer="layout" svg:width="3.221cm" svg:height="0.73cm" svg:x="22.145cm" svg:y="2.223cm">
          <text:p text:style-name="P3"><text:span text:style-name="T20">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8;p85" draw:style-name="gr14" draw:text-style-name="P7" draw:layer="layout" svg:width="25.002cm" svg:height="0.932cm" svg:x="0.053cm" svg:y="12.936cm">
          <text:p text:style-name="P3"><text:span text:style-name="T39"><text:a xlink:href="https://www.forskningsradet.no/en/research-policy-strategy/open-science/research-data/" xlink:type="simple">https://www.forskningsradet.no/en/research-policy-strategy/open-science/research-data/</text:a></text:span><text:span text:style-name="T4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9;p85" draw:style-name="gr14" draw:text-style-name="P7" draw:layer="layout" svg:width="25.399cm" svg:height="8.974cm" svg:x="0.442cm" svg:y="3.948cm">
          <text:p xml:id="id77" text:id="id77" text:style-name="P33"><text:span text:style-name="T48">When awarded funding</text:span></text:p>
          <text:p xml:id="id78" text:id="id78" text:style-name="P35"><text:span text:style-name="T46">Full DMP required</text:span></text:p>
          <text:p xml:id="id79" text:id="id79" text:style-name="P20"><text:span text:style-name="T49"/></text:p>
          <text:p xml:id="id80" text:id="id80" text:style-name="P20"><text:span text:style-name="T49"/></text:p>
          <text:p xml:id="id81" text:id="id81" text:style-name="P20"><text:span text:style-name="T49">If you decide that a data management plan is not needed, you must provide an explanation.</text:span></text:p>
          <text:p xml:id="id82" text:id="id82" text:style-name="P20"><text:span text:style-name="T50"/></text:p>
          <text:p xml:id="id83" text:id="id83" text:style-name="P35"><text:span text:style-name="T50">I don’t know of any - do you?</text:span></text:p>
          <text:p xml:id="id84" text:id="id84" text:style-name="P20"><text:span text:style-name="T50"/></text:p>
          <text:p xml:id="id85" text:id="id85" text:style-name="P20"><text:span text:style-name="T49">Even if you only reuse others data, you should describe where and how it is accessible &amp; how your processed data can be accessed or reproduc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seq>
        </anim:par>
        <presentation:notes draw:style-name="dp2">
          <draw:page-thumbnail draw:name="Google Shape;1008;g3414daac41a_0_1745:notes" draw:style-name="gr3" draw:layer="layout" svg:width="16.932cm" svg:height="9.524cm" svg:x="1.059cm" svg:y="1.905cm" draw:page-number="18" presentation:class="page"/>
          <draw:frame draw:name="Google Shape;1009;g3414daac41a_0_1745:notes" presentation:style-name="pr21" draw:text-style-name="P9" draw:layer="layout" svg:width="15.239cm" svg:height="11.429cm" svg:x="1.905cm" svg:y="12.065cm" presentation:class="notes" presentation:placeholder="true" presentation:user-transformed="true">
            <draw:text-box/>
          </draw:frame>
        </presentation:notes>
      </draw:page>
      <draw:page draw:name="page19" draw:style-name="dp1" draw:master-page-name="simple-light-2">
        <draw:custom-shape draw:name="Google Shape;1064;p86"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065;p86"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066;p86"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068;p86">
          <draw:custom-shape draw:name="Google Shape;1069;p86"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70;p86">
            <draw:custom-shape draw:name="Google Shape;1071;p86"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072;p86"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073;p86"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074;p86"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075;p86">
          <draw:custom-shape draw:name="Google Shape;1067;p86"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76;p86">
            <draw:custom-shape draw:name="Google Shape;1077;p86"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078;p86"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079;p86"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080;p86">
            <draw:custom-shape draw:name="Google Shape;1081;p86"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082;p86"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083;p86">
            <draw:custom-shape draw:name="Google Shape;1084;p86"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085;p86"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086;p86"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087;p86"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088;p86"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089;p86">
          <draw:custom-shape draw:name="Google Shape;1090;p86"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1;p86"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092;p86">
            <draw:custom-shape draw:name="Google Shape;1093;p86"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094;p86"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095;p86"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096;p86">
          <draw:custom-shape draw:name="Google Shape;1097;p86"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98;p86">
            <draw:custom-shape draw:name="Google Shape;1099;p86"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100;p86"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101;p86"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102;p86"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103;p86"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104;p86"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105;p86"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106;p86"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107;p86" draw:style-name="gr37" draw:text-style-name="P7" draw:layer="layout" svg:width="2.287cm" svg:height="2.287cm" svg:x="3.809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8;p86"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9;p86"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110;p86" draw:style-name="gr14" draw:text-style-name="P7" draw:layer="layout" svg:width="25.399cm" svg:height="3.862cm" svg:x="0.442cm" svg:y="3.948cm">
          <text:p text:style-name="P33"><text:span text:style-name="T48">When awarded funding</text:span></text:p>
          <text:p text:style-name="P35"><text:span text:style-name="T46">Full DMP required</text:span></text:p>
          <text:p text:style-name="P20"><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1;p86" draw:style-name="gr14" draw:text-style-name="P7" draw:layer="layout" svg:width="19.745cm" svg:height="6.639cm" svg:x="1.844cm" svg:y="6.429cm">
          <text:p xml:id="id86" text:id="id86" text:style-name="P20"><text:span text:style-name="T52">Documentation, formats, volume</text:span></text:p>
          <text:p xml:id="id87" text:id="id87" text:style-name="P20"><text:span text:style-name="T52">Quality assurance including Metadata standards</text:span></text:p>
          <text:p xml:id="id88" text:id="id88" text:style-name="P20"><text:span text:style-name="T52">Backup during project</text:span></text:p>
          <text:p xml:id="id89" text:id="id89" text:style-name="P20"><text:span text:style-name="T52">Sharing &amp; Preservation</text:span></text:p>
          <text:p xml:id="id90" text:id="id90" text:style-name="P20"><text:span text:style-name="T52">Ethical and Legal aspects - including IPR</text:span></text:p>
          <text:p xml:id="id91" text:id="id91" text:style-name="P20"><text:span text:style-name="T52">Who is responsible in the project?</text:span></text:p>
          <text:p xml:id="id92" text:id="id92" text:style-name="P20"><text:span text:style-name="T52">To which trustworthy repository will the data be submit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2;p86" draw:style-name="gr39" draw:text-style-name="P8" draw:layer="layout" svg:width="6.842cm" svg:height="9.704cm" svg:x="17.875cm" svg:y="2.954cm">
          <draw:image xlink:href="Pictures/100002010000022F00000319CE4016C673E7585A.png" xlink:type="simple" xlink:show="embed" xlink:actuate="onLoad">
            <text:p/>
          </draw:image>
        </draw:frame>
        <draw:custom-shape draw:name="Google Shape;1113;p86" draw:style-name="gr14" draw:text-style-name="P7" draw:layer="layout" svg:width="25.002cm" svg:height="1.778cm" svg:x="0.053cm" svg:y="12.512cm">
          <text:p text:style-name="P3"><text:span text:style-name="T53"><text:a xlink:href="https://www.forskningsradet.no/en/research-policy-strategy/open-science/research-data/" xlink:type="simple">https://www.forskningsradet.no/en/research-policy-strategy/open-science/research-data/</text:a></text:span><text:span text:style-name="T54"><text:s/></text:span><text:span text:style-name="T53"><text:a xlink:href="https://www.scienceeurope.org/our-resources/practical-guide-to-the-international-alignment-of-research-data-management/" xlink:type="simple">https://www.scienceeurope.org/our-resources/practical-guide-to-the-international-alignment-of-research-data-management/</text:a></text:span><text:span text:style-name="T55"><text:s text:c="2"/></text:span></text:p>
          <text:p text:style-name="P3"><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name="Google Shape;1061;g3414daac41a_0_1797:notes" draw:style-name="gr3" draw:layer="layout" svg:width="16.932cm" svg:height="9.524cm" svg:x="1.059cm" svg:y="1.905cm" draw:page-number="19" presentation:class="page"/>
          <draw:frame draw:name="Google Shape;1062;g3414daac41a_0_1797:notes" presentation:style-name="pr22" draw:text-style-name="P9" draw:layer="layout" svg:width="15.239cm" svg:height="11.429cm" svg:x="1.905cm" svg:y="12.065cm" presentation:class="notes" presentation:placeholder="true" presentation:user-transformed="true">
            <draw:text-box/>
          </draw:frame>
        </presentation:notes>
      </draw:page>
      <draw:page draw:name="page20" draw:style-name="dp1" draw:master-page-name="simple-light-2">
        <draw:custom-shape draw:name="Google Shape;1118;p87"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119;p87"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120;p87"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122;p87">
          <draw:custom-shape draw:name="Google Shape;1123;p87"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24;p87">
            <draw:custom-shape draw:name="Google Shape;1125;p87"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126;p87"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127;p87"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128;p87"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129;p87">
          <draw:custom-shape draw:name="Google Shape;1121;p87"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30;p87">
            <draw:custom-shape draw:name="Google Shape;1131;p87"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132;p87"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133;p87"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134;p87">
            <draw:custom-shape draw:name="Google Shape;1135;p87"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136;p87"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137;p87">
            <draw:custom-shape draw:name="Google Shape;1138;p87"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139;p87"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140;p87"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141;p87"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142;p87"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143;p87">
          <draw:custom-shape draw:name="Google Shape;1144;p87"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5;p87"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146;p87">
            <draw:custom-shape draw:name="Google Shape;1147;p87"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148;p87"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149;p87"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150;p87">
          <draw:custom-shape draw:name="Google Shape;1151;p87"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52;p87">
            <draw:custom-shape draw:name="Google Shape;1153;p87"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154;p87"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155;p87"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156;p87"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157;p87"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158;p87"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159;p87"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160;p87"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161;p87" draw:style-name="gr37" draw:text-style-name="P7" draw:layer="layout" svg:width="2.287cm" svg:height="2.287cm" svg:x="3.809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2;p87"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3;p87"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164;p87" draw:style-name="gr14" draw:text-style-name="P7" draw:layer="layout" svg:width="25.399cm" svg:height="3.862cm" svg:x="0.442cm" svg:y="3.948cm">
          <text:p text:style-name="P33"><text:span text:style-name="T48">When awarded funding</text:span></text:p>
          <text:p text:style-name="P35"><text:span text:style-name="T46">Full DMP required</text:span></text:p>
          <text:p text:style-name="P20"><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5;p87" draw:style-name="gr14" draw:text-style-name="P7" draw:layer="layout" svg:width="21.953cm" svg:height="3.135cm" svg:x="1.844cm" svg:y="6.429cm">
          <text:p text:style-name="P20"><text:span text:style-name="T52">The Research Council of Norway does not assess the content of submitted plans. It is the responsibility of the Project Owner to approve that the plan is in line with the institution's requirements and guidelines before it is submit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6;p87" draw:style-name="gr14" draw:text-style-name="P7" draw:layer="layout" svg:width="25.002cm" svg:height="1.778cm" svg:x="0.053cm" svg:y="12.512cm">
          <text:p text:style-name="P3"><text:span text:style-name="T53"><text:a xlink:href="https://www.forskningsradet.no/en/research-policy-strategy/open-science/research-data/" xlink:type="simple">https://www.forskningsradet.no/en/research-policy-strategy/open-science/research-data/</text:a></text:span><text:span text:style-name="T54"><text:s/></text:span><text:span text:style-name="T53"><text:a xlink:href="https://www.scienceeurope.org/our-resources/practical-guide-to-the-international-alignment-of-research-data-management/" xlink:type="simple">https://www.scienceeurope.org/our-resources/practical-guide-to-the-international-alignment-of-research-data-management/</text:a></text:span><text:span text:style-name="T55"><text:s text:c="2"/></text:span></text:p>
          <text:p text:style-name="P3"><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5;g3414daac41a_0_1850:notes" draw:style-name="gr3" draw:layer="layout" svg:width="16.932cm" svg:height="9.524cm" svg:x="1.059cm" svg:y="1.905cm" draw:page-number="20" presentation:class="page"/>
          <draw:frame draw:name="Google Shape;1116;g3414daac41a_0_1850:notes" presentation:style-name="pr23" draw:text-style-name="P9" draw:layer="layout" svg:width="15.239cm" svg:height="11.429cm" svg:x="1.905cm" svg:y="12.065cm" presentation:class="notes" presentation:placeholder="true" presentation:user-transformed="true">
            <draw:text-box/>
          </draw:frame>
        </presentation:notes>
      </draw:page>
      <draw:page draw:name="page21" draw:style-name="dp1" draw:master-page-name="simple-light-2">
        <draw:custom-shape draw:name="Google Shape;1171;p88"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172;p88"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173;p88"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175;p88">
          <draw:custom-shape draw:name="Google Shape;1176;p88"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77;p88">
            <draw:custom-shape draw:name="Google Shape;1178;p88"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179;p88"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180;p88"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181;p88"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182;p88">
          <draw:custom-shape draw:name="Google Shape;1174;p88"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83;p88">
            <draw:custom-shape draw:name="Google Shape;1184;p88"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185;p88"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186;p88"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187;p88">
            <draw:custom-shape draw:name="Google Shape;1188;p88"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189;p88"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190;p88">
            <draw:custom-shape draw:name="Google Shape;1191;p88"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192;p88"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193;p88"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194;p88"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195;p88"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196;p88">
          <draw:custom-shape draw:name="Google Shape;1197;p88"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8;p88"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199;p88">
            <draw:custom-shape draw:name="Google Shape;1200;p88"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201;p88"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202;p88"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203;p88">
          <draw:custom-shape draw:name="Google Shape;1204;p88"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05;p88">
            <draw:custom-shape draw:name="Google Shape;1206;p88"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207;p88"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208;p88"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209;p88"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210;p88"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211;p88"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212;p88"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213;p88"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214;p88" draw:style-name="gr37" draw:text-style-name="P7" draw:layer="layout" svg:width="2.287cm" svg:height="2.287cm" svg:x="3.809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5;p88"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6;p88"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217;p88" draw:style-name="gr14" draw:text-style-name="P7" draw:layer="layout" svg:width="25.399cm" svg:height="3.725cm" svg:x="0.442cm" svg:y="3.948cm">
          <text:p text:style-name="P33"><text:span text:style-name="T48"/></text:p>
          <text:p text:style-name="P35"><text:span text:style-name="T46">Full DMP required</text:span></text:p>
          <text:p text:style-name="P20"><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8;p88" draw:style-name="gr14" draw:text-style-name="P7" xml:id="id93" draw:id="id93" draw:layer="layout" svg:width="22.436cm" svg:height="1.529cm" svg:x="1.826cm" svg:y="6.641cm">
          <text:p text:style-name="P20"><text:span text:style-name="T56">Data management plans are to be made public and openly accessib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9;p88" draw:style-name="gr2" draw:text-style-name="P8" xml:id="id95" draw:id="id95" draw:layer="layout" svg:width="10.953cm" svg:height="4.381cm" svg:x="8.524cm" svg:y="8.294cm">
          <draw:image xlink:href="Pictures/10000201000003E800000190282504CE7808A1CF.png" xlink:type="simple" xlink:show="embed" xlink:actuate="onLoad">
            <text:p/>
          </draw:image>
        </draw:frame>
        <draw:custom-shape draw:name="Google Shape;1220;p88" draw:style-name="gr14" draw:text-style-name="P7" xml:id="id94" draw:id="id94" draw:layer="layout" svg:width="19.487cm" svg:height="1.101cm" svg:x="10.423cm" svg:y="8.294cm">
          <text:p text:style-name="P3"><text:span text:style-name="T57">Different possibiliti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1;p88" draw:style-name="gr2" draw:text-style-name="P8" xml:id="id96" draw:id="id96" draw:layer="layout" svg:width="7.077cm" svg:height="1.795cm" svg:x="17.833cm" svg:y="10.414cm">
          <draw:image xlink:href="Pictures/10000201000001920000006659D040AACCB7BCC5.png" xlink:type="simple" xlink:show="embed" xlink:actuate="onLoad">
            <text:p/>
          </draw:image>
        </draw:frame>
        <draw:custom-shape draw:name="Google Shape;1222;p88" draw:style-name="gr14" draw:text-style-name="P7" draw:layer="layout" svg:width="25.002cm" svg:height="1.778cm" svg:x="0.053cm" svg:y="12.512cm">
          <text:p text:style-name="P3"><text:span text:style-name="T53"><text:a xlink:href="https://www.forskningsradet.no/en/research-policy-strategy/open-science/research-data/" xlink:type="simple">https://www.forskningsradet.no/en/research-policy-strategy/open-science/research-data/</text:a></text:span><text:span text:style-name="T54"><text:s/></text:span><text:span text:style-name="T53"><text:a xlink:href="https://www.scienceeurope.org/our-resources/practical-guide-to-the-international-alignment-of-research-data-management/" xlink:type="simple">https://www.scienceeurope.org/our-resources/practical-guide-to-the-international-alignment-of-research-data-management/</text:a></text:span><text:span text:style-name="T55"><text:s text:c="2"/></text:span></text:p>
          <text:p text:style-name="P3"><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seq>
        </anim:par>
        <presentation:notes draw:style-name="dp2">
          <draw:page-thumbnail draw:name="Google Shape;1168;g3414daac41a_0_1902:notes" draw:style-name="gr3" draw:layer="layout" svg:width="16.932cm" svg:height="9.524cm" svg:x="1.059cm" svg:y="1.905cm" draw:page-number="21" presentation:class="page"/>
          <draw:frame draw:name="Google Shape;1169;g3414daac41a_0_1902:notes" presentation:style-name="pr24" draw:text-style-name="P9" draw:layer="layout" svg:width="15.239cm" svg:height="11.429cm" svg:x="1.905cm" svg:y="12.065cm" presentation:class="notes" presentation:placeholder="true" presentation:user-transformed="true">
            <draw:text-box/>
          </draw:frame>
        </presentation:notes>
      </draw:page>
      <draw:page draw:name="page22" draw:style-name="dp1" draw:master-page-name="simple-light-2">
        <draw:custom-shape draw:name="Google Shape;1227;p89"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228;p89"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229;p89"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231;p89">
          <draw:custom-shape draw:name="Google Shape;1232;p89"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33;p89">
            <draw:custom-shape draw:name="Google Shape;1234;p89"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235;p89"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236;p89"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237;p89"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238;p89">
          <draw:custom-shape draw:name="Google Shape;1230;p89"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39;p89">
            <draw:custom-shape draw:name="Google Shape;1240;p89"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241;p89"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242;p89"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243;p89">
            <draw:custom-shape draw:name="Google Shape;1244;p89"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245;p89"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246;p89">
            <draw:custom-shape draw:name="Google Shape;1247;p89"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248;p89"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249;p89"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250;p89"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251;p89"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252;p89">
          <draw:custom-shape draw:name="Google Shape;1253;p89"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4;p89"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255;p89">
            <draw:custom-shape draw:name="Google Shape;1256;p89"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257;p89"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258;p89"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259;p89">
          <draw:custom-shape draw:name="Google Shape;1260;p89"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61;p89">
            <draw:custom-shape draw:name="Google Shape;1262;p89"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263;p89"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264;p89"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265;p89"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266;p89"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267;p89"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268;p89"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269;p89"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270;p89" draw:style-name="gr37" draw:text-style-name="P7" draw:layer="layout" svg:width="2.287cm" svg:height="2.287cm" svg:x="8.017cm" svg:y="0.42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1;p89"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72;p89"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273;p89" draw:style-name="gr14" draw:text-style-name="P7" draw:layer="layout" svg:width="25.002cm" svg:height="1.778cm" svg:x="0.053cm" svg:y="12.512cm">
          <text:p text:style-name="P3"><text:span text:style-name="T53"><text:a xlink:href="https://www.forskningsradet.no/en/research-policy-strategy/open-science/research-data/" xlink:type="simple">https://www.forskningsradet.no/en/research-policy-strategy/open-science/research-data/</text:a></text:span><text:span text:style-name="T54"><text:s/></text:span><text:span text:style-name="T53"><text:a xlink:href="https://www.scienceeurope.org/our-resources/practical-guide-to-the-international-alignment-of-research-data-management/" xlink:type="simple">https://www.scienceeurope.org/our-resources/practical-guide-to-the-international-alignment-of-research-data-management/</text:a></text:span><text:span text:style-name="T55"><text:s text:c="2"/></text:span></text:p>
          <text:p text:style-name="P3"><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4;p89" draw:style-name="gr14" draw:text-style-name="P7" draw:layer="layout" svg:width="25.399cm" svg:height="7.277cm" svg:x="0.442cm" svg:y="3.948cm">
          <text:p xml:id="id97" text:id="id97" text:style-name="P33"><text:span text:style-name="T48"/></text:p>
          <text:p xml:id="id98" text:id="id98" text:style-name="P35"><text:span text:style-name="T46">DMP is constantly updated</text:span></text:p>
          <text:p xml:id="id99" text:id="id99" text:style-name="P35"><text:span text:style-name="T56">Changes do not have to reported to RCN</text:span></text:p>
          <text:p xml:id="id100" text:id="id100" text:style-name="P35"><text:span text:style-name="T56">Early deposition &amp; sharing</text:span></text:p>
          <text:p xml:id="id101" text:id="id101" text:style-name="P35"><text:span text:style-name="T58"><text:s/></text:span></text:p>
          <text:p xml:id="id102" text:id="id102" text:style-name="P20"><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draw:page-thumbnail draw:name="Google Shape;1224;g3414daac41a_0_1957:notes" draw:style-name="gr3" draw:layer="layout" svg:width="16.932cm" svg:height="9.524cm" svg:x="1.059cm" svg:y="1.905cm" draw:page-number="22" presentation:class="page"/>
          <draw:frame draw:name="Google Shape;1225;g3414daac41a_0_1957:notes" presentation:style-name="pr25" draw:text-style-name="P9" draw:layer="layout" svg:width="15.239cm" svg:height="11.429cm" svg:x="1.905cm" svg:y="12.065cm" presentation:class="notes" presentation:placeholder="true" presentation:user-transformed="true">
            <draw:text-box/>
          </draw:frame>
        </presentation:notes>
      </draw:page>
      <draw:page draw:name="page23" draw:style-name="dp1" draw:master-page-name="simple-light-2">
        <draw:custom-shape draw:name="Google Shape;1279;p90" draw:style-name="gr31" draw:text-style-name="P8" draw:layer="layout" svg:width="1.9cm" svg:height="0.018cm" svg:x="2.182cm" svg:y="1.544cm">
          <text:p/>
          <draw:enhanced-geometry draw:mirror-horizontal="false" draw:mirror-vertical="false" svg:viewBox="0 0 21600 21600" draw:type="mso-spt32" draw:enhanced-path="M 0 0 L 21600 21600 N"/>
        </draw:custom-shape>
        <draw:custom-shape draw:name="Google Shape;1280;p90" draw:style-name="gr31" draw:text-style-name="P8"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281;p90" draw:style-name="gr31" draw:text-style-name="P8"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283;p90">
          <draw:custom-shape draw:name="Google Shape;1284;p90" draw:style-name="gr9" draw:text-style-name="P16" draw:layer="layout" svg:width="1.739cm" svg:height="1.739cm" svg:x="0.442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85;p90">
            <draw:custom-shape draw:name="Google Shape;1286;p90" draw:style-name="gr32" draw:text-style-name="P26" draw:layer="layout" svg:width="0.842cm" svg:height="1.085cm" svg:x="0.833cm" svg:y="1.011cm">
              <text:p text:style-name="P3"><text:span text:style-name="T30"/></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287;p90" draw:style-name="gr32" draw:text-style-name="P26" draw:layer="layout" svg:width="0.135cm" svg:height="0.136cm" svg:x="1.25cm" svg:y="1.733cm">
              <text:p text:style-name="P3"><text:span text:style-name="T30"/></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288;p90" draw:style-name="gr32" draw:text-style-name="P26" draw:layer="layout" svg:width="0.165cm" svg:height="0.165cm" svg:x="1.719cm" svg:y="1.232cm">
              <text:p text:style-name="P3"><text:span text:style-name="T30"/></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289;p90" draw:style-name="gr32" draw:text-style-name="P26" draw:layer="layout" svg:width="0.499cm" svg:height="0.498cm" svg:x="1.309cm" svg:y="1.31cm">
              <text:p text:style-name="P3"><text:span text:style-name="T30"/></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290;p90">
          <draw:custom-shape draw:name="Google Shape;1282;p90" draw:style-name="gr33" draw:text-style-name="P27" draw:layer="layout" svg:width="1.739cm" svg:height="1.739cm" svg:x="8.291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91;p90">
            <draw:custom-shape draw:name="Google Shape;1292;p90" draw:style-name="gr32" draw:text-style-name="P26" draw:layer="layout" svg:width="0.129cm" svg:height="0.514cm" svg:x="9.349cm" svg:y="1.692cm">
              <text:p text:style-name="P3"><text:span text:style-name="T30"/></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293;p90" draw:style-name="gr32" draw:text-style-name="P26" draw:layer="layout" svg:width="0.129cm" svg:height="0.37cm" svg:x="9.162cm" svg:y="1.835cm">
              <text:p text:style-name="P3"><text:span text:style-name="T30"/></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294;p90" draw:style-name="gr32" draw:text-style-name="P26" draw:layer="layout" svg:width="0.129cm" svg:height="0.232cm" svg:x="8.974cm" svg:y="1.974cm">
              <text:p text:style-name="P3"><text:span text:style-name="T30"/></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295;p90">
            <draw:custom-shape draw:name="Google Shape;1296;p90" draw:style-name="gr32" draw:text-style-name="P26" draw:layer="layout" svg:width="0.351cm" svg:height="0.149cm" svg:x="8.621cm" svg:y="1.692cm">
              <text:p text:style-name="P3"><text:span text:style-name="T30"/></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297;p90" draw:style-name="gr32" draw:text-style-name="P26" draw:layer="layout" svg:width="0.221cm" svg:height="0.286cm" svg:x="8.687cm" svg:y="1.383cm">
              <text:p text:style-name="P3"><text:span text:style-name="T30"/></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298;p90">
            <draw:custom-shape draw:name="Google Shape;1299;p90" draw:style-name="gr32" draw:text-style-name="P26" draw:layer="layout" svg:width="0.038cm" svg:height="0.038cm" svg:x="9.282cm" svg:y="1.131cm">
              <text:p text:style-name="P3"><text:span text:style-name="T30"/></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300;p90" draw:style-name="gr32" draw:text-style-name="P26" draw:layer="layout" svg:width="0.038cm" svg:height="0.038cm" svg:x="9.166cm" svg:y="1.13cm">
              <text:p text:style-name="P3"><text:span text:style-name="T30"/></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301;p90" draw:style-name="gr32" draw:text-style-name="P26" draw:layer="layout" svg:width="0.038cm" svg:height="0.038cm" svg:x="9.399cm" svg:y="1.13cm">
              <text:p text:style-name="P3"><text:span text:style-name="T30"/></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302;p90" draw:style-name="gr32" draw:text-style-name="P26" draw:layer="layout" svg:width="0.505cm" svg:height="0.33cm" svg:x="9.052cm" svg:y="0.985cm">
              <text:p text:style-name="P3"><text:span text:style-name="T30"/></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303;p90" draw:style-name="gr32" draw:text-style-name="P26" draw:layer="layout" svg:width="0.343cm" svg:height="0.104cm" svg:x="9.13cm" svg:y="1.339cm">
              <text:p text:style-name="P3"><text:span text:style-name="T30"/></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304;p90">
          <draw:custom-shape draw:name="Google Shape;1305;p90" draw:style-name="gr34" draw:text-style-name="P28" draw:layer="layout" svg:width="1.739cm" svg:height="1.739cm" svg:x="12.077cm" svg:y="0.68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6;p90" draw:style-name="gr32" draw:text-style-name="P26" draw:layer="layout" svg:width="0.512cm" svg:height="0.577cm" svg:x="12.335cm" svg:y="0.955cm">
            <text:p text:style-name="P3"><text:span text:style-name="T30"/></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307;p90">
            <draw:custom-shape draw:name="Google Shape;1308;p90" draw:style-name="gr32" draw:text-style-name="P26" draw:layer="layout" svg:width="0.511cm" svg:height="0.228cm" svg:x="13.003cm" svg:y="1.722cm">
              <text:p text:style-name="P3"><text:span text:style-name="T30"/></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309;p90" draw:style-name="gr32" draw:text-style-name="P26" draw:layer="layout" svg:width="0.511cm" svg:height="0.228cm" svg:x="13.003cm" svg:y="1.911cm">
              <text:p text:style-name="P3"><text:span text:style-name="T30"/></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310;p90" draw:style-name="gr32" draw:text-style-name="P26" draw:layer="layout" svg:width="0.511cm" svg:height="0.226cm" svg:x="13.003cm" svg:y="1.535cm">
              <text:p text:style-name="P3"><text:span text:style-name="T30"/></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311;p90">
          <draw:custom-shape draw:name="Google Shape;1312;p90" draw:style-name="gr35" draw:text-style-name="P29" draw:layer="layout" svg:width="1.739cm" svg:height="1.739cm" svg:x="4.083cm" svg:y="0.694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313;p90">
            <draw:custom-shape draw:name="Google Shape;1314;p90" draw:style-name="gr36" draw:text-style-name="P26" draw:layer="layout" svg:width="0.116cm" svg:height="0.097cm" svg:x="4.59cm" svg:y="1.87cm">
              <text:p text:style-name="P3"><text:span text:style-name="T30"/></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315;p90" draw:style-name="gr36" draw:text-style-name="P26" draw:layer="layout" svg:width="0.115cm" svg:height="0.111cm" svg:x="4.418cm" svg:y="1.677cm">
              <text:p text:style-name="P3"><text:span text:style-name="T30"/></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316;p90" draw:style-name="gr36" draw:text-style-name="P26" draw:layer="layout" svg:width="0.105cm" svg:height="0.091cm" svg:x="4.506cm" svg:y="1.78cm">
              <text:p text:style-name="P3"><text:span text:style-name="T30"/></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317;p90" draw:style-name="gr36" draw:text-style-name="P26" draw:layer="layout" svg:width="0.125cm" svg:height="0.536cm" svg:x="4.315cm" svg:y="1.184cm">
              <text:p text:style-name="P3"><text:span text:style-name="T30"/></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318;p90" draw:style-name="gr36" draw:text-style-name="P26" draw:layer="layout" svg:width="0.133cm" svg:height="0.54cm" svg:x="5.457cm" svg:y="1.184cm">
              <text:p text:style-name="P3"><text:span text:style-name="T30"/></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319;p90" draw:style-name="gr36" draw:text-style-name="P26" draw:layer="layout" svg:width="0.888cm" svg:height="0.621cm" svg:x="4.631cm" svg:y="1.053cm">
              <text:p text:style-name="P3"><text:span text:style-name="T30"/></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320;p90" draw:style-name="gr36" draw:text-style-name="P26" draw:layer="layout" svg:width="0.156cm" svg:height="0.091cm" svg:x="4.695cm" svg:y="1.965cm">
              <text:p text:style-name="P3"><text:span text:style-name="T30"/></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321;p90" draw:style-name="gr36" draw:text-style-name="P26" draw:layer="layout" svg:width="1.102cm" svg:height="0.997cm" svg:x="4.385cm" svg:y="1.051cm">
              <text:p text:style-name="P3"><text:span text:style-name="T30"/></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322;p90" draw:style-name="gr37" draw:text-style-name="P7" draw:layer="layout" svg:width="2.287cm" svg:height="2.287cm" svg:x="11.803cm" svg:y="0.41cm">
          <text:p text:style-name="P3"><text:span text:style-name="T3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23;p90" draw:style-name="gr11" draw:text-style-name="P7" draw:layer="layout" svg:width="23.627cm" svg:height="1.057cm" svg:x="-0.022cm" svg:y="13.218cm">
          <text:p text:style-name="P3"><text:span text:style-name="T27"/></text:p>
          <text:p text:style-name="P3"><text:span text:style-name="T27">Illustrative Icons from </text:span><text:span text:style-name="T33"><text:a xlink:href="https://thenounproject.com/vectorslab933/" xlink:type="simple">VectorLab</text:a></text:span><text:span text:style-name="T27">, </text:span><text:span text:style-name="T33"><text:a xlink:href="https://thenounproject.com/zulfahmiabadi/" xlink:type="simple">Zulfahmi Al Ridhawi</text:a></text:span><text:span text:style-name="T27">, </text:span><text:span text:style-name="T33"><text:a xlink:href="https://thenounproject.com/deemakdaksina/" xlink:type="simple">Deemak Daksina</text:a></text:span><text:span text:style-name="T27"><text:s/>&amp; </text:span><text:span text:style-name="T33"><text:a xlink:href="https://thenounproject.com/vectorsmarket/" xlink:type="simple">Vectorsmarket</text:a></text:span><text:span text:style-name="T27"><text:s/>at Noun Project licensed under </text:span><text:span text:style-name="T33"><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4;p90" draw:style-name="gr2" draw:text-style-name="P8" draw:layer="layout" svg:width="3.202cm" svg:height="3.202cm" svg:x="22.66cm" svg:y="-0.728cm">
          <draw:image xlink:href="Pictures/10000201000004B0000004B0F8DB1F3763AE048A.png" xlink:type="simple" xlink:show="embed" xlink:actuate="onLoad">
            <text:p/>
          </draw:image>
        </draw:frame>
        <draw:custom-shape draw:name="Google Shape;1325;p90" draw:style-name="gr14" draw:text-style-name="P7" draw:layer="layout" svg:width="25.002cm" svg:height="1.778cm" svg:x="0.053cm" svg:y="12.512cm">
          <text:p text:style-name="P3"><text:span text:style-name="T53"><text:a xlink:href="https://www.forskningsradet.no/en/research-policy-strategy/open-science/research-data/" xlink:type="simple">https://www.forskningsradet.no/en/research-policy-strategy/open-science/research-data/</text:a></text:span><text:span text:style-name="T54"><text:s/></text:span><text:span text:style-name="T53"><text:a xlink:href="https://www.scienceeurope.org/our-resources/practical-guide-to-the-international-alignment-of-research-data-management/" xlink:type="simple">https://www.scienceeurope.org/our-resources/practical-guide-to-the-international-alignment-of-research-data-management/</text:a></text:span><text:span text:style-name="T55"><text:s text:c="2"/></text:span></text:p>
          <text:p text:style-name="P3"><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6;p90" draw:style-name="gr14" draw:text-style-name="P7" draw:layer="layout" svg:width="24.481cm" svg:height="8.785cm" svg:x="0.442cm" svg:y="3.948cm">
          <text:p xml:id="id103" text:id="id103" text:style-name="P33"><text:span text:style-name="T48"/></text:p>
          <text:p xml:id="id104" text:id="id104" text:style-name="P20"><text:span text:style-name="T46">Final version of the data management plan in connection with the final report of the project.</text:span></text:p>
          <text:p xml:id="id105" text:id="id105" text:style-name="P35"><text:span text:style-name="T56"/></text:p>
          <text:p xml:id="id106" text:id="id106" text:style-name="P35"><text:span text:style-name="T56">Data is deposited to trustworthy repository</text:span></text:p>
          <text:p xml:id="id107" text:id="id107" text:style-name="P35"><text:span text:style-name="T58"><text:s/></text:span></text:p>
          <text:p xml:id="id108" text:id="id108" text:style-name="P20"><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seq>
        </anim:par>
        <presentation:notes draw:style-name="dp2">
          <draw:page-thumbnail draw:name="Google Shape;1276;g3414daac41a_0_2008:notes" draw:style-name="gr3" draw:layer="layout" svg:width="16.932cm" svg:height="9.524cm" svg:x="1.059cm" svg:y="1.905cm" draw:page-number="23" presentation:class="page"/>
          <draw:frame draw:name="Google Shape;1277;g3414daac41a_0_2008:notes" presentation:style-name="pr26" draw:text-style-name="P9" draw:layer="layout" svg:width="15.239cm" svg:height="11.429cm" svg:x="1.905cm" svg:y="12.065cm" presentation:class="notes" presentation:placeholder="true" presentation:user-transformed="true">
            <draw:text-box/>
          </draw:frame>
        </presentation:notes>
      </draw:page>
      <draw:page draw:name="Please contact us!" draw:style-name="dp1" draw:master-page-name="OBJECT" presentation:presentation-page-layout-name="AL3T11">
        <draw:frame draw:name="Google Shape;1331;p91" draw:style-name="gr2" draw:text-style-name="P8" draw:layer="layout" svg:width="5.415cm" svg:height="3.749cm" svg:x="1.008cm" svg:y="3.671cm">
          <draw:image xlink:href="Pictures/100002010000012C000000D0A5176DFA0FC2DED0.png" xlink:type="simple" xlink:show="embed" xlink:actuate="onLoad">
            <text:p/>
          </draw:image>
        </draw:frame>
        <draw:custom-shape draw:name="Google Shape;1332;p91" draw:style-name="gr23" draw:text-style-name="P7" draw:layer="layout" svg:width="9.215cm" svg:height="1.829cm" svg:x="6.885cm" svg:y="3.671cm">
          <text:p text:style-name="P3"><text:span text:style-name="T59">Horizon Europ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3;p91" draw:style-name="gr23" draw:text-style-name="P7" draw:layer="layout" svg:width="20.502cm" svg:height="0.939cm" svg:x="4.834cm" svg:y="13.28cm">
          <text:p text:style-name="P3"><text:span text:style-name="T60"><text:a xlink:href="https://ec.europa.eu/info/funding-tenders/opportunities/docs/2021-2027/horizon/guidance/programme-guide_horizon_en.pdf" xlink:type="simple">https://ec.europa.eu/info/funding-tenders/opportunities/docs/2021-2027/horizon/guidance/programme-guide_horizon_en.pdf</text:a></text:span></text:p>
          <text:p text:style-name="P3"><text:span text:style-name="T60"><text:a xlink:href="https://ec.europa.eu/info/funding-tenders/opportunities/docs/2021-2027/common/agr-contr/general-mga_horizon-euratom_en.pdf" xlink:type="simple">https://ec.europa.eu/info/funding-tenders/opportunities/docs/2021-2027/common/agr-contr/general-mga_horizon-euratom_en.pdf</text:a></text:span><text:span text:style-name="T61"><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4;p91" presentation:style-name="pr27" draw:text-style-name="P36" draw:layer="layout" svg:width="23.667cm" svg:height="1.59cm" svg:x="1.294cm" svg:y="1.211cm" presentation:class="title" presentation:user-transformed="true">
          <draw:text-box>
            <text:p text:style-name="P3"><text:span text:style-name="T62">Please contact us!</text:span></text:p>
          </draw:text-box>
        </draw:frame>
        <draw:custom-shape draw:name="Google Shape;1335;p91" draw:style-name="gr14" draw:text-style-name="P7" draw:layer="layout" svg:width="17.314cm" svg:height="6.429cm" svg:x="7.106cm" svg:y="5.605cm">
          <text:p text:style-name="P3"><text:span text:style-name="T63">Open Science</text:span><text:span text:style-name="T35"> (OA, RDM, citizens engagement etc.) </text:span><text:span text:style-name="T63">embedded throughout</text:span><text:span text:style-name="T35"> HE</text:span></text:p>
          <text:p text:style-name="P3"><text:span text:style-name="T35"/></text:p>
          <text:p text:style-name="P3"><text:span text:style-name="T35">14. Dissemination and exploitation of research results &amp; </text:span></text:p>
          <text:p text:style-name="P3"><text:span text:style-name="T35">16. Open science</text:span></text:p>
          <text:p text:style-name="P37"><text:span text:style-name="T35"/></text:p>
          <text:list text:style-name="L11">
            <text:list-item>
              <text:list>
                <text:list-item>
                  <text:p text:style-name="P3"><text:span text:style-name="T35">“</text:span><text:span text:style-name="T64">Open science practices are addressed and evaluated under ‘excellence’</text:span><text:span text:style-name="T65"> as they are considered a part of the methodology</text:span><text:span text:style-name="T35">.”</text:span></text:p>
                </text:list-item>
              </text:list>
            </text:list-item>
          </text:list>
          <text:p text:style-name="P38"><text:span text:style-name="T35"/></text:p>
          <text:list text:continue-numbering="true" text:style-name="L11">
            <text:list-item>
              <text:list>
                <text:list-item>
                  <text:p text:style-name="P3"><text:span text:style-name="T35">“</text:span><text:span text:style-name="T64">Data management plans are mandatory for all projects</text:span><text:span text:style-name="T65"> generating or reusing data and should be aligned with the D&amp;E plan.</text:span><text:span text:style-name="T35">”</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8;g3414daac41a_0_2318:notes" presentation:style-name="pr28" draw:text-style-name="P21" draw:layer="layout" svg:width="15.239cm" svg:height="11.429cm" svg:x="1.905cm" svg:y="12.065cm" presentation:class="notes" presentation:user-transformed="true">
            <draw:text-box>
              <text:p text:style-name="P3"><text:span text:style-name="T66">We can also look to the international requirements, like from Horizon Europe program</text:span></text:p>
              <text:p text:style-name="P3"><text:span text:style-name="T66"/></text:p>
              <text:p text:style-name="P3"><text:span text:style-name="T67">As part of the European Commission’s goal to advance Open Science policy and practices – it is a mandatory component in Horizon Europe that all projects involving data include a DMP. Practically speaking, an initial DMP should be presented in the proposal. Later on, funded projects are required to provide a detailed DMP as a mandatory deliverable within 6 months from the grant signature date. </text:span></text:p>
            </draw:text-box>
          </draw:frame>
          <draw:page-thumbnail draw:name="Google Shape;1329;g3414daac41a_0_2318:notes" draw:style-name="gr3" draw:layer="layout" svg:width="12.7cm" svg:height="9.524cm" svg:x="3.176cm" svg:y="1.905cm" draw:page-number="24" presentation:class="page"/>
        </presentation:notes>
      </draw:page>
      <draw:page draw:name="page25" draw:style-name="dp1" draw:master-page-name="OBJECT" presentation:presentation-page-layout-name="AL3T11">
        <draw:frame draw:name="Google Shape;1340;p92" presentation:style-name="pr29" draw:text-style-name="P39" draw:layer="layout" svg:width="22.858cm" svg:height="2.384cm" svg:x="1.27cm" svg:y="0.569cm" presentation:class="title" presentation:placeholder="true" presentation:user-transformed="true">
          <draw:text-box/>
        </draw:frame>
        <draw:frame draw:name="Google Shape;1341;p92" presentation:style-name="pr30" draw:text-style-name="P40" draw:layer="layout" svg:width="22.858cm" svg:height="8.285cm" svg:x="1.27cm" svg:y="3.343cm" presentation:class="outline" presentation:placeholder="true" presentation:user-transformed="true">
          <draw:text-box/>
        </draw:frame>
        <draw:frame draw:name="Google Shape;1342;p92" draw:style-name="gr2" draw:text-style-name="P8" draw:layer="layout" svg:width="13.48cm" svg:height="12.409cm" svg:x="11.035cm" svg:y="0.15cm">
          <draw:image xlink:href="Pictures/10000201000004860000042A3A2BD5FC10F1B2C2.png" xlink:type="simple" xlink:show="embed" xlink:actuate="onLoad">
            <text:p/>
          </draw:image>
        </draw:frame>
        <draw:g draw:name="Google Shape;1343;p92">
          <draw:custom-shape draw:name="Google Shape;1344;p92" draw:style-name="gr40" draw:text-style-name="P41" draw:layer="layout" svg:width="1.691cm" svg:height="1.507cm" svg:x="3.585cm" svg:y="2.019cm">
            <text:p text:style-name="P3"/>
            <draw:enhanced-geometry draw:mirror-horizontal="false" draw:mirror-vertical="false" drawooo:sub-view-size="1687181 1335785" draw:text-areas="0 0 ?f0 ?f1" svg:viewBox="0 0 0 0" draw:type="ooxml-non-primitive" draw:enhanced-path="M 1493730 0 C 1587857 0 1636848 48387 1640723 145161 L 1687182 1335786 1309894 1335786 1269242 313658 1240205 313658 1108635 995077 C 1095945 1080230 1043069 1122807 950028 1122807 L 733251 1122807 C 641666 1122807 588162 1080230 572739 995077 L 439170 313658 410133 313658 377574 1335786 0 1335786 46364 145161 C 50295 48387 99325 0 193452 0 L 555222 0 C 645474 0 698340 43244 713830 129730 L 810556 660178 C 815697 692372 820076 725329 823122 758857 826169 792385 829311 826008 831881 859536 L 849303 859536 C 853235 826008 856796 792449 859966 758857 863108 725329 867297 692182 872533 660178 L 963451 129730 C 979064 43244 1032635 0 1124154 0 Z N">
              <draw:equation draw:name="f0" draw:formula="logwidth"/>
              <draw:equation draw:name="f1" draw:formula="logheight"/>
            </draw:enhanced-geometry>
          </draw:custom-shape>
          <draw:custom-shape draw:name="Google Shape;1345;p92" draw:style-name="gr41" draw:text-style-name="P42" draw:layer="layout" svg:width="1.03cm" svg:height="1.507cm" svg:x="5.428cm" svg:y="2.019cm">
            <text:p text:style-name="P3"/>
            <draw:enhanced-geometry draw:mirror-horizontal="false" draw:mirror-vertical="false" drawooo:sub-view-size="1027808 1335785" draw:text-areas="0 0 ?f0 ?f1" svg:viewBox="0 0 0 0" draw:type="ooxml-non-primitive" draw:enhanced-path="M 614914 1335786 L 1027808 1335786 806081 968502 C 791972 941822 774579 917021 754291 894683 739506 876601 722046 860893 702501 848106 L 702501 841343 C 720865 828789 738183 814773 754291 799433 775045 780556 792543 758382 806081 733806 L 993726 440055 582736 440055 412418 737426 361199 737426 C 363103 725710 364912 713708 366435 701612 372281 655262 375270 608597 375384 561880 L 375384 0 0 0 0 1335786 375384 1335786 375384 1079564 C 374861 1039616 370976 999792 363770 960501 363008 956501 362342 952690 361580 948785 L 411371 948785 Z N">
              <draw:equation draw:name="f0" draw:formula="logwidth"/>
              <draw:equation draw:name="f1" draw:formula="logheight"/>
            </draw:enhanced-geometry>
          </draw:custom-shape>
          <draw:custom-shape draw:name="Google Shape;1346;p92" draw:style-name="gr41" draw:text-style-name="P42" draw:layer="layout" svg:width="0.402cm" svg:height="0.375cm" svg:x="6.459cm" svg:y="2.019cm">
            <text:p text:style-name="P3"/>
            <draw:enhanced-geometry draw:mirror-horizontal="false" draw:mirror-vertical="false" drawooo:sub-view-size="401755 333375" draw:text-areas="0 0 ?f0 ?f1" svg:viewBox="0 0 0 0" draw:type="ooxml-non-primitive" draw:enhanced-path="M 116147 333375 L 285608 333375 C 362980 333375 401689 294005 401756 215265 L 401756 118110 C 401756 39434 363036 64 285608 0 L 116147 0 C 38652 0 -66 39370 0 118110 L 0 215265 C 0 294068 38719 333439 116147 333375 Z N">
              <draw:equation draw:name="f0" draw:formula="logwidth"/>
              <draw:equation draw:name="f1" draw:formula="logheight"/>
            </draw:enhanced-geometry>
          </draw:custom-shape>
          <draw:custom-shape draw:name="Google Shape;1347;p92" draw:style-name="gr41" draw:text-style-name="P42" draw:layer="layout" svg:width="1.069cm" svg:height="1.268cm" svg:x="6.461cm" svg:y="2.258cm">
            <text:p text:style-name="P3"/>
            <draw:enhanced-geometry draw:mirror-horizontal="false" draw:mirror-vertical="false" drawooo:sub-view-size="1066936 1124330" draw:text-areas="0 0 ?f0 ?f1" svg:viewBox="0 0 0 0" draw:type="ooxml-non-primitive" draw:enhanced-path="M 1066937 447675 L 1066937 228600 856158 228600 856158 0 488580 0 488580 229457 0 228410 0 1124331 364150 1124331 364150 447104 488961 447675 489818 880015 C 489818 956662 514789 1016508 564742 1059561 614695 1102614 682098 1124112 766953 1124045 794847 1124045 827026 1122236 863584 1118807 900141 1115378 936509 1110329 972496 1103948 1003560 1098985 1033968 1090517 1063128 1078706 L 1023429 844868 931082 844868 C 904302 844868 885261 839915 873961 830009 862660 820103 856853 804224 856538 782384 L 856538 447675 Z N">
              <draw:equation draw:name="f0" draw:formula="logwidth"/>
              <draw:equation draw:name="f1" draw:formula="logheight"/>
            </draw:enhanced-geometry>
          </draw:custom-shape>
          <draw:custom-shape draw:name="Google Shape;1348;p92" draw:style-name="gr40" draw:text-style-name="P41" draw:layer="layout" svg:width="1.168cm" svg:height="1.507cm" svg:x="1.128cm" svg:y="2.019cm">
            <text:p text:style-name="P3"/>
            <draw:enhanced-geometry draw:mirror-horizontal="false" draw:mirror-vertical="false" drawooo:sub-view-size="1165185 1335785" draw:text-areas="0 0 ?f0 ?f1" svg:viewBox="0 0 0 0" draw:type="ooxml-non-primitive" draw:enhanced-path="M 1062367 931259 C 1052275 877855 1034539 836803 1009148 808101 986785 781781 958720 760901 927084 747046 901647 736043 874791 728669 847304 725138 L 847304 713708 C 915914 706088 969639 687641 1008482 658368 1046392 630243 1074962 591342 1090452 546735 1106503 499750 1114424 450368 1113871 400717 1113871 297656 1094479 217201 1055703 159353 1016927 101505 956977 60484 875865 36290 794181 12097 688506 0 558840 0 471063 0 396360 317 334733 953 273105 1588 216522 3175 164986 5715 142614 6858 119384 8382 95679 10192 L 385000 225838 C 493625 149928 643189 176494 719061 285174 794933 393853 768380 543492 659755 619401 551129 695311 401565 668745 325693 560065 297556 519761 282467 471786 282466 422624 282445 399809 285651 377104 291987 355187 L 0 137446 0 1335786 406230 1335786 406230 853535 C 444692 853535 487279 853980 533992 854869 569598 854869 595366 860615 611296 872109 627227 883603 638969 907764 646521 944594 L 732204 1335786 1165186 1335786 Z N">
              <draw:equation draw:name="f0" draw:formula="logwidth"/>
              <draw:equation draw:name="f1" draw:formula="logheight"/>
            </draw:enhanced-geometry>
          </draw:custom-shape>
          <draw:custom-shape draw:name="Google Shape;1349;p92" draw:style-name="gr41" draw:text-style-name="P42" draw:layer="layout" svg:width="0.199cm" svg:height="0.224cm" svg:x="1.552cm" svg:y="2.383cm">
            <text:p text:style-name="P3"/>
            <draw:enhanced-geometry draw:mirror-horizontal="false" draw:mirror-vertical="false" drawooo:sub-view-size="199164 199263" draw:text-areas="0 0 ?f0 ?f1" svg:viewBox="0 0 0 0" draw:type="ooxml-non-primitive" draw:enhanced-path="M 199164 99631 C 199164 154656 154580 199263 99582 199263 44584 199263 0 154656 0 99631 0 44607 44584 0 99582 0 154580 0 199164 44607 199164 99631 Z N">
              <draw:equation draw:name="f0" draw:formula="logwidth"/>
              <draw:equation draw:name="f1" draw:formula="logheight"/>
            </draw:enhanced-geometry>
          </draw:custom-shape>
          <draw:custom-shape draw:name="Google Shape;1350;p92" draw:style-name="gr40" draw:text-style-name="P41" draw:layer="layout" svg:width="1.163cm" svg:height="1.508cm" svg:x="2.359cm" svg:y="2.018cm">
            <text:p text:style-name="P3"/>
            <draw:enhanced-geometry draw:mirror-horizontal="false" draw:mirror-vertical="false" drawooo:sub-view-size="1160806 1336452" draw:text-areas="0 0 ?f0 ?f1" svg:viewBox="0 0 0 0" draw:type="ooxml-non-primitive" draw:enhanced-path="M 1128818 340709 C 1107426 254096 1072934 186023 1025333 136493 977732 86963 915402 51816 838355 31052 761050 10351 666581 0 554936 0 444568 0 345176 1873 256762 5620 168347 9366 82760 13843 0 19050 L 0 1317593 C 81493 1322613 167395 1326995 257714 1330738 348032 1334481 447100 1336386 554936 1336453 666638 1336453 761050 1326099 838164 1305401 915279 1284703 977665 1249613 1025333 1200150 1072934 1150620 1107426 1082545 1128818 995934 1150210 909320 1160873 800131 1160806 668369 1160806 536543 1150144 427323 1128818 340709 Z M 714591 899732 C 704567 953767 687011 990790 661944 1010793 636877 1030796 601110 1040825 554651 1040892 502861 1040892 453955 1040511 407943 1039749 L 407943 295275 554651 295275 C 601110 295275 636877 305308 661944 325374 687011 345440 704567 382555 714591 436721 724616 490633 729633 567785 729633 668179 729633 768572 724616 845756 714591 899732 Z N">
              <draw:equation draw:name="f0" draw:formula="logwidth"/>
              <draw:equation draw:name="f1" draw:formula="logheight"/>
            </draw:enhanced-geometry>
          </draw:custom-shape>
        </draw:g>
        <draw:frame draw:name="Google Shape;1351;p92" draw:style-name="gr2" draw:text-style-name="P8" draw:layer="layout" svg:width="8.21cm" svg:height="6.276cm" svg:x="0.125cm" svg:y="5.647cm">
          <draw:image xlink:href="Pictures/1000020100000535000003AC917C3A2178C49C0B.png" xlink:type="simple" xlink:show="embed" xlink:actuate="onLoad">
            <text:p/>
          </draw:image>
        </draw:frame>
        <draw:custom-shape draw:name="Google Shape;1352;p92" draw:style-name="gr42" draw:text-style-name="P7" draw:layer="layout" svg:width="2.665cm" svg:height="1.506cm" svg:x="5.561cm" svg:y="8.862cm">
          <text:p text:style-name="P3"><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3;p92" draw:style-name="gr43" draw:text-style-name="P7" draw:layer="layout" svg:width="17.577cm" svg:height="1.217cm" svg:x="2.409cm" svg:y="12.56cm">
          <text:p text:style-name="P3"><text:span text:style-name="T68"><text:a xlink:href="https://rdmkit.elixir-europe.org/index.html" xlink:type="simple">https://rdmkit.elixir-europe.org</text:a></text:span><text:span text:style-name="T69">/national_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4;p92" draw:style-name="gr2" draw:text-style-name="P8" draw:layer="layout" svg:width="0.727cm" svg:height="0.88cm" svg:x="1.653cm" svg:y="12.657cm">
          <draw:image xlink:href="Pictures/10000201000000B1000000D66713A2414261FC79.png" xlink:type="simple" xlink:show="embed" xlink:actuate="onLoad">
            <text:p/>
          </draw:image>
        </draw:frame>
        <presentation:notes draw:style-name="dp2">
          <draw:page-thumbnail draw:name="Google Shape;1337;g3414daac41a_0_2855:notes" draw:style-name="gr3" draw:layer="layout" svg:width="16.932cm" svg:height="9.524cm" svg:x="1.059cm" svg:y="1.905cm" draw:page-number="25" presentation:class="page"/>
          <draw:frame draw:name="Google Shape;1338;g3414daac41a_0_2855:notes" presentation:style-name="pr31" draw:text-style-name="P9" draw:layer="layout" svg:width="15.239cm" svg:height="11.429cm" svg:x="1.905cm" svg:y="12.065cm" presentation:class="notes" presentation:placeholder="true" presentation:user-transformed="true">
            <draw:text-box/>
          </draw:frame>
        </presentation:notes>
      </draw:page>
      <draw:page draw:name="page26" draw:style-name="dp1" draw:master-page-name="Default">
        <draw:frame draw:name="Google Shape;1359;p93" draw:style-name="gr2" draw:text-style-name="P8" xml:id="id115" draw:id="id115" draw:layer="layout" svg:width="3.202cm" svg:height="3.202cm" svg:x="17.94cm" svg:y="11.443cm">
          <draw:image xlink:href="Pictures/10000201000004B0000004B0F8DB1F3763AE048A.png" xlink:type="simple" xlink:show="embed" xlink:actuate="onLoad">
            <text:p/>
          </draw:image>
        </draw:frame>
        <draw:frame draw:name="Google Shape;1360;p93" draw:style-name="gr2" draw:text-style-name="P8" xml:id="id111" draw:id="id111" draw:layer="layout" svg:width="5.042cm" svg:height="2.056cm" svg:x="16.263cm" svg:y="8.249cm">
          <draw:image xlink:href="Pictures/10000201000002EE00000132BB556BE18EA9050C.png" xlink:type="simple" xlink:show="embed" xlink:actuate="onLoad">
            <text:p/>
          </draw:image>
        </draw:frame>
        <draw:custom-shape draw:name="Google Shape;1361;p93" draw:style-name="gr23" draw:text-style-name="P7" xml:id="id112" draw:id="id112" draw:layer="layout" svg:width="5.571cm" svg:height="1.007cm" svg:x="17.584cm" svg:y="7.267cm">
          <text:p text:style-name="P3"><text:span text:style-name="T34">Full compl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2;p93" draw:style-name="gr2" draw:text-style-name="P8" draw:layer="layout" svg:width="7.799cm" svg:height="4.046cm" svg:x="-0.675cm" svg:y="-0.9cm">
          <draw:image xlink:href="Pictures/1000020100000384000001D3AABFC367368E9B98.png" xlink:type="simple" xlink:show="embed" xlink:actuate="onLoad">
            <text:p/>
          </draw:image>
        </draw:frame>
        <draw:custom-shape draw:name="Google Shape;1363;p93" draw:style-name="gr23" draw:text-style-name="P7" draw:layer="layout" svg:width="26.541cm" svg:height="2.032cm" svg:x="0.15cm" svg:y="4.65cm">
          <text:p text:style-name="P3"><text:span text:style-name="T70">Filled questionnaire → Template → DMP in various formats</text:span></text:p>
          <text:p text:style-name="P3"><text:span text:style-name="T63"><text:tab/></text:span><text:span text:style-name="T63"><text:tab/></text:span><text:span text:style-name="T63"><text:tab/></text:span><text:span text:style-name="T35">once</text:span><text:span text:style-name="T35"><text:tab/></text:span><text:span text:style-name="T35"><text:tab/></text:span><text:span text:style-name="T35"><text:tab/></text:span><text:span text:style-name="T35"><text:tab/></text:span><text:span text:style-name="T35"><text:tab/></text:span><text:span text:style-name="T35">per funding body</text:span><text:span text:style-name="T35"><text:tab/></text:span><text:span text:style-name="T35"><text:tab/></text:span><text:span text:style-name="T35"><text:tab/></text:span><text:span text:style-name="T35">.docx, .tex, .html, .json, incl. </text:span><text:span text:style-name="T63">maDMP</text:span></text:p>
          <text:p text:style-name="P3"><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4;p93" draw:style-name="gr2" draw:text-style-name="P8" xml:id="id109" draw:id="id109" draw:layer="layout" svg:width="3.627cm" svg:height="3.905cm" svg:x="6.176cm" svg:y="7.117cm">
          <draw:image xlink:href="Pictures/10000201000005D100000643D1C73E1E3C19B05D.png" xlink:type="simple" xlink:show="embed" xlink:actuate="onLoad">
            <text:p/>
          </draw:image>
        </draw:frame>
        <draw:frame draw:name="Google Shape;1365;p93" draw:style-name="gr2" draw:text-style-name="P8" draw:layer="layout" svg:width="2.261cm" svg:height="0.773cm" svg:x="7.898cm" svg:y="9.229cm">
          <draw:image xlink:href="Pictures/100002010000007200000027FA84B0254A923D8A.png" xlink:type="simple" xlink:show="embed" xlink:actuate="onLoad">
            <text:p/>
          </draw:image>
        </draw:frame>
        <draw:custom-shape draw:name="Google Shape;1366;p93" draw:style-name="gr11" draw:text-style-name="P7" draw:layer="layout" svg:width="1.693cm" svg:height="0.973cm" svg:x="8.304cm" svg:y="8.249cm">
          <text:p text:style-name="P3"><text:span text:style-name="T63">Lo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7;p93" draw:style-name="gr23" draw:text-style-name="P7" draw:layer="layout" svg:width="5.042cm" svg:height="1.311cm" svg:x="0.199cm" svg:y="12.817cm">
          <text:p text:style-name="P3"><text:span text:style-name="T71"/></text:p>
          <text:p text:style-name="P3"><text:span text:style-name="T60"><text:a xlink:href="https://ds-wizard.org" xlink:type="simple">https://</text:a></text:span><text:span text:style-name="T60"><text:a xlink:href="https://ds-wizard.org" xlink:type="simple">ds-wizard.org</text:a></text:span><text:span text:style-name="T25"><text:s/></text:span></text:p>
          <text:p text:style-name="P3"><text:span text:style-name="T60"><text:a xlink:href="https://github.com/ds-wizard" xlink:type="simple">https://</text:a></text:span><text:span text:style-name="T60"><text:a xlink:href="https://github.com/ds-wizard" xlink:type="simple">github.com/ds-wizard</text:a></text:span><text:span text:style-name="T25"><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8;p93" draw:style-name="gr23" draw:text-style-name="P7" xml:id="id110" draw:id="id110" draw:layer="layout" svg:width="10.606cm" svg:height="1.035cm" svg:x="0.256cm" svg:y="8.123cm">
          <text:p text:style-name="P3"><text:span text:style-name="T34">Adapted for users </text:span></text:p>
          <text:p text:style-name="P3"><text:span text:style-name="T34">in Nor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9;p93" draw:style-name="gr23" draw:text-style-name="P7" xml:id="id113" draw:id="id113" draw:layer="layout" svg:width="5.571cm" svg:height="1.007cm" svg:x="17.741cm" svg:y="11.189cm">
          <text:p text:style-name="P3"><text:span text:style-name="T34">Recommended 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0;p93" draw:style-name="gr2" draw:text-style-name="P8" xml:id="id114" draw:id="id114" draw:layer="layout" svg:width="2.435cm" svg:height="1.524cm" svg:x="20.719cm" svg:y="12.604cm">
          <draw:image xlink:href="Pictures/100002010000010E000000A980C1533D2BEB681C.png" xlink:type="simple" xlink:show="embed" xlink:actuate="onLoad">
            <text:p/>
          </draw:image>
        </draw:frame>
        <draw:frame draw:name="Google Shape;1371;p93" draw:style-name="gr2" draw:text-style-name="P8" draw:layer="layout" svg:width="4.424cm" svg:height="0.982cm" svg:x="8.936cm" svg:y="10.206cm">
          <draw:image xlink:href="Pictures/10000201000001C200000064DC82F9BC06ACC6B2.png" xlink:type="simple" xlink:show="embed" xlink:actuate="onLoad">
            <text:p/>
          </draw:image>
        </draw:frame>
        <draw:frame draw:name="Google Shape;1372;p93" draw:style-name="gr2" draw:text-style-name="P8" draw:layer="layout" svg:width="3.202cm" svg:height="2.003cm" svg:x="21.683cm" svg:y="9.019cm">
          <draw:image xlink:href="Pictures/100002010000038400000233509A5FD84F6B083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fade-in">
                  <anim:set smil:begin="0s" smil:dur="0.001s" smil:fill="hold" smil:targetElement="id115" smil:attributeName="visibility" smil:to="visible"/>
                  <anim:transitionFilter smil:dur="0.001s" smil:targetElement="id115" smil:type="fade" smil:subtype="crossfade"/>
                </anim:par>
              </anim:par>
            </anim:par>
          </anim:seq>
        </anim:par>
        <presentation:notes draw:style-name="dp2">
          <draw:frame draw:name="Google Shape;1356;g3414daac41a_0_2771:notes" presentation:style-name="pr32" draw:text-style-name="P9" draw:layer="layout" svg:width="17.27cm" svg:height="12.571cm" svg:x="2.159cm" svg:y="13.271cm" presentation:class="notes" presentation:placeholder="true" presentation:user-transformed="true">
            <draw:text-box/>
          </draw:frame>
          <draw:page-thumbnail draw:name="Google Shape;1357;g3414daac41a_0_2771:notes" draw:style-name="gr3" draw:layer="layout" svg:width="18.623cm" svg:height="10.475cm" svg:x="1.482cm" svg:y="2.123cm" draw:page-number="26" presentation:class="page"/>
        </presentation:notes>
      </draw:page>
      <draw:page draw:name="page27" draw:style-name="dp1" draw:master-page-name="Default_20_1" presentation:presentation-page-layout-name="AL1T1">
        <draw:custom-shape draw:name="Google Shape;1377;p94" draw:style-name="gr44" draw:text-style-name="P7" draw:layer="layout" svg:width="23.666cm" svg:height="5.7cm" svg:x="0.866cm" svg:y="2.068cm">
          <text:p text:style-name="P43"><text:span text:style-name="T72">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8;p94" draw:style-name="gr20" draw:text-style-name="P7" draw:layer="layout" svg:width="23.666cm" svg:height="2.2cm" svg:x="0.866cm" svg:y="7.873cm">
          <text:p text:style-name="P43"><text:span text:style-name="T73">The FAIR data 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74;g3414daac41a_0_2517:notes" presentation:style-name="pr33" draw:text-style-name="P9" draw:layer="layout" svg:width="17.27cm" svg:height="12.571cm" svg:x="2.159cm" svg:y="13.271cm" presentation:class="notes" presentation:placeholder="true" presentation:user-transformed="true">
            <draw:text-box/>
          </draw:frame>
          <draw:page-thumbnail draw:name="Google Shape;1375;g3414daac41a_0_2517:notes" draw:style-name="gr3" draw:layer="layout" svg:width="18.623cm" svg:height="10.475cm" svg:x="1.482cm" svg:y="2.123cm" draw:page-number="27" presentation:class="page"/>
        </presentation:notes>
      </draw:page>
      <draw:page draw:name="page28" draw:style-name="dp1" draw:master-page-name="Default_20_2" presentation:presentation-page-layout-name="AL2T19">
        <draw:custom-shape draw:name="Google Shape;1383;p95" draw:style-name="gr20" draw:text-style-name="P7" draw:layer="layout" svg:width="23.666cm" svg:height="1.589cm" svg:x="0.866cm" svg:y="1.236cm">
          <text:p text:style-name="P43"><text:span text:style-name="T74">F</text:span><text:span text:style-name="T75">AIR</text:span><text:span text:style-name="T74">: Findable </text:span><text:span text:style-name="T75">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4;p95" draw:style-name="gr45" draw:text-style-name="P8" draw:layer="layout" svg:width="21.101cm" svg:height="5.223cm" svg:x="2.351cm" svg:y="3.234cm">
          <draw:image xlink:href="Pictures/10000201000002D10000021D5E407EA801F3AABC.png" xlink:type="simple" xlink:show="embed" xlink:actuate="onLoad">
            <text:p/>
          </draw:image>
        </draw:frame>
        <draw:custom-shape draw:name="Google Shape;1385;p95" draw:style-name="gr22" draw:text-style-name="P7" draw:layer="layout" svg:width="23.666cm" svg:height="3.896cm" svg:x="0.866cm" svg:y="9.454cm">
          <text:p text:style-name="P3"><text:span text:style-name="T76">Metadata are crucial: the data are found through the metadata.</text:span></text:p>
          <text:p text:style-name="P3"><text:span text:style-name="T76"/></text:p>
          <text:p text:style-name="P3"><text:span text:style-name="T76">Deposition on a repository is one of the FAIR principles, such an (external) service has to be in place.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6;p95" draw:style-name="gr46" draw:text-style-name="P8" draw:layer="layout" svg:width="21.909cm" svg:height="0.906cm" svg:x="0.212cm" svg:y="13.269cm">
          <draw:image xlink:href="Pictures/100002010000051E00000067519981A9C4292562.png" xlink:type="simple" xlink:show="embed" xlink:actuate="onLoad">
            <text:p/>
          </draw:image>
        </draw:frame>
        <presentation:notes draw:style-name="dp2">
          <draw:frame draw:name="Google Shape;1380;g3414daac41a_0_2377:notes" presentation:style-name="pr34" draw:text-style-name="P9" draw:layer="layout" svg:width="17.27cm" svg:height="12.571cm" svg:x="2.159cm" svg:y="13.271cm" presentation:class="notes" presentation:placeholder="true" presentation:user-transformed="true">
            <draw:text-box/>
          </draw:frame>
          <draw:page-thumbnail draw:name="Google Shape;1381;g3414daac41a_0_2377:notes" draw:style-name="gr3" draw:layer="layout" svg:width="18.623cm" svg:height="10.475cm" svg:x="1.482cm" svg:y="2.123cm" draw:page-number="28" presentation:class="page"/>
        </presentation:notes>
      </draw:page>
      <draw:page draw:name="page29" draw:style-name="dp1" draw:master-page-name="Default_20_2" presentation:presentation-page-layout-name="AL2T19">
        <draw:frame draw:name="Google Shape;1391;p96" draw:style-name="gr47" draw:text-style-name="P8" draw:layer="layout" svg:width="19.583cm" svg:height="4.687cm" svg:x="3.631cm" svg:y="3.063cm">
          <draw:image xlink:href="Pictures/10000201000002D10000021D5E407EA801F3AABC.png" xlink:type="simple" xlink:show="embed" xlink:actuate="onLoad">
            <text:p/>
          </draw:image>
        </draw:frame>
        <draw:custom-shape draw:name="Google Shape;1392;p96" draw:style-name="gr20" draw:text-style-name="P7" draw:layer="layout" svg:width="23.666cm" svg:height="1.589cm" svg:x="1.319cm" svg:y="0.44cm">
          <text:p text:style-name="P43"><text:span text:style-name="T75">F</text:span><text:span text:style-name="T74">A</text:span><text:span text:style-name="T75">IR</text:span><text:span text:style-name="T74">: Accessible </text:span><text:span text:style-name="T75">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3;p96" draw:style-name="gr22" draw:text-style-name="P7" draw:layer="layout" svg:width="23.666cm" svg:height="4.232cm" svg:x="0.866cm" svg:y="8.396cm">
          <text:p text:style-name="P3"><text:span text:style-name="T77">Technical implementations for accessing data, authentication and authorisation (FAIR </text:span><text:span text:style-name="T78">not</text:span><text:span text:style-name="T77"> OPEN). <text:s/></text:span></text:p>
          <text:p text:style-name="P3"><text:span text:style-name="T77"/></text:p>
          <text:p text:style-name="P3"><text:span text:style-name="T77">Metadata always available, also when the dataset no longer ex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4;p96" draw:style-name="gr46" draw:text-style-name="P8" draw:layer="layout" svg:width="21.909cm" svg:height="0.906cm" svg:x="0.212cm" svg:y="13.269cm">
          <draw:image xlink:href="Pictures/100002010000051E00000067519981A9C4292562.png" xlink:type="simple" xlink:show="embed" xlink:actuate="onLoad">
            <text:p/>
          </draw:image>
        </draw:frame>
        <presentation:notes draw:style-name="dp2">
          <draw:frame draw:name="Google Shape;1388;g3414daac41a_0_2384:notes" presentation:style-name="pr35" draw:text-style-name="P9" draw:layer="layout" svg:width="17.27cm" svg:height="12.571cm" svg:x="2.159cm" svg:y="13.271cm" presentation:class="notes" presentation:placeholder="true" presentation:user-transformed="true">
            <draw:text-box/>
          </draw:frame>
          <draw:page-thumbnail draw:name="Google Shape;1389;g3414daac41a_0_2384:notes" draw:style-name="gr3" draw:layer="layout" svg:width="18.623cm" svg:height="10.475cm" svg:x="1.482cm" svg:y="2.123cm" draw:page-number="29" presentation:class="page"/>
        </presentation:notes>
      </draw:page>
      <draw:page draw:name="page30" draw:style-name="dp1" draw:master-page-name="Default_20_2" presentation:presentation-page-layout-name="AL2T19">
        <draw:custom-shape draw:name="Google Shape;1399;p97" draw:style-name="gr20" draw:text-style-name="P7" draw:layer="layout" svg:width="23.666cm" svg:height="1.589cm" svg:x="0.866cm" svg:y="1.236cm">
          <text:p text:style-name="P43"><text:span text:style-name="T75">FA</text:span><text:span text:style-name="T74">I</text:span><text:span text:style-name="T75">R:</text:span><text:span text:style-name="T74"> Interoperable </text:span><text:span text:style-name="T75">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0;p97" draw:style-name="gr48" draw:text-style-name="P8" draw:layer="layout" svg:width="15.081cm" svg:height="4.933cm" svg:x="4.673cm" svg:y="3.275cm">
          <draw:image xlink:href="Pictures/10000201000002D10000021D5E407EA801F3AABC.png" xlink:type="simple" xlink:show="embed" xlink:actuate="onLoad">
            <text:p/>
          </draw:image>
        </draw:frame>
        <draw:custom-shape draw:name="Google Shape;1401;p97" draw:style-name="gr22" draw:text-style-name="P7" draw:layer="layout" svg:width="23.666cm" svg:height="3.301cm" svg:x="0.866cm" svg:y="9.454cm">
          <text:p text:style-name="P3"><text:span text:style-name="T77">Adoption of community-defined standards and definitions.</text:span></text:p>
          <text:p text:style-name="P3"><text:span text:style-name="T77"><text:s/></text:span></text:p>
          <text:p text:style-name="P3"><text:span text:style-name="T77">Consistent metadata annotation allows linking across data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2;p97" draw:style-name="gr46" draw:text-style-name="P8" draw:layer="layout" svg:width="21.909cm" svg:height="0.906cm" svg:x="0.212cm" svg:y="13.269cm">
          <draw:image xlink:href="Pictures/100002010000051E00000067519981A9C4292562.png" xlink:type="simple" xlink:show="embed" xlink:actuate="onLoad">
            <text:p/>
          </draw:image>
        </draw:frame>
        <presentation:notes draw:style-name="dp2">
          <draw:frame draw:name="Google Shape;1396;g3414daac41a_0_2391:notes" presentation:style-name="pr36" draw:text-style-name="P9" draw:layer="layout" svg:width="17.27cm" svg:height="12.571cm" svg:x="2.159cm" svg:y="13.271cm" presentation:class="notes" presentation:placeholder="true" presentation:user-transformed="true">
            <draw:text-box/>
          </draw:frame>
          <draw:page-thumbnail draw:name="Google Shape;1397;g3414daac41a_0_2391:notes" draw:style-name="gr3" draw:layer="layout" svg:width="18.623cm" svg:height="10.475cm" svg:x="1.482cm" svg:y="2.123cm" draw:page-number="30" presentation:class="page"/>
        </presentation:notes>
      </draw:page>
      <draw:page draw:name="page31" draw:style-name="dp1" draw:master-page-name="Default_20_2" presentation:presentation-page-layout-name="AL2T19">
        <draw:frame draw:name="Google Shape;1407;p98" draw:style-name="gr49" draw:text-style-name="P8" draw:layer="layout" svg:width="18.393cm" svg:height="4.817cm" svg:x="3.393cm" svg:y="2.756cm">
          <draw:image xlink:href="Pictures/10000201000002D10000021D5E407EA801F3AABC.png" xlink:type="simple" xlink:show="embed" xlink:actuate="onLoad">
            <text:p/>
          </draw:image>
        </draw:frame>
        <draw:custom-shape draw:name="Google Shape;1408;p98" draw:style-name="gr20" draw:text-style-name="P7" draw:layer="layout" svg:width="23.666cm" svg:height="1.589cm" svg:x="0.866cm" svg:y="0.768cm">
          <text:p text:style-name="P43"><text:span text:style-name="T75">FAI</text:span><text:span text:style-name="T74">R</text:span><text:span text:style-name="T75">:</text:span><text:span text:style-name="T74"> Reusable </text:span><text:span text:style-name="T75">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9;p98" draw:style-name="gr22" draw:text-style-name="P7" draw:layer="layout" svg:width="23.666cm" svg:height="5.163cm" svg:x="0.866cm" svg:y="7.972cm">
          <text:p text:style-name="P3"><text:span text:style-name="T77">To ensure successful reusability, you need:</text:span></text:p>
          <text:list text:style-name="L14">
            <text:list-item>
              <text:p text:style-name="P3"><text:span text:style-name="T77">Rich metadata</text:span></text:p>
            </text:list-item>
            <text:list-item>
              <text:p text:style-name="P3"><text:span text:style-name="T77">License </text:span></text:p>
            </text:list-item>
            <text:list-item>
              <text:p text:style-name="P3"><text:span text:style-name="T77">Data “history” (experimental technique, author, publication)</text:span></text:p>
            </text:list-item>
            <text:list-item>
              <text:p text:style-name="P3"><text:span text:style-name="T77">Community standards (e.g. from domain repository of choi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0;p98" draw:style-name="gr46" draw:text-style-name="P8" draw:layer="layout" svg:width="21.909cm" svg:height="0.906cm" svg:x="0.212cm" svg:y="13.269cm">
          <draw:image xlink:href="Pictures/100002010000051E00000067519981A9C4292562.png" xlink:type="simple" xlink:show="embed" xlink:actuate="onLoad">
            <text:p/>
          </draw:image>
        </draw:frame>
        <presentation:notes draw:style-name="dp2">
          <draw:page-thumbnail draw:name="Google Shape;1404;g3414daac41a_0_2398:notes" draw:style-name="gr3" draw:layer="layout" svg:width="16.931cm" svg:height="9.523cm" svg:x="1.059cm" svg:y="1.905cm" draw:page-number="31" presentation:class="page"/>
          <draw:frame draw:name="Google Shape;1405;g3414daac41a_0_2398:notes" presentation:style-name="pr37" draw:text-style-name="P21" draw:layer="layout" svg:width="15.238cm" svg:height="11.428cm" svg:x="1.905cm" svg:y="12.065cm" presentation:class="notes" presentation:user-transformed="true">
            <draw:text-box>
              <text:p text:style-name="P3"><text:span text:style-name="T21">Lack of license</text:span></text:p>
              <text:p text:style-name="P3"><text:span text:style-name="T21">Provenance: where is data coming fr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rbel" svg:font-family="Corbel"/>
    <style:font-face style:name="Exo 2" svg:font-family="'Exo 2'"/>
    <style:font-face style:name="Georgia" svg:font-family="Georgi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ffec3a" draw:end-color="#32b890" draw:start-intensity="100%" draw:end-intensity="100%" draw:angle="450" draw:border="0%"/>
    <draw:gradient draw:name="Gradient_20_3" draw:display-name="Gradient 3" draw:style="linear" draw:start-color="#9e51ad" draw:end-color="#4176a5" draw:start-intensity="100%" draw:end-intensity="100%" draw:angle="450" draw:border="0%"/>
    <draw:gradient draw:name="Gradient_20_4" draw:display-name="Gradient 4" draw:style="linear" draw:start-color="#f67028" draw:end-color="#ffec3a" draw:start-intensity="100%" draw:end-intensity="100%" draw:angle="9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ELIXIR-background" style:display-name="Title slide ELIXIR-background" style:family="presentation">
      <style:graphic-properties draw:stroke="none" draw:fill="solid" draw:fill-color="#fafafa"/>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outline2" style:display-name="Title slide ELIXIR-outline2" style:family="presentation" style:parent-style-name="Title_20_slide_20_ELIXI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3" style:display-name="Title slide ELIXIR-outline3" style:family="presentation" style:parent-style-name="Title_20_slide_20_ELIXI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4" style:display-name="Title slide ELIXIR-outline4" style:family="presentation" style:parent-style-name="Title_20_slide_20_ELIXI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afaf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164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068cm" fo:padding-bottom="0.068cm" fo:padding-left="0.136cm" fo:padding-right="0.136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backgroundobjects">
      <style:graphic-properties draw:stroke="none" draw:fill="none" draw:fill-color="#ffffff" draw:auto-grow-height="false" fo:min-height="1.485cm"/>
    </style:style>
    <style:style style:name="Mpr2" style:family="presentation" style:parent-style-name="Title_20_slide_20_ELIXIR-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simple-light-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2" style:family="presentation" style:parent-style-name="simple-light-2-backgroundobjects">
      <style:graphic-properties draw:stroke="none" draw:fill="none" draw:fill-color="#ffffff" draw:auto-grow-height="false" fo:min-height="1.27cm"/>
    </style:style>
    <style:style style:name="Mpr13" style:family="presentation" style:parent-style-name="simple-light-2-backgroundobjects">
      <style:graphic-properties draw:stroke="none" draw:fill="none" draw:fill-color="#ffffff" draw:textarea-vertical-align="bottom" draw:auto-grow-height="false" fo:min-height="1.27cm"/>
    </style:style>
    <style:style style:name="Mpr14" style:family="presentation" style:parent-style-name="OBJECT-backgroundobjects">
      <style:graphic-properties draw:stroke="none" draw:fill="none" draw:fill-color="#ffffff" draw:auto-grow-height="false" fo:min-height="1.27cm"/>
    </style:style>
    <style:style style:name="Mpr15" style:family="presentation" style:parent-style-name="OBJECT-backgroundobjects">
      <style:graphic-properties draw:stroke="none" draw:fill="none" draw:fill-color="#ffffff" draw:textarea-vertical-align="bottom" draw:auto-grow-height="false" fo:min-height="1.27cm"/>
    </style:style>
    <style:style style:name="Mpr16" style:family="presentation" style:parent-style-name="Defaul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7" style:family="presentation" style:parent-style-name="Default-backgroundobjects">
      <style:graphic-properties draw:stroke="none" draw:fill="none" draw:fill-color="#ffffff" draw:auto-grow-height="false" fo:min-height="1.27cm"/>
    </style:style>
    <style:style style:name="Mpr18" style:family="presentation" style:parent-style-name="Default-backgroundobjects">
      <style:graphic-properties draw:stroke="none" draw:fill="none" draw:fill-color="#ffffff" draw:textarea-vertical-align="bottom" draw:auto-grow-height="false" fo:min-height="1.27cm"/>
    </style:style>
    <style:style style:name="Mpr19" style:family="presentation" style:parent-style-name="Default_20_1-backgroundobjects">
      <style:graphic-properties draw:stroke="none" draw:fill="none" draw:fill-color="#ffffff" draw:auto-grow-height="false" fo:min-height="1.27cm"/>
    </style:style>
    <style:style style:name="Mpr20" style:family="presentation" style:parent-style-name="Default_20_1-backgroundobjects">
      <style:graphic-properties draw:stroke="none" draw:fill="none" draw:fill-color="#ffffff" draw:textarea-vertical-align="bottom" draw:auto-grow-height="false" fo:min-height="1.27cm"/>
    </style:style>
    <style:style style:name="Mpr21" style:family="presentation" style:parent-style-name="Default_20_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2" style:family="presentation" style:parent-style-name="Default_20_2-backgroundobjects">
      <style:graphic-properties draw:stroke="none" draw:fill="none" draw:fill-color="#ffffff" draw:auto-grow-height="false" fo:min-height="1.27cm"/>
    </style:style>
    <style:style style:name="Mpr23"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003f41" style:text-line-through-style="none" style:text-line-through-type="none" style:text-position="0% 100%" style:font-name="Corbel" fo:font-size="18pt" fo:letter-spacing="normal" fo:font-style="italic" style:text-underline-style="none" fo:font-weight="normal" style:font-name-asian="Corbel" style:font-size-asian="18pt" style:font-style-asian="italic" style:font-weight-asian="normal" style:font-name-complex="Corbel" style:font-size-complex="18pt" style:font-style-complex="italic" style:font-weight-complex="normal"/>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_20_ELIXIR" style:display-name="Title slide ELIXIR" style:page-layout-name="PM1" draw:style-name="Mdp1">
      <draw:frame draw:name="Google Shape;260;p59" presentation:style-name="Title_20_slide_20_ELIXIR-outline1" draw:layer="backgroundobjects" svg:width="9.401cm" svg:height="0.749cm" svg:x="14.973cm" svg:y="9.936cm" presentation:class="outline" presentation:placeholder="true" presentation:user-transformed="true">
        <draw:text-box/>
      </draw:frame>
      <draw:frame draw:name="Google Shape;261;p59" draw:style-name="Mgr3" draw:text-style-name="MP5" draw:layer="backgroundobjects" svg:width="11.94cm" svg:height="14.286cm" svg:x="0cm" svg:y="0cm">
        <draw:image xlink:href="Pictures/1000020100000800000005A87429A934D158A4D1.png" xlink:type="simple" xlink:show="embed" xlink:actuate="onLoad">
          <text:p/>
        </draw:image>
      </draw:frame>
      <draw:custom-shape draw:name="Google Shape;262;p59" draw:style-name="Mgr4" draw:text-style-name="MP7" draw:layer="backgroundobjects" svg:width="8.131cm" svg:height="0.905cm" svg:x="16.243cm" svg:y="12.994cm">
        <text:p text:style-name="MP6"><text:span text:style-name="MT1">elixi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59" presentation:style-name="Title_20_slide_20_ELIXIR-title" draw:layer="backgroundobjects" svg:width="13.661cm" svg:height="4.996cm" svg:x="10.712cm" svg:y="3.369cm" presentation:class="title" presentation:placeholder="true" presentation:user-transformed="true">
        <draw:text-box/>
      </draw:frame>
      <draw:frame draw:name="Google Shape;265;p59" draw:style-name="Mgr5" draw:text-style-name="MP5" draw:layer="backgroundobjects" svg:width="5.398cm" svg:height="4.096cm" svg:x="1.258cm" svg:y="5.069cm">
        <draw:image xlink:href="Pictures/1000020100000800000006129C498E2C5ABF3C41.png" xlink:type="simple" xlink:show="embed" xlink:actuate="onLoad">
          <text:p/>
        </draw:image>
      </draw:frame>
      <presentation:notes style:page-layout-name="PM2">
        <draw:page-thumbnail presentation:style-name="Title_20_slide_20_ELIXIR-title" draw:layer="backgroundobjects" svg:width="19.798cm" svg:height="11.136cm" svg:x="0.6cm" svg:y="2.257cm" presentation:class="page"/>
        <draw:frame presentation:style-name="Title_20_slide_20_ELIXI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3"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6"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imple-light-2" style:page-layout-name="PM1" draw:style-name="Mdp2">
      <draw:frame draw:name="Google Shape;49;p12" presentation:style-name="Mpr11"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2">
      <draw:frame draw:name="Google Shape;202;p44" presentation:style-name="OBJECT-title" draw:layer="backgroundobjects" svg:width="22.858cm" svg:height="2.384cm" svg:x="1.27cm" svg:y="0.569cm" presentation:class="title" presentation:placeholder="true" presentation:user-transformed="true">
        <draw:text-box/>
      </draw:frame>
      <draw:frame draw:name="Google Shape;203;p44" presentation:style-name="OBJECT-outline1" draw:layer="backgroundobjects" svg:width="22.858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2">
      <draw:frame draw:name="Google Shape;197;p42" presentation:style-name="Mpr16"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2">
      <draw:frame draw:name="Google Shape;209;p46" presentation:style-name="Default_20_1-title" draw:layer="backgroundobjects" svg:width="22.858cm" svg:height="2.384cm" svg:x="1.27cm" svg:y="0.57cm" presentation:class="title" presentation:placeholder="true" presentation:user-transformed="true">
        <draw:text-box/>
      </draw:frame>
      <draw:frame presentation:style-name="Default_20_1-outline1" draw:layer="backgroundobjects" svg:width="22.859cm" svg:height="8.286cm" svg:x="1.27cm" svg:y="3.343cm" presentation:class="outline" presentation:placeholder="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2" style:display-name="Default 2" style:page-layout-name="PM1" draw:style-name="Mdp2">
      <draw:frame draw:name="Google Shape;174;p36" presentation:style-name="Default_20_2-title" draw:layer="backgroundobjects" svg:width="23.667cm" svg:height="1.59cm" svg:x="0.866cm" svg:y="1.236cm" presentation:class="title" presentation:placeholder="true" presentation:user-transformed="true">
        <draw:text-box/>
      </draw:frame>
      <draw:frame draw:name="Google Shape;175;p36" presentation:style-name="Mpr21"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Default_20_2-outline1" draw:layer="backgroundobjects" svg:width="22.859cm" svg:height="8.286cm" svg:x="1.27cm" svg:y="3.343cm" presentation:class="outline" presentation:placeholder="true">
        <draw:text-box/>
      </draw:frame>
      <presentation:notes style:page-layout-name="PM2">
        <draw:page-thumbnail presentation:style-name="Default_20_2-title" draw:layer="backgroundobjects" svg:width="16.931cm" svg:height="9.524cm" svg:x="1.059cm" svg:y="1.93cm" presentation:class="page"/>
        <draw:frame presentation:style-name="Default_20_2-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38"/>
    <meta:generator>LibreOfficeDev/6.0.5.2$Linux_X86_64 LibreOffice_project/</meta:generator>
  </office:meta>
</office:document-meta>
</file>