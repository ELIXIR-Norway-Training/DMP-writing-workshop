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A000000B9C01DD5E7B6DB857F.png" manifest:media-type="image/png"/>
  <manifest:file-entry manifest:full-path="Pictures/100002010000029500000233BD5FD93275C2781F.png" manifest:media-type="image/png"/>
  <manifest:file-entry manifest:full-path="Pictures/10000201000000E80000036BFAF987F3530D0C4B.png" manifest:media-type="image/png"/>
  <manifest:file-entry manifest:full-path="Pictures/10000201000001B600000076162FAB6261BFA3D4.png" manifest:media-type="image/png"/>
  <manifest:file-entry manifest:full-path="Pictures/100002010000053C000000FD00C5FBB50899F2AA.png" manifest:media-type="image/png"/>
  <manifest:file-entry manifest:full-path="Pictures/1000000000000547000004AE62914E82E47A13BB.png" manifest:media-type="image/png"/>
  <manifest:file-entry manifest:full-path="Pictures/1000020100000462000000F079C5C1BB639A9BF9.png" manifest:media-type="image/png"/>
  <manifest:file-entry manifest:full-path="Pictures/100002010000010F000000B60939EE7473DC96AC.png" manifest:media-type="image/png"/>
  <manifest:file-entry manifest:full-path="Pictures/1000020100000384000004B05C90364973307A2A.png" manifest:media-type="image/png"/>
  <manifest:file-entry manifest:full-path="Pictures/10000201000000500000005EDA0D2A1D719EF0FA.png" manifest:media-type="image/png"/>
  <manifest:file-entry manifest:full-path="Pictures/100002010000057200000573E37E1F5CC3843E52.png" manifest:media-type="image/png"/>
  <manifest:file-entry manifest:full-path="Pictures/10000201000000500000005F08E0A9CA0F07BAD5.png" manifest:media-type="image/png"/>
  <manifest:file-entry manifest:full-path="Pictures/100002010000009B000000B962702F4D80AA8002.png" manifest:media-type="image/png"/>
  <manifest:file-entry manifest:full-path="Pictures/10000201000000500000005FBF2D701A62A618AB.png" manifest:media-type="image/png"/>
  <manifest:file-entry manifest:full-path="Pictures/1000020100000200000002004BCA07F2EDCEEC78.png" manifest:media-type="image/png"/>
  <manifest:file-entry manifest:full-path="Pictures/10000201000001D40000007A0A33201C91FA7168.png" manifest:media-type="image/png"/>
  <manifest:file-entry manifest:full-path="Pictures/1000020100000800000006129C498E2C5ABF3C41.png" manifest:media-type="image/png"/>
  <manifest:file-entry manifest:full-path="Pictures/1000020100000371000001932E8B67C19433E4A8.png" manifest:media-type="image/png"/>
  <manifest:file-entry manifest:full-path="Pictures/10000201000000500000005F77ACFE49A963AA6D.png" manifest:media-type="image/png"/>
  <manifest:file-entry manifest:full-path="Pictures/1000020100000800000005A87429A934D158A4D1.png" manifest:media-type="image/png"/>
  <manifest:file-entry manifest:full-path="Pictures/10000201000000640000006D4F43EAC208643CD3.png" manifest:media-type="image/png"/>
  <manifest:file-entry manifest:full-path="Pictures/10000201000003DD0000028BE40931C3A9C1E21E.png" manifest:media-type="image/png"/>
  <manifest:file-entry manifest:full-path="Pictures/100002010000016F00000047276FEA79EBFE4AC9.png" manifest:media-type="image/png"/>
  <manifest:file-entry manifest:full-path="Pictures/10000201000004620000010E75D4D38F469AD966.png" manifest:media-type="image/png"/>
  <manifest:file-entry manifest:full-path="Pictures/1000000000000183000001411A3B91D382FA5485.png" manifest:media-type="image/png"/>
  <manifest:file-entry manifest:full-path="Pictures/100002010000018300000144B9C9E5FD363D2B1E.png" manifest:media-type="image/png"/>
  <manifest:file-entry manifest:full-path="Pictures/10000201000002C4000001389E17077FD2C9D029.png" manifest:media-type="image/png"/>
  <manifest:file-entry manifest:full-path="Pictures/10000201000000500000005FFBD869CC92D5B6BB.png" manifest:media-type="image/png"/>
  <manifest:file-entry manifest:full-path="Pictures/10000000000001830000014206F578701859D4F5.png" manifest:media-type="image/png"/>
  <manifest:file-entry manifest:full-path="Pictures/10000201000000AC000000CC09C64DC40900048A.png" manifest:media-type="image/png"/>
  <manifest:file-entry manifest:full-path="Pictures/10000201000001000000008E4605511858E77E6C.png" manifest:media-type="image/png"/>
  <manifest:file-entry manifest:full-path="Pictures/100002010000012000000052809938CC003C5272.png" manifest:media-type="image/png"/>
  <manifest:file-entry manifest:full-path="Pictures/1000020100000089000000A3638214AE1AFF79E6.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9cm" fo:padding-bottom="0.19cm" fo:padding-left="0.19cm" fo:padding-right="0.19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094cm" fo:padding-bottom="0.094cm" fo:padding-left="0.188cm" fo:padding-right="0.188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ffffff" draw:opacity="72%" draw:textarea-vertical-align="top"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2cm" svg:stroke-color="#4d4948" draw:marker-start="msArrowEnd_20_5" draw:marker-start-width="0.6cm" draw:marker-start-center="false" draw:marker-end="msArrowEnd_20_5" draw:marker-end-width="0.6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281cm" fo:padding-bottom="0.125cm" fo:padding-left="0.25cm" fo:padding-right="0.25cm" fo:wrap-option="wrap"/>
    </style:style>
    <style:style style:name="gr13"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pr1" style:family="presentation" style:parent-style-name="Title_20_slide_20_ELIXIR-subtitle">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2" style:family="presentation" style:parent-style-name="Title_20_slide_20_ELIXIR-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3" style:family="presentation" style:parent-style-name="Title_20_slide_20_ELIXIR-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style:style>
    <style:style style:name="pr4" style:family="presentation" style:parent-style-name="Title_20_slide_20_ELIXIR-notes" style:list-style-name="L1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WO_5f_OBJECTS-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6" style:family="presentation" style:parent-style-name="TWO_5f_OBJECTS-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7" style:family="presentation" style:parent-style-name="TWO_5f_OBJECTS-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8" style:family="presentation" style:parent-style-name="TWO_5f_OBJECTS-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9" style:family="presentation" style:parent-style-name="TWO_5f_OBJECTS-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0" style:family="presentation" style:parent-style-name="TWO_5f_OBJECTS-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1" style:family="presentation" style:parent-style-name="TWO_5f_OBJECTS-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2" style:family="presentation" style:parent-style-name="TWO_5f_OBJECTS-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3"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4"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5"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6"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7"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8"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9"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0"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1"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2"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3"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4"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5"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6"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7"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8"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9"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0"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1"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2"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3"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4"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5"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6"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7"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8"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9"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0"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1"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2"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3"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4"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5"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46" style:family="presentation" style:parent-style-name="BLANK-notes" style:list-style-name="L12">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1" style:family="paragraph">
      <style:paragraph-properties fo:margin-left="0cm" fo:margin-right="0cm" fo:margin-top="0.141cm" fo:margin-bottom="0cm" fo:line-height="100%" fo:text-align="end"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36pt"/>
    </style:style>
    <style:style style:name="P5" style:family="paragraph">
      <style:paragraph-properties fo:margin-left="0cm" fo:margin-right="0cm" fo:margin-top="0.106cm" fo:margin-bottom="0cm" fo:line-height="100%" fo:text-align="end"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3pt"/>
    </style:style>
    <style:style style:name="P7" style:family="paragraph">
      <loext:graphic-properties draw:fill="none"/>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1"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388cm" fo:margin-bottom="0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5" style:family="paragraph">
      <style:paragraph-properties fo:margin-left="0.459cm" fo:margin-right="0cm" fo:margin-top="0cm" fo:margin-bottom="0cm" fo:line-height="100%" fo:text-align="start" fo:text-indent="-0.28cm" style:writing-mode="lr-tb">
        <style:tab-stops>
          <style:tab-stop style:position="0cm"/>
        </style:tab-stops>
      </style:paragraph-properties>
    </style:style>
    <style:style style:name="P16" style:family="paragraph">
      <style:paragraph-properties fo:margin-left="0cm" fo:margin-right="0cm" fo:margin-top="0.762cm" fo:margin-bottom="0cm" fo:line-height="150%" fo:text-align="start" fo:text-indent="0cm" style:writing-mode="lr-tb">
        <style:tab-stops>
          <style:tab-stop style:position="0cm"/>
        </style:tab-stops>
      </style:paragraph-properties>
    </style:style>
    <style:style style:name="P17" style:family="paragraph">
      <style:paragraph-properties fo:margin-left="0.459cm" fo:margin-right="0cm" fo:margin-top="0.762cm" fo:margin-bottom="0cm" fo:line-height="100%" fo:text-align="start" fo:text-indent="-0.28cm" style:writing-mode="lr-tb">
        <style:tab-stops>
          <style:tab-stop style:position="0cm"/>
        </style:tab-stops>
      </style:paragraph-properties>
    </style:style>
    <style:style style:name="P18" style:family="paragraph">
      <loext:graphic-properties draw:fill="solid" draw:fill-color="#ffffff"/>
      <style:paragraph-properties fo:text-align="start" style:font-independent-line-spacing="true"/>
      <style:text-properties fo:font-size="14pt"/>
    </style:style>
    <style:style style:name="P19" style:family="paragraph">
      <style:paragraph-properties fo:margin-left="0.459cm" fo:margin-right="0cm" fo:margin-top="0cm" fo:margin-bottom="0cm" fo:line-height="100%" fo:text-align="start" fo:text-indent="-0.351cm" style:writing-mode="lr-tb">
        <style:tab-stops>
          <style:tab-stop style:position="0cm"/>
        </style:tab-stops>
      </style:paragraph-properties>
    </style:style>
    <style:style style:name="P20" style:family="paragraph">
      <loext:graphic-properties draw:fill="solid" draw:fill-color="#ffffff" draw:opacity="72%"/>
      <style:paragraph-properties fo:text-align="start" style:font-independent-line-spacing="true"/>
      <style:text-properties fo:font-size="14pt"/>
    </style:style>
    <style:style style:name="P21"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22" style:family="paragraph">
      <style:paragraph-properties fo:margin-left="0.459cm" fo:margin-right="0cm" fo:margin-top="0cm" fo:margin-bottom="0cm" fo:line-height="100%" fo:text-align="start" fo:text-indent="-0.352cm" style:writing-mode="lr-tb">
        <style:tab-stops>
          <style:tab-stop style:position="0cm"/>
        </style:tab-stops>
      </style:paragraph-properties>
    </style:style>
    <style:style style:name="P23" style:family="paragraph">
      <style:paragraph-properties fo:margin-left="0.953cm" fo:margin-right="0cm" fo:margin-top="0cm" fo:margin-bottom="0cm" fo:line-height="100%" fo:text-align="start" fo:text-indent="0cm" style:writing-mode="lr-tb">
        <style:tab-stops>
          <style:tab-stop style:position="0cm"/>
        </style:tab-stops>
      </style:paragraph-properties>
    </style:style>
    <style:style style:name="P24" style:family="paragraph">
      <style:paragraph-properties fo:margin-left="0.459cm" fo:margin-right="0cm" fo:margin-top="0cm" fo:margin-bottom="0cm" fo:line-height="100%" fo:text-align="start" fo:text-indent="-0.281cm" style:writing-mode="lr-tb">
        <style:tab-stops>
          <style:tab-stop style:position="0cm"/>
        </style:tab-stops>
      </style:paragraph-properties>
    </style:style>
    <style:style style:name="P25" style:family="paragraph">
      <style:paragraph-properties fo:margin-left="0.953cm" fo:margin-right="0cm" fo:margin-top="0cm" fo:margin-bottom="0cm" fo:line-height="150%" fo:text-align="start" fo:text-indent="0cm" style:writing-mode="lr-tb">
        <style:tab-stops>
          <style:tab-stop style:position="0cm"/>
        </style:tab-stops>
      </style:paragraph-properties>
    </style:style>
    <style:style style:name="P26" style:family="paragraph">
      <style:paragraph-properties fo:margin-left="0.459cm" fo:margin-right="0cm" fo:margin-top="0cm" fo:margin-bottom="0cm" fo:line-height="150%" fo:text-align="start" fo:text-indent="-0.281cm" style:writing-mode="lr-tb">
        <style:tab-stops>
          <style:tab-stop style:position="0cm"/>
        </style:tab-stops>
      </style:paragraph-properties>
    </style:style>
    <style:style style:name="P27"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28"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9" style:family="paragraph">
      <style:paragraph-properties fo:margin-left="1.27cm" fo:margin-right="0cm" fo:margin-top="0cm" fo:margin-bottom="0cm" fo:line-height="115%" fo:text-align="justify" fo:text-indent="0cm" style:writing-mode="lr-tb">
        <style:tab-stops>
          <style:tab-stop style:position="0cm"/>
        </style:tab-stops>
      </style:paragraph-properties>
    </style:style>
    <style:style style:name="P30"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31" style:family="paragraph">
      <style:paragraph-properties fo:margin-left="0cm" fo:margin-right="0cm" fo:margin-top="0cm" fo:margin-bottom="0cm" fo:line-height="80%" fo:text-align="justify" fo:text-indent="0cm" style:writing-mode="lr-tb">
        <style:tab-stops>
          <style:tab-stop style:position="0cm"/>
        </style:tab-stops>
      </style:paragraph-properties>
    </style:style>
    <style:style style:name="P32" style:family="paragraph">
      <style:paragraph-properties fo:margin-left="0cm" fo:margin-right="0cm" fo:margin-top="0cm" fo:margin-bottom="0cm" fo:line-height="83%" fo:text-align="center" fo:text-indent="0cm" style:writing-mode="lr-tb">
        <style:tab-stops>
          <style:tab-stop style:position="0cm"/>
        </style:tab-stops>
      </style:paragraph-properties>
    </style:style>
    <style:style style:name="P33" style:family="paragraph">
      <style:paragraph-properties fo:margin-left="0cm" fo:margin-right="0cm" fo:margin-top="0cm" fo:margin-bottom="0cm" fo:line-height="83%"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Open Sans" fo:font-size="34pt" fo:letter-spacing="normal" fo:font-style="normal" style:text-underline-style="none" fo:font-weight="bold" style:font-name-asian="Open Sans" style:font-size-asian="34pt" style:font-style-asian="normal" style:font-weight-asian="bold" style:font-name-complex="Open Sans" style:font-size-complex="34pt" style:font-style-complex="normal" style:font-weight-complex="bold"/>
    </style:style>
    <style:style style:name="T3" style:family="text">
      <style:text-properties fo:font-variant="normal" fo:text-transform="none" fo:color="#4d4848" style:text-line-through-style="none" style:text-line-through-type="none" style:text-position="0% 100%" style:font-name="Open Sans"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orbel" fo:font-size="7pt" fo:letter-spacing="normal" fo:font-style="normal" style:text-underline-style="none" fo:font-weight="normal" style:font-name-asian="Corbel" style:font-size-asian="7pt" style:font-style-asian="normal" style:font-weight-asian="normal" style:font-name-complex="Corbel" style:font-size-complex="7pt" style:font-style-complex="normal" style:font-weight-complex="normal"/>
    </style:style>
    <style:style style:name="T5" style:family="text">
      <style:text-properties fo:font-variant="normal" fo:text-transform="none" fo:color="#3399ff" style:text-line-through-style="none" style:text-line-through-type="none" style:text-position="0% 100%" style:font-name="Corbel" fo:font-size="7pt" fo:letter-spacing="normal" fo:font-style="normal" style:text-underline-style="solid" style:text-underline-width="auto" style:text-underline-color="font-color" fo:font-weight="normal" style:font-name-asian="Corbel" style:font-size-asian="7pt" style:font-style-asian="normal" style:font-weight-asian="normal" style:font-name-complex="Corbel" style:font-size-complex="7pt" style:font-style-complex="normal" style:font-weight-complex="normal"/>
    </style:style>
    <style:style style:name="T6" style:family="text">
      <style:text-properties fo:font-variant="normal" fo:text-transform="none" fo:color="#005472" style:text-line-through-style="none" style:text-line-through-type="none" style:text-position="0% 100%" style:font-name="Corbel" fo:font-size="30pt" fo:letter-spacing="normal" fo:font-style="normal" style:text-underline-style="none" fo:font-weight="bold" style:font-name-asian="Corbel" style:font-size-asian="30pt" style:font-style-asian="normal" style:font-weight-asian="bold" style:font-name-complex="Corbel" style:font-size-complex="30pt" style:font-style-complex="normal" style:font-weight-complex="bold"/>
    </style:style>
    <style:style style:name="T7" style:family="text">
      <style:text-properties fo:font-variant="normal" fo:text-transform="none" fo:color="#4d4948" style:text-line-through-style="none" style:text-line-through-type="none" style:text-position="0% 100%" style:font-name="Corbel" fo:font-size="30.5pt" fo:letter-spacing="normal" fo:font-style="normal" style:text-underline-style="none" fo:font-weight="bold" style:font-name-asian="Corbel" style:font-size-asian="30.5pt" style:font-style-asian="normal" style:font-weight-asian="bold" style:font-name-complex="Corbel" style:font-size-complex="30.5pt" style:font-style-complex="normal" style:font-weight-complex="bold"/>
    </style:style>
    <style:style style:name="T8" style:family="text">
      <style:text-properties fo:font-variant="normal" fo:text-transform="none" fo:color="#4d4948"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0" style:family="text">
      <style:text-properties fo:font-variant="normal" fo:text-transform="none" fo:color="#464646"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1" style:family="text">
      <style:text-properties fo:font-variant="normal" fo:text-transform="none" fo:color="#0000ff"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14" style:family="text">
      <style:text-properties fo:font-variant="normal" fo:text-transform="none" fo:color="#4d4948" style:text-line-through-style="none" style:text-line-through-type="none" style:text-position="0% 100%" style:font-name="Corbel" fo:font-size="21pt" fo:letter-spacing="normal" fo:font-style="normal" style:text-underline-style="none" fo:font-weight="bold" style:font-name-asian="Corbel" style:font-size-asian="21pt" style:font-style-asian="normal" style:font-weight-asian="bold" style:font-name-complex="Corbel" style:font-size-complex="21pt" style:font-style-complex="normal" style:font-weight-complex="bold"/>
    </style:style>
    <style:style style:name="T15" style:family="text">
      <style:text-properties fo:font-variant="normal" fo:text-transform="none" fo:color="#4d4948" style:text-line-through-style="none" style:text-line-through-type="none" style:text-position="0% 100%" style:font-name="Corbel" fo:font-size="21pt" fo:letter-spacing="normal" fo:font-style="normal" style:text-underline-style="none" fo:font-weight="normal" style:font-name-asian="Corbel" style:font-size-asian="21pt" style:font-style-asian="normal" style:font-weight-asian="normal" style:font-name-complex="Corbel" style:font-size-complex="21pt" style:font-style-complex="normal" style:font-weight-complex="normal"/>
    </style:style>
    <style:style style:name="T16" style:family="text">
      <style:text-properties fo:font-variant="normal" fo:text-transform="none" fo:color="#4d4948" style:text-line-through-style="none" style:text-line-through-type="none" style:text-position="0% 100%" style:font-name="Corbel" fo:font-size="27pt" fo:letter-spacing="normal" fo:font-style="normal" style:text-underline-style="none" fo:font-weight="bold" style:font-name-asian="Corbel" style:font-size-asian="27pt" style:font-style-asian="normal" style:font-weight-asian="bold" style:font-name-complex="Corbel" style:font-size-complex="27pt" style:font-style-complex="normal" style:font-weight-complex="bold"/>
    </style:style>
    <style:style style:name="T17" style:family="text">
      <style:text-properties fo:font-variant="normal" fo:text-transform="none" fo:color="#595959" style:text-line-through-style="none" style:text-line-through-type="none" style:text-position="0% 100%" style:font-name="Corbel" fo:font-size="19pt" fo:letter-spacing="normal" fo:font-style="normal" style:text-underline-style="none" fo:font-weight="bold" style:font-name-asian="Corbel" style:font-size-asian="19pt" style:font-style-asian="normal" style:font-weight-asian="bold" style:font-name-complex="Corbel" style:font-size-complex="19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19" style:family="text">
      <style:text-properties fo:font-variant="normal" fo:text-transform="none" fo:color="#595959" style:text-line-through-style="none" style:text-line-through-type="none" style:text-position="0% 100%" style:font-name="Corbel" fo:font-size="15pt" fo:letter-spacing="normal" fo:font-style="normal" style:text-underline-style="none" fo:font-weight="normal" style:font-name-asian="Corbel" style:font-size-asian="15pt" style:font-style-asian="normal" style:font-weight-asian="normal" style:font-name-complex="Corbel" style:font-size-complex="15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21" style:family="text">
      <style:text-properties fo:font-variant="normal" fo:text-transform="none" fo:color="#0000ff"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3" style:family="text">
      <style:text-properties fo:font-variant="normal" fo:text-transform="none" fo:color="#595959" style:text-line-through-style="none" style:text-line-through-type="none" style:text-position="0% 100%" style:font-name="Corbel" fo:font-size="32pt" fo:letter-spacing="normal" fo:font-style="normal" style:text-underline-style="none" fo:font-weight="bold" style:font-name-asian="Corbel" style:font-size-asian="32pt" style:font-style-asian="normal" style:font-weight-asian="bold" style:font-name-complex="Corbel" style:font-size-complex="32pt" style:font-style-complex="normal" style:font-weight-complex="bold"/>
    </style:style>
    <style:style style:name="T24" style:family="text">
      <style:text-properties fo:font-variant="normal" fo:text-transform="none" fo:color="#4d4948" style:text-line-through-style="none" style:text-line-through-type="none" style:text-position="0% 100%" style:font-name="Corbel" fo:font-size="19pt" fo:letter-spacing="normal" fo:font-style="normal" style:text-underline-style="none" fo:font-weight="bold" style:font-name-asian="Corbel" style:font-size-asian="19pt" style:font-style-asian="normal" style:font-weight-asian="bold" style:font-name-complex="Corbel" style:font-size-complex="19pt" style:font-style-complex="normal" style:font-weight-complex="bold"/>
    </style:style>
    <style:style style:name="T25" style:family="text">
      <style:text-properties fo:font-variant="normal" fo:text-transform="none" fo:color="#000000" style:text-line-through-style="none" style:text-line-through-type="none" style:text-position="0% 100%" style:font-name="Corbel" fo:font-size="17pt" fo:letter-spacing="normal" fo:font-style="italic" style:text-underline-style="none" fo:font-weight="normal" style:font-name-asian="Corbel" style:font-size-asian="17pt" style:font-style-asian="italic" style:font-weight-asian="normal" style:font-name-complex="Corbel" style:font-size-complex="17pt" style:font-style-complex="italic" style:font-weight-complex="normal"/>
    </style:style>
    <style:style style:name="T26" style:family="text">
      <style:text-properties fo:font-variant="normal" fo:text-transform="none" fo:color="#4d4948" style:text-line-through-style="none" style:text-line-through-type="none" style:text-position="0% 100%" style:font-name="Corbel" fo:font-size="22pt" fo:letter-spacing="normal" fo:font-style="normal" style:text-underline-style="none" fo:font-weight="normal" style:font-name-asian="Corbel" style:font-size-asian="22pt" style:font-style-asian="normal" style:font-weight-asian="normal" style:font-name-complex="Corbel" style:font-size-complex="22pt" style:font-style-complex="normal" style:font-weight-complex="normal"/>
    </style:style>
    <style:style style:name="T27" style:family="text">
      <style:text-properties fo:font-variant="normal" fo:text-transform="none" fo:color="#4d4948" style:text-line-through-style="none" style:text-line-through-type="none" style:text-position="30% 58%" style:font-name="Corbel" fo:font-size="22pt" fo:letter-spacing="normal" fo:font-style="normal" style:text-underline-style="none" fo:font-weight="normal" style:font-name-asian="Corbel" style:font-size-asian="22pt" style:font-style-asian="normal" style:font-weight-asian="normal" style:font-name-complex="Corbel" style:font-size-complex="22pt" style:font-style-complex="normal" style:font-weight-complex="normal"/>
    </style:style>
    <style:style style:name="T28" style:family="text">
      <style:text-properties fo:font-variant="normal" fo:text-transform="none" fo:color="#005472" style:text-line-through-style="none" style:text-line-through-type="none" style:text-position="0% 100%" style:font-name="Corbel" fo:font-size="22pt" fo:letter-spacing="normal" fo:font-style="normal" style:text-underline-style="none" fo:font-weight="bold" style:font-name-asian="Corbel" style:font-size-asian="22pt" style:font-style-asian="normal" style:font-weight-asian="bold" style:font-name-complex="Corbel" style:font-size-complex="22pt" style:font-style-complex="normal" style:font-weight-complex="bold"/>
    </style:style>
    <style:style style:name="T29" style:family="text">
      <style:text-properties fo:font-variant="normal" fo:text-transform="none" fo:color="#4d4948" style:text-line-through-style="none" style:text-line-through-type="none" style:text-position="0% 100%" style:font-name="Corbel" fo:font-size="20pt" fo:letter-spacing="normal" fo:font-style="normal" style:text-underline-style="none" fo:font-weight="normal" style:font-name-asian="Corbel" style:font-size-asian="20pt" style:font-style-asian="normal" style:font-weight-asian="normal" style:font-name-complex="Corbel" style:font-size-complex="20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rbel" fo:font-size="11pt" fo:letter-spacing="normal" fo:font-style="normal" style:text-underline-style="solid" style:text-underline-width="auto" style:text-underline-color="font-color" fo:font-weight="normal" style:font-name-asian="Corbel" style:font-size-asian="11pt" style:font-style-asian="normal" style:font-weight-asian="normal" style:font-name-complex="Corbel" style:font-size-complex="11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rbel" fo:font-size="11pt" fo:letter-spacing="normal" fo:font-style="normal" style:text-underline-style="none" fo:font-weight="normal" style:font-name-asian="Corbel" style:font-size-asian="11pt" style:font-style-asian="normal" style:font-weight-asian="normal" style:font-name-complex="Corbel" style:font-size-complex="11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34" style:family="text">
      <style:text-properties fo:font-variant="normal" fo:text-transform="none" fo:color="#0000ff" style:text-line-through-style="none" style:text-line-through-type="none" style:text-position="0% 100%" style:font-name="Arial" fo:font-size="19pt" fo:letter-spacing="normal" fo:font-style="normal" style:text-underline-style="solid" style:text-underline-width="auto" style:text-underline-color="font-color" fo:font-weight="normal" style:font-name-asian="Arial" style:font-size-asian="19pt" style:font-style-asian="normal" style:font-weight-asian="normal" style:font-name-complex="Arial" style:font-size-complex="19pt" style:font-style-complex="normal" style:font-weight-complex="normal"/>
    </style:style>
    <style:style style:name="T35" style:family="text">
      <style:text-properties fo:font-variant="normal" fo:text-transform="none" fo:color="#4d4948"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orbel" fo:font-size="14pt" fo:letter-spacing="normal" fo:font-style="normal" style:text-underline-style="none" fo:font-weight="bold" style:font-name-asian="Corbel" style:font-size-asian="14pt" style:font-style-asian="normal" style:font-weight-asian="bold" style:font-name-complex="Corbel" style:font-size-complex="14pt" style:font-style-complex="normal" style:font-weight-complex="bold"/>
    </style:style>
    <style:style style:name="T37" style:family="text">
      <style:text-properties fo:font-variant="normal" fo:text-transform="none" fo:color="#000000" style:text-line-through-style="none" style:text-line-through-type="none" style:text-position="0% 100%" style:font-name="Corbel" fo:font-size="8pt" fo:letter-spacing="normal" fo:font-style="normal" style:text-underline-style="none" fo:font-weight="normal" style:font-name-asian="Corbel" style:font-size-asian="8pt" style:font-style-asian="normal" style:font-weight-asian="normal" style:font-name-complex="Corbel" style:font-size-complex="8pt" style:font-style-complex="normal" style:font-weight-complex="normal"/>
    </style:style>
    <style:style style:name="T38" style:family="text">
      <style:text-properties fo:font-variant="normal" fo:text-transform="none" fo:color="#0000ff" style:text-line-through-style="none" style:text-line-through-type="none" style:text-position="0% 100%" style:font-name="Corbel" fo:font-size="8pt" fo:letter-spacing="normal" fo:font-style="normal" style:text-underline-style="solid" style:text-underline-width="auto" style:text-underline-color="font-color" fo:font-weight="normal" style:font-name-asian="Corbel" style:font-size-asian="8pt" style:font-style-asian="normal" style:font-weight-asian="normal" style:font-name-complex="Corbel" style:font-size-complex="8pt" style:font-style-complex="normal" style:font-weight-complex="normal"/>
    </style:style>
    <style:style style:name="T39" style:family="text">
      <style:text-properties fo:font-variant="normal" fo:text-transform="none" fo:color="#005472" style:text-line-through-style="none" style:text-line-through-type="none" style:text-position="0% 100%" style:font-name="Corbel" fo:font-size="27pt" fo:letter-spacing="normal" fo:font-style="normal" style:text-underline-style="none" fo:font-weight="bold" style:font-name-asian="Corbel" style:font-size-asian="27pt" style:font-style-asian="normal" style:font-weight-asian="bold" style:font-name-complex="Corbel" style:font-size-complex="27pt" style:font-style-complex="normal" style:font-weight-complex="bold"/>
    </style:style>
    <style:style style:name="T40" style:family="text">
      <style:text-properties fo:font-variant="normal" fo:text-transform="none" fo:color="#4d4948"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2" style:family="text">
      <style:text-properties fo:font-variant="normal" fo:text-transform="none" fo:color="#4d4948" style:text-line-through-style="none" style:text-line-through-type="none" style:text-position="0% 100%" style:font-name="Corbel" fo:font-size="18pt" fo:letter-spacing="normal" fo:font-style="normal" style:text-underline-style="none" fo:font-weight="bold" style:font-name-asian="Corbel" style:font-size-asian="18pt" style:font-style-asian="normal" style:font-weight-asian="bold" style:font-name-complex="Corbel" style:font-size-complex="18pt" style:font-style-complex="normal" style:font-weight-complex="bold"/>
    </style:style>
    <style:style style:name="T43" style:family="text">
      <style:text-properties fo:font-variant="normal" fo:text-transform="none" fo:color="#4d4948" style:text-line-through-style="none" style:text-line-through-type="none" style:text-position="0% 100%" style:font-name="Corbel" fo:font-size="30pt" fo:letter-spacing="normal" fo:font-style="normal" style:text-underline-style="none" fo:font-weight="bold" style:font-name-asian="Corbel" style:font-size-asian="30pt" style:font-style-asian="normal" style:font-weight-asian="bold" style:font-name-complex="Corbel" style:font-size-complex="30pt" style:font-style-complex="normal" style:font-weight-complex="bold"/>
    </style:style>
    <style:style style:name="T44" style:family="text">
      <style:text-properties fo:font-variant="normal" fo:text-transform="none" fo:color="#4d4948" style:text-line-through-style="none" style:text-line-through-type="none" style:text-position="0% 100%" style:font-name="Corbel" fo:font-size="22pt" fo:letter-spacing="normal" fo:font-style="normal" style:text-underline-style="none" fo:font-weight="bold" style:font-name-asian="Corbel" style:font-size-asian="22pt" style:font-style-asian="normal" style:font-weight-asian="bold" style:font-name-complex="Corbel" style:font-size-complex="22pt" style:font-style-complex="normal" style:font-weight-complex="bold"/>
    </style:style>
    <style:style style:name="T45"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46" style:family="text">
      <style:text-properties fo:font-variant="normal" fo:text-transform="none" fo:color="#0000ff" style:text-line-through-style="none" style:text-line-through-type="none" style:text-position="0% 100%" style:font-name="Corbel" fo:font-size="18.5pt" fo:letter-spacing="normal" fo:font-style="normal" style:text-underline-style="solid" style:text-underline-width="auto" style:text-underline-color="font-color" fo:font-weight="normal" style:font-name-asian="Corbel" style:font-size-asian="18.5pt" style:font-style-asian="normal" style:font-weight-asian="normal" style:font-name-complex="Corbel" style:font-size-complex="18.5pt" style:font-style-complex="normal" style:font-weight-complex="normal"/>
    </style:style>
    <style:style style:name="T47" style:family="text">
      <style:text-properties fo:font-variant="normal" fo:text-transform="none" fo:color="#0000ff" style:text-line-through-style="none" style:text-line-through-type="none" style:text-position="0% 100%" style:font-name="Corbel" fo:font-size="18.5pt" fo:letter-spacing="normal" fo:font-style="normal" style:text-underline-style="none" fo:font-weight="normal" style:font-name-asian="Corbel" style:font-size-asian="18.5pt" style:font-style-asian="normal" style:font-weight-asian="normal" style:font-name-complex="Corbel" style:font-size-complex="18.5pt" style:font-style-complex="normal" style:font-weight-complex="normal"/>
    </style:style>
    <style:style style:name="T48" style:family="text">
      <style:text-properties fo:font-variant="normal" fo:text-transform="none" fo:color="#595959" style:text-line-through-style="none" style:text-line-through-type="none" style:text-position="0% 100%" style:font-name="Arial" fo:font-size="18.5pt" fo:letter-spacing="normal" fo:font-style="normal" style:text-underline-style="none" fo:font-weight="normal" style:font-name-asian="Arial" style:font-size-asian="18.5pt" style:font-style-asian="normal" style:font-weight-asian="normal" style:font-name-complex="Arial" style:font-size-complex="18.5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 fo:font-size="18.5pt" fo:letter-spacing="normal" fo:font-style="normal" style:text-underline-style="none" fo:font-weight="normal" style:font-name-asian="Arial" style:font-size-asian="18.5pt" style:font-style-asian="normal" style:font-weight-asian="normal" style:font-name-complex="Arial" style:font-size-complex="18.5pt" style:font-style-complex="normal" style:font-weight-complex="normal"/>
    </style:style>
    <style:style style:name="T50"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1" style:family="text">
      <style:text-properties fo:font-variant="normal" fo:text-transform="none" fo:color="#005472" style:text-line-through-style="none" style:text-line-through-type="none" style:text-position="0% 100%" style:font-name="Arial" fo:font-size="38pt" fo:letter-spacing="normal" fo:font-style="normal" style:text-underline-style="none" fo:font-weight="bold" style:font-name-asian="Arial" style:font-size-asian="38pt" style:font-style-asian="normal" style:font-weight-asian="bold" style:font-name-complex="Arial" style:font-size-complex="38pt" style:font-style-complex="normal" style:font-weight-complex="bold"/>
    </style:style>
    <style:style style:name="T5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53" style:family="text">
      <style:text-properties fo:font-variant="normal" fo:text-transform="none" fo:color="#0000ff"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54" style:family="text">
      <style:text-properties fo:font-variant="normal" fo:text-transform="none" fo:color="#0000ff" style:text-line-through-style="none" style:text-line-through-type="none" style:text-position="0% 100%" style:font-name="Arial" fo:font-size="18pt" fo:letter-spacing="normal" fo:font-style="normal" style:text-underline-style="solid" style:text-underline-width="auto" style:text-underline-color="font-color" fo:font-weight="bold" style:font-name-asian="Arial" style:font-size-asian="18pt" style:font-style-asian="normal" style:font-weight-asian="bold" style:font-name-complex="Arial" style:font-size-complex="18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2345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87cm" text:min-label-width="0.78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487cm" text:min-label-width="0.78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458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45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draw:frame draw:name="Google Shape;319;p76" presentation:style-name="pr1" draw:text-style-name="P2" draw:layer="layout" svg:width="11.94cm" svg:height="1.536cm" svg:x="12.433cm" svg:y="8.366cm" presentation:class="subtitle" presentation:user-transformed="true">
          <draw:text-box>
            <text:p text:style-name="P1"><text:span text:style-name="T1">Korbinian Bösl</text:span></text:p>
          </draw:text-box>
        </draw:frame>
        <draw:frame draw:name="Google Shape;320;p76" presentation:style-name="pr2" draw:text-style-name="P4" draw:layer="layout" svg:width="13.24cm" svg:height="5.076cm" svg:x="11.133cm" svg:y="3.369cm" presentation:class="title" presentation:user-transformed="true">
          <draw:text-box>
            <text:p text:style-name="P3"><text:span text:style-name="T2">Licensing of research outputs</text:span></text:p>
          </draw:text-box>
        </draw:frame>
        <draw:frame draw:name="Google Shape;321;p76" presentation:style-name="pr3" draw:text-style-name="P6" draw:layer="layout" svg:width="9.401cm" svg:height="0.749cm" svg:x="14.973cm" svg:y="9.936cm" presentation:class="outline" presentation:user-transformed="true">
          <draw:text-box>
            <text:p text:style-name="P5"><text:span text:style-name="T3">Data management coordinator</text:span></text:p>
            <text:p text:style-name="P5"><text:span text:style-name="T3">ELIXIR Norway/Digital Life Norway</text:span></text:p>
          </draw:text-box>
        </draw:frame>
        <draw:custom-shape draw:name="Google Shape;322;p76" draw:style-name="gr1" draw:text-style-name="P7" draw:layer="layout" svg:width="19.492cm" svg:height="1.539cm" svg:x="6.359cm" svg:y="13.667cm">
          <text:p text:style-name="P3"><text:span text:style-name="T4">Illustrative Icons from </text:span><text:span text:style-name="T5"><text:a xlink:href="https://fontawesome.com/" xlink:type="simple">Font Awesome</text:a></text:span><text:span text:style-name="T4"><text:s/>licensed under</text:span><text:span text:style-name="T5"><text:a xlink:href="http://creativecommons.org/licenses/by/4.0/" xlink:type="simple"> Creative Commons Attribution 4.0 International License</text:a></text:span><text:span text:style-name="T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3;p76" draw:style-name="gr2" draw:text-style-name="P8" draw:layer="layout" svg:width="4.037cm" svg:height="2.711cm" svg:x="11.564cm" svg:y="10.82cm">
          <draw:image xlink:href="Pictures/100002010000010F000000B60939EE7473DC96AC.png" xlink:type="simple" xlink:show="embed" xlink:actuate="onLoad">
            <text:p/>
          </draw:image>
        </draw:frame>
        <draw:frame draw:name="Google Shape;324;p76" draw:style-name="gr2" draw:text-style-name="P8" draw:layer="layout" svg:width="4.982cm" svg:height="2.278cm" svg:x="16.077cm" svg:y="11.124cm">
          <draw:image xlink:href="Pictures/1000020100000371000001932E8B67C19433E4A8.png" xlink:type="simple" xlink:show="embed" xlink:actuate="onLoad">
            <text:p/>
          </draw:image>
        </draw:frame>
        <presentation:notes draw:style-name="dp2">
          <draw:frame draw:name="Google Shape;316;g387abafdc64_0_61:notes" presentation:style-name="pr4" draw:text-style-name="P9" draw:layer="layout" svg:width="15.239cm" svg:height="10.001cm" svg:x="1.905cm" svg:y="12.224cm" presentation:class="notes" presentation:placeholder="true" presentation:user-transformed="true">
            <draw:text-box/>
          </draw:frame>
          <draw:page-thumbnail draw:name="Google Shape;317;g387abafdc64_0_61:notes" draw:style-name="gr3" draw:layer="layout" svg:width="15.239cm" svg:height="8.572cm" svg:x="1.905cm" svg:y="3.175cm" draw:page-number="1" presentation:class="page"/>
        </presentation:notes>
      </draw:page>
      <draw:page draw:name="page2" draw:style-name="dp1" draw:master-page-name="TWO_5f_OBJECTS" presentation:presentation-page-layout-name="AL1T3">
        <draw:custom-shape draw:name="Google Shape;329;p77" draw:style-name="gr4" draw:text-style-name="P7" draw:layer="layout" svg:width="16.748cm" svg:height="1.932cm" svg:x="4.955cm" svg:y="0.751cm">
          <text:p text:style-name="P10"><text:span text:style-name="T6">Objec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77" draw:style-name="gr5" draw:text-style-name="P7" draw:layer="layout" svg:width="22.783cm" svg:height="8.284cm" svg:x="1.27cm" svg:y="2.708cm">
          <text:p text:style-name="P3"><text:span text:style-name="T7">?</text:span><text:span text:style-name="T8"> Questions</text:span></text:p>
          <text:list text:style-name="L5">
            <text:list-item>
              <text:p text:style-name="P11"><text:span text:style-name="T8">What is intellectual property/copyright/derivative work?</text:span></text:p>
            </text:list-item>
            <text:list-item>
              <text:p text:style-name="P12"><text:span text:style-name="T8">What is free software/data?</text:span></text:p>
            </text:list-item>
            <text:list-item>
              <text:p text:style-name="P12"><text:span text:style-name="T8">What types of licenses exist?</text:span></text:p>
            </text:list-item>
          </text:list>
          <text:p text:style-name="P11"><text:span text:style-name="T9"/></text:p>
          <text:p text:style-name="P11"><text:span text:style-name="T7">!</text:span><text:span text:style-name="T8"> Objectives</text:span></text:p>
          <text:list text:continue-numbering="true" text:style-name="L5">
            <text:list-item>
              <text:p text:style-name="P11"><text:span text:style-name="T8">Get familiar with terminology around licensing</text:span></text:p>
            </text:list-item>
            <text:list-item>
              <text:p text:style-name="P12"><text:span text:style-name="T8">Discuss what is and is not derivative wo</text:span><text:span text:style-name="T10">r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77" draw:style-name="gr6" draw:text-style-name="P7" draw:layer="layout" svg:width="8.903cm" svg:height="1.1cm" svg:x="19.541cm" svg:y="13.18cm">
          <text:p text:style-name="P3"><text:span text:style-name="T11"><text:a xlink:href="https://github.com/coderefinery/social-coding/blob/main/LICENSE" xlink:type="simple">CC-BY 4.0 coderefinery</text:a></text:span><text:span text:style-name="T1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6;p2:notes" presentation:style-name="pr5" draw:text-style-name="P9" draw:layer="layout" svg:width="16.798cm" svg:height="13.363cm" svg:x="2.1cm" svg:y="14.107cm" presentation:class="notes" presentation:placeholder="true" presentation:user-transformed="true">
            <draw:text-box/>
          </draw:frame>
          <draw:page-thumbnail draw:name="Google Shape;327;p2:notes" draw:style-name="gr3" draw:layer="layout" svg:width="19.797cm" svg:height="11.135cm" svg:x="0.6cm" svg:y="2.257cm" draw:page-number="2" presentation:class="page"/>
        </presentation:notes>
      </draw:page>
      <draw:page draw:name="page3" draw:style-name="dp1" draw:master-page-name="TWO_5f_OBJECTS" presentation:presentation-page-layout-name="AL1T3">
        <draw:custom-shape draw:name="Google Shape;336;p78" draw:style-name="gr4" draw:text-style-name="P7" draw:layer="layout" svg:width="16.748cm" svg:height="1.932cm" svg:x="4.955cm" svg:y="0.751cm">
          <text:p text:style-name="P10"><text:span text:style-name="T6">Intellectual property rights (IP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7;p78" draw:style-name="gr2" draw:text-style-name="P8" draw:layer="layout" svg:width="8.958cm" svg:height="8.958cm" svg:x="13.875cm" svg:y="2.7cm">
          <draw:image xlink:href="Pictures/1000020100000200000002004BCA07F2EDCEEC78.png" xlink:type="simple" xlink:show="embed" xlink:actuate="onLoad">
            <text:p/>
          </draw:image>
        </draw:frame>
        <draw:custom-shape draw:name="Google Shape;338;p78" draw:style-name="gr4" draw:text-style-name="P7" draw:layer="layout" svg:width="4.166cm" svg:height="0.669cm" svg:x="16.425cm" svg:y="11.55cm">
          <text:p text:style-name="P3"><text:span text:style-name="T13">CC-BY 3.0 Wichai.W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78" draw:style-name="gr5" draw:text-style-name="P7" draw:layer="layout" svg:width="12.004cm" svg:height="8.284cm" svg:x="1.27cm" svg:y="3.343cm">
          <text:p xml:id="id1" text:id="id1" text:style-name="P3"><text:span text:style-name="T14">Patent: </text:span><text:span text:style-name="T15">Protects novel, non-obvious, inventions</text:span></text:p>
          <text:p xml:id="id2" text:id="id2" text:style-name="P3"><text:span text:style-name="T15"/></text:p>
          <text:p xml:id="id3" text:id="id3" text:style-name="P3"><text:span text:style-name="T14">Copyright: </text:span><text:span text:style-name="T15">creative products:</text:span><text:span text:style-name="T14"> </text:span><text:span text:style-name="T15">software, writing, figures, photos, some datasets, this presentation</text:span></text:p>
          <text:p xml:id="id4" text:id="id4" text:style-name="P3"><text:span text:style-name="T15"/></text:p>
          <text:p xml:id="id5" text:id="id5" text:style-name="P3"><text:span text:style-name="T14">Database directive</text:span></text:p>
          <text:p xml:id="id6" text:id="id6" text:style-name="P3"><text:span text:style-name="T14"/></text:p>
          <text:p xml:id="id7" text:id="id7" text:style-name="P3"><text:span text:style-name="T14">Trademark: </text:span><text:span text:style-name="T15">Protects a name/brand</text:span></text:p>
          <text:p xml:id="id8" text:id="id8" text:style-name="P13"><text:span text:style-name="T14">Trade Secr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78" draw:style-name="gr4" draw:text-style-name="P7" xml:id="id9" draw:id="id9" draw:layer="layout" svg:width="25.559cm" svg:height="2.517cm" svg:x="6.433cm" svg:y="13.006cm">
          <text:p text:style-name="P3"><text:span text:style-name="T16">IPR often regulated in work contrac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frame draw:name="Google Shape;333;p3:notes" presentation:style-name="pr6" draw:text-style-name="P9" draw:layer="layout" svg:width="16.798cm" svg:height="13.363cm" svg:x="2.1cm" svg:y="14.107cm" presentation:class="notes" presentation:placeholder="true" presentation:user-transformed="true">
            <draw:text-box/>
          </draw:frame>
          <draw:page-thumbnail draw:name="Google Shape;334;p3:notes" draw:style-name="gr3" draw:layer="layout" svg:width="19.797cm" svg:height="11.135cm" svg:x="0.6cm" svg:y="2.257cm" draw:page-number="3" presentation:class="page"/>
        </presentation:notes>
      </draw:page>
      <draw:page draw:name="page4" draw:style-name="dp1" draw:master-page-name="TWO_5f_OBJECTS" presentation:presentation-page-layout-name="AL1T3">
        <draw:custom-shape draw:name="Google Shape;345;p79" draw:style-name="gr4" draw:text-style-name="P7" draw:layer="layout" svg:width="16.748cm" svg:height="1.932cm" svg:x="4.955cm" svg:y="0.751cm">
          <text:p text:style-name="P10"><text:span text:style-name="T6">Patents in Eur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79" draw:style-name="gr5" draw:text-style-name="P7" draw:layer="layout" svg:width="21.191cm" svg:height="8.284cm" svg:x="1.213cm" svg:y="3.192cm">
          <text:p xml:id="id10" text:id="id10" text:style-name="P3"><text:span text:style-name="T17">Active process</text:span></text:p>
          <text:p xml:id="id11" text:id="id11" text:style-name="P3"><text:span text:style-name="T18"/></text:p>
          <text:p xml:id="id12" text:id="id12" text:style-name="P3"><text:span text:style-name="T17">No prior disclosure</text:span></text:p>
          <text:p xml:id="id13" text:id="id13" text:style-name="P3"><text:span text:style-name="T18"/></text:p>
          <text:p xml:id="id14" text:id="id14" text:style-name="P3"><text:span text:style-name="T17">Apply only in limited geographical scopes</text:span></text:p>
          <text:p xml:id="id15" text:id="id15" text:style-name="P3"><text:span text:style-name="T18"/></text:p>
          <text:p xml:id="id16" text:id="id16" text:style-name="P3"><text:span text:style-name="T17">Fees </text:span><text:span text:style-name="T19">(varying by business size and scope)</text:span></text:p>
          <text:p xml:id="id17" text:id="id17" text:style-name="P3"><text:span text:style-name="T20"/></text:p>
          <text:p xml:id="id18" text:id="id18" text:style-name="P3"><text:span text:style-name="T17">Apply for max 20 years after application </text:span></text:p>
          <text:p xml:id="id19" text:id="id19" text:style-name="P3"><text:span text:style-name="T18"/></text:p>
          <text:p xml:id="id20" text:id="id20" text:style-name="P3"><text:span text:style-name="T18"/></text:p>
          <text:p xml:id="id21" text:id="id21" text:style-name="P3"><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79" draw:style-name="gr6" draw:text-style-name="P7" draw:layer="layout" svg:width="21.62cm" svg:height="0.973cm" svg:x="0.084cm" svg:y="12.599cm">
          <text:p text:style-name="P3"><text:span text:style-name="T21"><text:a xlink:href="https://www.digitallifenorway.org/conference/2021/digital-life-2021-know-how-workshop-ipr.html" xlink:type="simple">https://www.digitallifenorway.org/conference/2021/digital-life-2021-know-how-workshop-ipr.html</text:a></text:span><text:span text:style-name="T2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draw:frame draw:name="Google Shape;342;p5:notes" presentation:style-name="pr7" draw:text-style-name="P9" draw:layer="layout" svg:width="16.798cm" svg:height="13.363cm" svg:x="2.1cm" svg:y="14.107cm" presentation:class="notes" presentation:placeholder="true" presentation:user-transformed="true">
            <draw:text-box/>
          </draw:frame>
          <draw:page-thumbnail draw:name="Google Shape;343;p5:notes" draw:style-name="gr3" draw:layer="layout" svg:width="19.797cm" svg:height="11.135cm" svg:x="0.6cm" svg:y="2.257cm" draw:page-number="4" presentation:class="page"/>
        </presentation:notes>
      </draw:page>
      <draw:page draw:name="page5" draw:style-name="dp1" draw:master-page-name="TWO_5f_OBJECTS" presentation:presentation-page-layout-name="AL1T3">
        <draw:custom-shape draw:name="Google Shape;352;p80" draw:style-name="gr4" draw:text-style-name="P7" draw:layer="layout" svg:width="16.748cm" svg:height="1.932cm" svg:x="4.955cm" svg:y="0.751cm">
          <text:p text:style-name="P10"><text:span text:style-name="T6">Software patents in Eur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80" draw:style-name="gr5" draw:text-style-name="P7" draw:layer="layout" svg:width="21.191cm" svg:height="8.284cm" svg:x="1.213cm" svg:y="3.192cm">
          <text:p xml:id="id22" text:id="id22" text:style-name="P3"><text:span text:style-name="T17">(it’s complicated)</text:span></text:p>
          <text:p xml:id="id23" text:id="id23" text:style-name="P3"><text:span text:style-name="T18"/></text:p>
          <text:p xml:id="id24" text:id="id24" text:style-name="P3"><text:span text:style-name="T17">The European Patent Convention states that software is not patentable.</text:span><text:span text:style-name="T23"> </text:span><text:span text:style-name="T17">in contrast with e.g. the US</text:span></text:p>
          <text:p xml:id="id25" text:id="id25" text:style-name="P3"><text:span text:style-name="T18"/></text:p>
          <text:p xml:id="id26" text:id="id26" text:style-name="P3"><text:span text:style-name="T17">The European Patents Office (EPO) grants software patents by declaring them as "computer implemented inventions".</text:span></text:p>
          <text:p xml:id="id27" text:id="id27" text:style-name="P3"><text:span text:style-name="T18"/></text:p>
          <text:p xml:id="id28" text:id="id28" text:style-name="P3"><text:span text:style-name="T17">Erosions: VICOM 1986, COMVIK 2002, ML guidelines 2018, Bentley 2021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80" draw:style-name="gr6" draw:text-style-name="P7" draw:layer="layout" svg:width="18.608cm" svg:height="0.973cm" svg:x="0.084cm" svg:y="12.599cm">
          <text:p text:style-name="P3"><text:span text:style-name="T21"><text:a xlink:href="http://www.epo.org/law-practice/legal-texts/html/epc/2013/e/ar52.html" xlink:type="simple">http://www.epo.org/law-practice/legal-texts/html/epc/2013/e/ar52.html</text:a></text:span><text:span text:style-name="T2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frame draw:name="Google Shape;349;p6:notes" presentation:style-name="pr8" draw:text-style-name="P9" draw:layer="layout" svg:width="16.798cm" svg:height="13.363cm" svg:x="2.1cm" svg:y="14.107cm" presentation:class="notes" presentation:placeholder="true" presentation:user-transformed="true">
            <draw:text-box/>
          </draw:frame>
          <draw:page-thumbnail draw:name="Google Shape;350;p6:notes" draw:style-name="gr3" draw:layer="layout" svg:width="19.797cm" svg:height="11.135cm" svg:x="0.6cm" svg:y="2.257cm" draw:page-number="5" presentation:class="page"/>
        </presentation:notes>
      </draw:page>
      <draw:page draw:name="page6" draw:style-name="dp1" draw:master-page-name="TWO_5f_OBJECTS" presentation:presentation-page-layout-name="AL1T3">
        <draw:custom-shape draw:name="Google Shape;359;p81" draw:style-name="gr4" draw:text-style-name="P7" draw:layer="layout" svg:width="16.748cm" svg:height="1.932cm" svg:x="4.955cm" svg:y="0.751cm">
          <text:p text:style-name="P10"><text:span text:style-name="T6">Copyright in Eur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81" draw:style-name="gr5" draw:text-style-name="P7" draw:layer="layout" svg:width="21.191cm" svg:height="8.284cm" svg:x="1.213cm" svg:y="3.192cm">
          <text:p xml:id="id29" text:id="id29" text:style-name="P3"><text:span text:style-name="T24">Creative products: software, writing, figures, photos,...</text:span></text:p>
          <text:p xml:id="id30" text:id="id30" text:style-name="P3"><text:span text:style-name="T18"/></text:p>
          <text:p xml:id="id31" text:id="id31" text:style-name="P3"><text:span text:style-name="T24">Details for software: Directive 2009/24/EC</text:span></text:p>
          <text:p xml:id="id32" text:id="id32" text:style-name="P3"><text:span text:style-name="T18"/></text:p>
          <text:p xml:id="id33" text:id="id33" text:style-name="P3"><text:span text:style-name="T24">Applies by default</text:span></text:p>
          <text:p xml:id="id34" text:id="id34" text:style-name="P3"><text:span text:style-name="T18"/></text:p>
          <text:p xml:id="id35" text:id="id35" text:style-name="P3"><text:span text:style-name="T24">Does not apply for facts</text:span></text:p>
          <text:p xml:id="id36" text:id="id36" text:style-name="P3"><text:span text:style-name="T18"/></text:p>
          <text:p xml:id="id37" text:id="id37" text:style-name="P3"><text:span text:style-name="T17">Economic rights vs. moral rights</text:span></text:p>
          <text:p xml:id="id38" text:id="id38" text:style-name="P3"><text:span text:style-name="T18"/></text:p>
          <text:p xml:id="id39" text:id="id39" text:style-name="P3"><text:span text:style-name="T17">Author lifetime + 70 years</text:span></text:p>
          <text:p xml:id="id40" text:id="id40" text:style-name="P3"><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81" draw:style-name="gr6" draw:text-style-name="P7" draw:layer="layout" svg:width="21.62cm" svg:height="2.368cm" svg:x="0.084cm" svg:y="12.175cm">
          <text:p text:style-name="P3"><text:span text:style-name="T21"><text:a xlink:href="https://commons.wikimedia.org/wiki/Commons:Copyright_rules_by_territory/Norway" xlink:type="simple">Commons:Copyright rules by territory/Norway</text:a></text:span></text:p>
          <text:p text:style-name="P3"><text:span text:style-name="T21"><text:a xlink:href="https://lovdata.no/pro/#document/NL/lov/2018-06-15-40?searchResultContext=1312&amp;rowNumber=16&amp;totalHits=81212" xlink:type="simple">https://lovdata.no/pro/#document/NL/lov/2018-06-15-40</text:a></text:span></text:p>
          <text:p text:style-name="P3"><text:span text:style-name="T21"><text:a xlink:href="https://eur-lex.europa.eu/legal-content/EN/ALL/?uri=CELEX:32009L0024" xlink:type="simple">https://eur-lex.europa.eu/legal-content/EN/ALL/?uri=CELEX:32009L0024</text:a></text:span><text:span text:style-name="T22"><text:s/></text:span></text:p>
          <text:p text:style-name="P3"><text:span text:style-name="T21"><text:a xlink:href="https://lovdata.no/pro/#document/NLX2/avtale/avt-1992-05-02-1-v17" xlink:type="simple">https://lovdata.no/pro/#document/NLX2/avtale/avt-1992-05-02-1-v17</text:a></text:span><text:span text:style-name="T22"><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2">
          <draw:frame draw:name="Google Shape;356;p7:notes" presentation:style-name="pr9" draw:text-style-name="P9" draw:layer="layout" svg:width="16.798cm" svg:height="13.363cm" svg:x="2.1cm" svg:y="14.107cm" presentation:class="notes" presentation:placeholder="true" presentation:user-transformed="true">
            <draw:text-box/>
          </draw:frame>
          <draw:page-thumbnail draw:name="Google Shape;357;p7:notes" draw:style-name="gr3" draw:layer="layout" svg:width="19.797cm" svg:height="11.135cm" svg:x="0.6cm" svg:y="2.257cm" draw:page-number="6" presentation:class="page"/>
        </presentation:notes>
      </draw:page>
      <draw:page draw:name="page7" draw:style-name="dp1" draw:master-page-name="TWO_5f_OBJECTS" presentation:presentation-page-layout-name="AL1T3">
        <draw:custom-shape draw:name="Google Shape;366;p82" draw:style-name="gr4" draw:text-style-name="P7" draw:layer="layout" svg:width="16.748cm" svg:height="1.932cm" svg:x="4.955cm" svg:y="0.751cm">
          <text:p text:style-name="P10"><text:span text:style-name="T6">Example WIPO: Genetic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p82" draw:style-name="gr5" draw:text-style-name="P7" draw:layer="layout" svg:width="21.191cm" svg:height="8.284cm" svg:x="1.213cm" svg:y="3.192cm">
          <text:p xml:id="id41" text:id="id41" text:style-name="P3"><text:span text:style-name="T24">Raw sequence does not have copyright</text:span></text:p>
          <text:p xml:id="id42" text:id="id42" text:style-name="P3"><text:span text:style-name="T18"/></text:p>
          <text:p xml:id="id43" text:id="id43" text:style-name="P3"><text:span text:style-name="T24">Processed data might have</text:span></text:p>
          <text:p xml:id="id44" text:id="id44" text:style-name="P3"><text:span text:style-name="T18"/></text:p>
          <text:p xml:id="id45" text:id="id45" text:style-name="P3"><text:span text:style-name="T24">Patenting unaffected</text:span></text:p>
          <text:p xml:id="id46" text:id="id46" text:style-name="P3"><text:span text:style-name="T18"/></text:p>
          <text:p xml:id="id47" text:id="id47" text:style-name="P3"><text:span text:style-name="T24">Special consideration regarding traditional knowledge (Nagoya protocol)</text:span></text:p>
          <text:p xml:id="id48" text:id="id48" text:style-name="P3"><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8;p82" draw:style-name="gr6" draw:text-style-name="P7" draw:layer="layout" svg:width="21.62cm" svg:height="0.973cm" svg:x="0.084cm" svg:y="13.234cm">
          <text:p text:style-name="P3"><text:span text:style-name="T21"><text:a xlink:href="https://www.wipo.int/export/sites/www/tk/en/docs/ip_gr_grdataguidefin.pdf" xlink:type="simple">https://www.wipo.int/export/sites/www/tk/en/docs/ip_gr_grdataguidefin.pdf</text:a></text:span><text:span text:style-name="T2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frame draw:name="Google Shape;363;p8:notes" presentation:style-name="pr10" draw:text-style-name="P9" draw:layer="layout" svg:width="16.798cm" svg:height="13.363cm" svg:x="2.1cm" svg:y="14.107cm" presentation:class="notes" presentation:placeholder="true" presentation:user-transformed="true">
            <draw:text-box/>
          </draw:frame>
          <draw:page-thumbnail draw:name="Google Shape;364;p8:notes" draw:style-name="gr3" draw:layer="layout" svg:width="19.797cm" svg:height="11.135cm" svg:x="0.6cm" svg:y="2.257cm" draw:page-number="7" presentation:class="page"/>
        </presentation:notes>
      </draw:page>
      <draw:page draw:name="page8" draw:style-name="dp1" draw:master-page-name="TWO_5f_OBJECTS" presentation:presentation-page-layout-name="AL1T3">
        <draw:custom-shape draw:name="Google Shape;373;p83" draw:style-name="gr4" draw:text-style-name="P7" draw:layer="layout" svg:width="16.748cm" svg:height="1.932cm" svg:x="4.955cm" svg:y="0.751cm">
          <text:p text:style-name="P10"><text:span text:style-name="T6">EU Database dir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83" draw:style-name="gr5" draw:text-style-name="P7" draw:layer="layout" svg:width="21.191cm" svg:height="8.284cm" svg:x="1.213cm" svg:y="3.192cm">
          <text:p xml:id="id49" text:id="id49" text:style-name="P3"><text:span text:style-name="T24">Defined additional (</text:span><text:span text:style-name="T25">sui generis</text:span><text:span text:style-name="T24">) IPR for:</text:span></text:p>
          <text:p xml:id="id50" text:id="id50" text:style-name="P3"><text:span text:style-name="T18"/></text:p>
          <text:p xml:id="id51" text:id="id51" text:style-name="P3"><text:span text:style-name="T24"><text:s/>“</text:span><text:span text:style-name="T24">collection[s] of independent works, data or other materials <text:s/>[that does not fall under copyright] arranged in a systematic or methodical way and individually accessible by electronic or other means” </text:span></text:p>
          <text:p xml:id="id52" text:id="id52" text:style-name="P3"><text:span text:style-name="T18"/></text:p>
          <text:p xml:id="id53" text:id="id53" text:style-name="P3"><text:span text:style-name="T24">15 years by default</text:span></text:p>
          <text:p xml:id="id54" text:id="id54" text:style-name="P3"><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83" draw:style-name="gr6" draw:text-style-name="P7" draw:layer="layout" svg:width="21.62cm" svg:height="1.438cm" svg:x="0.084cm" svg:y="12.387cm">
          <text:p text:style-name="P3"><text:span text:style-name="T21"><text:a xlink:href="https://eur-lex.europa.eu/eli/dir/1996/9/oj" xlink:type="simple">https://eur-lex.europa.eu/eli/dir/1996/9/oj</text:a></text:span><text:span text:style-name="T22"><text:s/></text:span></text:p>
          <text:p text:style-name="P3"><text:span text:style-name="T21"><text:a xlink:href="https://lovdata.no/pro/#document/NLX2/avtale/avt-1992-05-02-1-v17" xlink:type="simple">https://lovdata.no/pro/#document/NLX2/avtale/avt-1992-05-02-1-v17</text:a></text:span><text:span text:style-name="T2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draw:frame draw:name="Google Shape;370;p9:notes" presentation:style-name="pr11" draw:text-style-name="P9" draw:layer="layout" svg:width="16.798cm" svg:height="13.363cm" svg:x="2.1cm" svg:y="14.107cm" presentation:class="notes" presentation:placeholder="true" presentation:user-transformed="true">
            <draw:text-box/>
          </draw:frame>
          <draw:page-thumbnail draw:name="Google Shape;371;p9:notes" draw:style-name="gr3" draw:layer="layout" svg:width="19.797cm" svg:height="11.135cm" svg:x="0.6cm" svg:y="2.257cm" draw:page-number="8" presentation:class="page"/>
        </presentation:notes>
      </draw:page>
      <draw:page draw:name="page9" draw:style-name="dp1" draw:master-page-name="TWO_5f_OBJECTS" presentation:presentation-page-layout-name="AL1T3">
        <draw:custom-shape draw:name="Google Shape;380;p84" draw:style-name="gr4" draw:text-style-name="P7" draw:layer="layout" svg:width="16.748cm" svg:height="1.932cm" svg:x="4.955cm" svg:y="0.751cm">
          <text:p text:style-name="P10"><text:span text:style-name="T6">Licen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84" draw:style-name="gr5" draw:text-style-name="P7" draw:layer="layout" svg:width="21.191cm" svg:height="4.457cm" svg:x="1.213cm" svg:y="5.097cm">
          <text:p text:style-name="P10"><text:span text:style-name="T10">A licensor may grant a license under intellectual property laws to authorize a use (such as copying software or using a patented invention) to a licensee, sparing the licensee from a claim of infringement brought by the licen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2;p84" draw:style-name="gr6" draw:text-style-name="P7" draw:layer="layout" svg:width="21.62cm" svg:height="0.973cm" svg:x="0.084cm" svg:y="12.599cm">
          <text:p text:style-name="P3"><text:span text:style-name="T21"><text:a xlink:href="https://en.wikipedia.org/wiki/Wikipedia:Text_of_Creative_Commons_Attribution-ShareAlike_3.0_Unported_License" xlink:type="simple">CC-BY-SA 3.0</text:a></text:span><text:span text:style-name="T22"><text:s text:c="2"/></text:span><text:span text:style-name="T21"><text:a xlink:href="https://en.wikipedia.org/wiki/License" xlink:type="simple">License - Wikipedia</text:a></text:span><text:span text:style-name="T2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77;p10:notes" presentation:style-name="pr12" draw:text-style-name="P9" draw:layer="layout" svg:width="16.798cm" svg:height="13.363cm" svg:x="2.1cm" svg:y="14.107cm" presentation:class="notes" presentation:placeholder="true" presentation:user-transformed="true">
            <draw:text-box/>
          </draw:frame>
          <draw:page-thumbnail draw:name="Google Shape;378;p10:notes" draw:style-name="gr3" draw:layer="layout" svg:width="19.797cm" svg:height="11.135cm" svg:x="0.6cm" svg:y="2.257cm" draw:page-number="9" presentation:class="page"/>
        </presentation:notes>
      </draw:page>
      <draw:page draw:name="page10" draw:style-name="dp1" draw:master-page-name="BLANK">
        <draw:custom-shape draw:name="Google Shape;387;p85" draw:style-name="gr4" draw:text-style-name="P7" draw:layer="layout" svg:width="22.048cm" svg:height="4.013cm" svg:x="1.905cm" svg:y="2.336cm">
          <text:p text:style-name="P14"><text:span text:style-name="T26">Legal security for users (A) </text:span></text:p>
          <text:p text:style-name="P14"><text:span text:style-name="T26">Requirement from the funding bodies</text:span></text:p>
          <text:p text:style-name="P14"><text:span text:style-name="T26">Increase of willingness to reuse outputs (R)</text:span></text:p>
          <text:p text:style-name="P14"><text:span text:style-name="T26">Allows deposition/mirroring in 2</text:span><text:span text:style-name="T27">nd</text:span><text:span text:style-name="T26"> databases (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85" draw:style-name="gr4" draw:text-style-name="P7" draw:layer="layout" svg:width="21.126cm" svg:height="1.932cm" svg:x="2.888cm" svg:y="0.751cm">
          <text:p text:style-name="P10"><text:span text:style-name="T28">Why should I license my research outpu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84;p11:notes" presentation:style-name="pr13" draw:text-style-name="P9" draw:layer="layout" svg:width="16.798cm" svg:height="13.363cm" svg:x="2.1cm" svg:y="14.107cm" presentation:class="notes" presentation:placeholder="true" presentation:user-transformed="true">
            <draw:text-box/>
          </draw:frame>
          <draw:page-thumbnail draw:name="Google Shape;385;p11:notes" draw:style-name="gr3" draw:layer="layout" svg:width="19.797cm" svg:height="11.135cm" svg:x="0.6cm" svg:y="2.257cm" draw:page-number="10" presentation:class="page"/>
        </presentation:notes>
      </draw:page>
      <draw:page draw:name="page11" draw:style-name="dp1" draw:master-page-name="BLANK">
        <draw:custom-shape draw:name="Google Shape;393;p86" draw:style-name="gr4" draw:text-style-name="P7" draw:layer="layout" svg:width="12.811cm" svg:height="1.932cm" svg:x="6.703cm" svg:y="0.751cm">
          <text:p text:style-name="P10"><text:span text:style-name="T28">Concepts in open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4;p86" draw:style-name="gr4" draw:text-style-name="P7" draw:layer="layout" svg:width="23.187cm" svg:height="11.45cm" svg:x="2.986cm" svg:y="2.4cm">
          <text:p text:style-name="P3"><text:span text:style-name="T29">Waive all your interests that may exist in your work </text:span></text:p>
          <text:p text:style-name="P15"><text:span text:style-name="T30"/></text:p>
          <text:p text:style-name="P14"><text:span text:style-name="T29">Copy left:</text:span></text:p>
          <text:p text:style-name="P14"><text:span text:style-name="T29">Credit for the original creation</text:span></text:p>
          <text:p text:style-name="P16"><text:span text:style-name="T29">License new creations under identical terms</text:span></text:p>
          <text:p text:style-name="P16"><text:span text:style-name="T29">Non-commercial</text:span></text:p>
          <text:p text:style-name="P16"><text:span text:style-name="T29">Cannot be shared with others in adapted form</text:span></text:p>
          <text:p text:style-name="P17"><text:span text:style-name="T30"/></text:p>
          <text:p text:style-name="P17"><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5;p86" draw:style-name="gr2" draw:text-style-name="P8" draw:layer="layout" svg:width="1.419cm" svg:height="1.604cm" svg:x="1.12cm" svg:y="5.715cm">
          <draw:image xlink:href="Pictures/10000201000000500000005FBF2D701A62A618AB.png" xlink:type="simple" xlink:show="embed" xlink:actuate="onLoad">
            <text:p/>
          </draw:image>
        </draw:frame>
        <draw:frame draw:name="Google Shape;396;p86" draw:style-name="gr2" draw:text-style-name="P8" draw:layer="layout" svg:width="1.419cm" svg:height="1.603cm" svg:x="1.12cm" svg:y="7.62cm">
          <draw:image xlink:href="Pictures/10000201000000500000005FFBD869CC92D5B6BB.png" xlink:type="simple" xlink:show="embed" xlink:actuate="onLoad">
            <text:p/>
          </draw:image>
        </draw:frame>
        <draw:frame draw:name="Google Shape;397;p86" draw:style-name="gr2" draw:text-style-name="P8" draw:layer="layout" svg:width="1.419cm" svg:height="1.603cm" svg:x="1.12cm" svg:y="9.826cm">
          <draw:image xlink:href="Pictures/10000201000000500000005F08E0A9CA0F07BAD5.png" xlink:type="simple" xlink:show="embed" xlink:actuate="onLoad">
            <text:p/>
          </draw:image>
        </draw:frame>
        <draw:frame draw:name="Google Shape;398;p86" draw:style-name="gr2" draw:text-style-name="P8" draw:layer="layout" svg:width="1.419cm" svg:height="1.586cm" svg:x="1.12cm" svg:y="11.748cm">
          <draw:image xlink:href="Pictures/10000201000000500000005EDA0D2A1D719EF0FA.png" xlink:type="simple" xlink:show="embed" xlink:actuate="onLoad">
            <text:p/>
          </draw:image>
        </draw:frame>
        <draw:frame draw:name="Google Shape;399;p86" draw:style-name="gr2" draw:text-style-name="P8" draw:layer="layout" svg:width="1.419cm" svg:height="1.603cm" svg:x="1.12cm" svg:y="2.175cm">
          <draw:image xlink:href="Pictures/10000201000000500000005F77ACFE49A963AA6D.png" xlink:type="simple" xlink:show="embed" xlink:actuate="onLoad">
            <text:p/>
          </draw:image>
        </draw:frame>
        <draw:custom-shape draw:name="Google Shape;400;p86" draw:style-name="gr4" draw:text-style-name="P7" draw:layer="layout" svg:width="13.393cm" svg:height="1.019cm" svg:x="0.152cm" svg:y="13.651cm">
          <text:p text:style-name="P3"><text:span text:style-name="T22">Icons </text:span><text:span text:style-name="T31"><text:a xlink:href="https://creativecommons.org/licenses/by/4.0/" xlink:type="simple">CC-BY 4.0</text:a></text:span><text:span text:style-name="T32"><text:s/></text:span><text:span text:style-name="T22"><text:s/></text:span><text:span text:style-name="T21"><text:a xlink:href="https://creativecommons.org/" xlink:type="simple">https://creativecommons.org</text:a></text:span><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90;p12:notes" presentation:style-name="pr14" draw:text-style-name="P9" draw:layer="layout" svg:width="16.798cm" svg:height="13.363cm" svg:x="2.1cm" svg:y="14.107cm" presentation:class="notes" presentation:placeholder="true" presentation:user-transformed="true">
            <draw:text-box/>
          </draw:frame>
          <draw:page-thumbnail draw:name="Google Shape;391;p12:notes" draw:style-name="gr3" draw:layer="layout" svg:width="19.797cm" svg:height="11.135cm" svg:x="0.6cm" svg:y="2.257cm" draw:page-number="11" presentation:class="page"/>
        </presentation:notes>
      </draw:page>
      <draw:page draw:name="page12" draw:style-name="dp1" draw:master-page-name="BLANK">
        <draw:frame draw:name="Google Shape;405;p87" draw:style-name="gr2" draw:text-style-name="P8" draw:layer="layout" svg:width="19.581cm" svg:height="12.888cm" svg:x="3.333cm" svg:y="0.611cm">
          <draw:image xlink:href="Pictures/10000201000003DD0000028BE40931C3A9C1E21E.png" xlink:type="simple" xlink:show="embed" xlink:actuate="onLoad">
            <text:p/>
          </draw:image>
        </draw:frame>
        <draw:custom-shape draw:name="Google Shape;406;p87" draw:style-name="gr7" draw:text-style-name="P18" draw:layer="layout" svg:width="18.298cm" svg:height="7.788cm" svg:x="4.3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7;p87" draw:style-name="gr2" draw:text-style-name="P8" draw:layer="layout" svg:width="7.598cm" svg:height="1.827cm" svg:x="0.95cm" svg:y="1.35cm">
          <draw:image xlink:href="Pictures/10000201000004620000010E75D4D38F469AD966.png" xlink:type="simple" xlink:show="embed" xlink:actuate="onLoad">
            <text:p/>
          </draw:image>
        </draw:frame>
        <draw:custom-shape draw:name="Google Shape;408;p87" draw:style-name="gr7" draw:text-style-name="P18" draw:layer="layout" svg:width="15.448cm" svg:height="2.238cm" svg:x="4.35cm" svg:y="11.26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87" draw:style-name="gr4" draw:text-style-name="P7" draw:layer="layout" svg:width="13.648cm" svg:height="0.929cm" svg:x="0.15cm" svg:y="13.501cm">
          <text:p text:style-name="P3"><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02;p13:notes" presentation:style-name="pr15" draw:text-style-name="P9" draw:layer="layout" svg:width="16.798cm" svg:height="13.363cm" svg:x="2.1cm" svg:y="14.107cm" presentation:class="notes" presentation:placeholder="true" presentation:user-transformed="true">
            <draw:text-box/>
          </draw:frame>
          <draw:page-thumbnail draw:name="Google Shape;403;p13:notes" draw:style-name="gr3" draw:layer="layout" svg:width="19.797cm" svg:height="11.135cm" svg:x="0.6cm" svg:y="2.257cm" draw:page-number="12" presentation:class="page"/>
        </presentation:notes>
      </draw:page>
      <draw:page draw:name="page13" draw:style-name="dp1" draw:master-page-name="BLANK">
        <draw:frame draw:name="Google Shape;414;p88" draw:style-name="gr2" draw:text-style-name="P8" draw:layer="layout" svg:width="19.581cm" svg:height="12.888cm" svg:x="3.333cm" svg:y="0.611cm">
          <draw:image xlink:href="Pictures/10000201000003DD0000028BE40931C3A9C1E21E.png" xlink:type="simple" xlink:show="embed" xlink:actuate="onLoad">
            <text:p/>
          </draw:image>
        </draw:frame>
        <draw:custom-shape draw:name="Google Shape;415;p88" draw:style-name="gr7" draw:text-style-name="P18" draw:layer="layout" svg:width="16.198cm" svg:height="7.788cm" svg:x="6.4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6;p88" draw:style-name="gr2" draw:text-style-name="P8" draw:layer="layout" svg:width="7.598cm" svg:height="1.827cm" svg:x="0.95cm" svg:y="1.35cm">
          <draw:image xlink:href="Pictures/10000201000004620000010E75D4D38F469AD966.png" xlink:type="simple" xlink:show="embed" xlink:actuate="onLoad">
            <text:p/>
          </draw:image>
        </draw:frame>
        <draw:custom-shape draw:name="Google Shape;417;p88" draw:style-name="gr7" draw:text-style-name="P18" draw:layer="layout" svg:width="15.448cm" svg:height="2.238cm" svg:x="4.35cm" svg:y="11.26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88" draw:style-name="gr4" draw:text-style-name="P7" draw:layer="layout" svg:width="13.648cm" svg:height="0.929cm" svg:x="0.15cm" svg:y="13.502cm">
          <text:p text:style-name="P3"><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11;p14:notes" presentation:style-name="pr16" draw:text-style-name="P9" draw:layer="layout" svg:width="16.798cm" svg:height="13.363cm" svg:x="2.1cm" svg:y="14.107cm" presentation:class="notes" presentation:placeholder="true" presentation:user-transformed="true">
            <draw:text-box/>
          </draw:frame>
          <draw:page-thumbnail draw:name="Google Shape;412;p14:notes" draw:style-name="gr3" draw:layer="layout" svg:width="19.797cm" svg:height="11.135cm" svg:x="0.6cm" svg:y="2.257cm" draw:page-number="13" presentation:class="page"/>
        </presentation:notes>
      </draw:page>
      <draw:page draw:name="page14" draw:style-name="dp1" draw:master-page-name="BLANK">
        <draw:frame draw:name="Google Shape;423;p89" draw:style-name="gr2" draw:text-style-name="P8" draw:layer="layout" svg:width="19.581cm" svg:height="12.888cm" svg:x="3.333cm" svg:y="0.611cm">
          <draw:image xlink:href="Pictures/10000201000003DD0000028BE40931C3A9C1E21E.png" xlink:type="simple" xlink:show="embed" xlink:actuate="onLoad">
            <text:p/>
          </draw:image>
        </draw:frame>
        <draw:custom-shape draw:name="Google Shape;424;p89" draw:style-name="gr7" draw:text-style-name="P18" draw:layer="layout" svg:width="14.098cm" svg:height="7.788cm" svg:x="8.5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5;p89" draw:style-name="gr2" draw:text-style-name="P8" draw:layer="layout" svg:width="7.598cm" svg:height="1.827cm" svg:x="0.95cm" svg:y="1.35cm">
          <draw:image xlink:href="Pictures/10000201000004620000010E75D4D38F469AD966.png" xlink:type="simple" xlink:show="embed" xlink:actuate="onLoad">
            <text:p/>
          </draw:image>
        </draw:frame>
        <draw:custom-shape draw:name="Google Shape;426;p89" draw:style-name="gr7" draw:text-style-name="P18" draw:layer="layout" svg:width="15.448cm" svg:height="2.238cm" svg:x="4.35cm" svg:y="11.26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7;p89" draw:style-name="gr4" draw:text-style-name="P7" draw:layer="layout" svg:width="13.648cm" svg:height="0.929cm" svg:x="0.15cm" svg:y="13.502cm">
          <text:p text:style-name="P3"><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20;p15:notes" presentation:style-name="pr17" draw:text-style-name="P9" draw:layer="layout" svg:width="16.798cm" svg:height="13.363cm" svg:x="2.1cm" svg:y="14.107cm" presentation:class="notes" presentation:placeholder="true" presentation:user-transformed="true">
            <draw:text-box/>
          </draw:frame>
          <draw:page-thumbnail draw:name="Google Shape;421;p15:notes" draw:style-name="gr3" draw:layer="layout" svg:width="19.797cm" svg:height="11.135cm" svg:x="0.6cm" svg:y="2.257cm" draw:page-number="14" presentation:class="page"/>
        </presentation:notes>
      </draw:page>
      <draw:page draw:name="page15" draw:style-name="dp1" draw:master-page-name="BLANK">
        <draw:frame draw:name="Google Shape;432;p90" draw:style-name="gr2" draw:text-style-name="P8" draw:layer="layout" svg:width="19.581cm" svg:height="12.888cm" svg:x="3.333cm" svg:y="0.611cm">
          <draw:image xlink:href="Pictures/10000201000003DD0000028BE40931C3A9C1E21E.png" xlink:type="simple" xlink:show="embed" xlink:actuate="onLoad">
            <text:p/>
          </draw:image>
        </draw:frame>
        <draw:custom-shape draw:name="Google Shape;433;p90" draw:style-name="gr7" draw:text-style-name="P18" draw:layer="layout" svg:width="11.848cm" svg:height="7.788cm" svg:x="10.8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4;p90" draw:style-name="gr2" draw:text-style-name="P8" draw:layer="layout" svg:width="7.598cm" svg:height="1.827cm" svg:x="0.95cm" svg:y="1.35cm">
          <draw:image xlink:href="Pictures/10000201000004620000010E75D4D38F469AD966.png" xlink:type="simple" xlink:show="embed" xlink:actuate="onLoad">
            <text:p/>
          </draw:image>
        </draw:frame>
        <draw:custom-shape draw:name="Google Shape;435;p90" draw:style-name="gr7" draw:text-style-name="P18" draw:layer="layout" svg:width="15.448cm" svg:height="2.238cm" svg:x="4.35cm" svg:y="11.26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6;p90" draw:style-name="gr4" draw:text-style-name="P7" draw:layer="layout" svg:width="13.648cm" svg:height="0.929cm" svg:x="0.15cm" svg:y="13.502cm">
          <text:p text:style-name="P3"><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29;p16:notes" presentation:style-name="pr18" draw:text-style-name="P9" draw:layer="layout" svg:width="16.798cm" svg:height="13.363cm" svg:x="2.1cm" svg:y="14.107cm" presentation:class="notes" presentation:placeholder="true" presentation:user-transformed="true">
            <draw:text-box/>
          </draw:frame>
          <draw:page-thumbnail draw:name="Google Shape;430;p16:notes" draw:style-name="gr3" draw:layer="layout" svg:width="19.797cm" svg:height="11.135cm" svg:x="0.6cm" svg:y="2.257cm" draw:page-number="15" presentation:class="page"/>
        </presentation:notes>
      </draw:page>
      <draw:page draw:name="page16" draw:style-name="dp1" draw:master-page-name="BLANK">
        <draw:frame draw:name="Google Shape;441;p91" draw:style-name="gr2" draw:text-style-name="P8" draw:layer="layout" svg:width="19.581cm" svg:height="12.888cm" svg:x="3.333cm" svg:y="0.611cm">
          <draw:image xlink:href="Pictures/10000201000003DD0000028BE40931C3A9C1E21E.png" xlink:type="simple" xlink:show="embed" xlink:actuate="onLoad">
            <text:p/>
          </draw:image>
        </draw:frame>
        <draw:custom-shape draw:name="Google Shape;442;p91" draw:style-name="gr7" draw:text-style-name="P18" draw:layer="layout" svg:width="11.548cm" svg:height="7.788cm" svg:x="11.1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3;p91" draw:style-name="gr2" draw:text-style-name="P8" draw:layer="layout" svg:width="7.598cm" svg:height="1.827cm" svg:x="0.95cm" svg:y="1.35cm">
          <draw:image xlink:href="Pictures/10000201000004620000010E75D4D38F469AD966.png" xlink:type="simple" xlink:show="embed" xlink:actuate="onLoad">
            <text:p/>
          </draw:image>
        </draw:frame>
        <draw:custom-shape draw:name="Google Shape;444;p91" draw:style-name="gr7" draw:text-style-name="P18" draw:layer="layout" svg:width="9.148cm" svg:height="2.238cm" svg:x="10.65cm" svg:y="11.26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p91" draw:style-name="gr4" draw:text-style-name="P7" draw:layer="layout" svg:width="13.648cm" svg:height="0.929cm" svg:x="0.15cm" svg:y="13.502cm">
          <text:p text:style-name="P3"><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38;p17:notes" presentation:style-name="pr19" draw:text-style-name="P9" draw:layer="layout" svg:width="16.798cm" svg:height="13.363cm" svg:x="2.1cm" svg:y="14.107cm" presentation:class="notes" presentation:placeholder="true" presentation:user-transformed="true">
            <draw:text-box/>
          </draw:frame>
          <draw:page-thumbnail draw:name="Google Shape;439;p17:notes" draw:style-name="gr3" draw:layer="layout" svg:width="19.797cm" svg:height="11.135cm" svg:x="0.6cm" svg:y="2.257cm" draw:page-number="16" presentation:class="page"/>
        </presentation:notes>
      </draw:page>
      <draw:page draw:name="page17" draw:style-name="dp1" draw:master-page-name="BLANK">
        <draw:frame draw:name="Google Shape;450;p92" draw:style-name="gr2" draw:text-style-name="P8" draw:layer="layout" svg:width="19.581cm" svg:height="12.888cm" svg:x="3.333cm" svg:y="0.611cm">
          <draw:image xlink:href="Pictures/10000201000003DD0000028BE40931C3A9C1E21E.png" xlink:type="simple" xlink:show="embed" xlink:actuate="onLoad">
            <text:p/>
          </draw:image>
        </draw:frame>
        <draw:custom-shape draw:name="Google Shape;451;p92" draw:style-name="gr7" draw:text-style-name="P18" draw:layer="layout" svg:width="9.598cm" svg:height="7.788cm" svg:x="13.0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2;p92" draw:style-name="gr2" draw:text-style-name="P8" draw:layer="layout" svg:width="7.598cm" svg:height="1.827cm" svg:x="0.95cm" svg:y="1.35cm">
          <draw:image xlink:href="Pictures/10000201000004620000010E75D4D38F469AD966.png" xlink:type="simple" xlink:show="embed" xlink:actuate="onLoad">
            <text:p/>
          </draw:image>
        </draw:frame>
        <draw:custom-shape draw:name="Google Shape;453;p92" draw:style-name="gr7" draw:text-style-name="P18" draw:layer="layout" svg:width="9.148cm" svg:height="2.238cm" svg:x="10.65cm" svg:y="11.26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4;p92" draw:style-name="gr4" draw:text-style-name="P7" draw:layer="layout" svg:width="13.648cm" svg:height="0.929cm" svg:x="0.15cm" svg:y="13.502cm">
          <text:p text:style-name="P3"><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47;p18:notes" presentation:style-name="pr20" draw:text-style-name="P9" draw:layer="layout" svg:width="16.798cm" svg:height="13.363cm" svg:x="2.1cm" svg:y="14.107cm" presentation:class="notes" presentation:placeholder="true" presentation:user-transformed="true">
            <draw:text-box/>
          </draw:frame>
          <draw:page-thumbnail draw:name="Google Shape;448;p18:notes" draw:style-name="gr3" draw:layer="layout" svg:width="19.797cm" svg:height="11.135cm" svg:x="0.6cm" svg:y="2.257cm" draw:page-number="17" presentation:class="page"/>
        </presentation:notes>
      </draw:page>
      <draw:page draw:name="page18" draw:style-name="dp1" draw:master-page-name="BLANK">
        <draw:frame draw:name="Google Shape;459;p93" draw:style-name="gr2" draw:text-style-name="P8" draw:layer="layout" svg:width="19.581cm" svg:height="12.888cm" svg:x="3.333cm" svg:y="0.611cm">
          <draw:image xlink:href="Pictures/10000201000003DD0000028BE40931C3A9C1E21E.png" xlink:type="simple" xlink:show="embed" xlink:actuate="onLoad">
            <text:p/>
          </draw:image>
        </draw:frame>
        <draw:custom-shape draw:name="Google Shape;460;p93" draw:style-name="gr7" draw:text-style-name="P18" draw:layer="layout" svg:width="7.198cm" svg:height="7.788cm" svg:x="15.4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1;p93" draw:style-name="gr2" draw:text-style-name="P8" draw:layer="layout" svg:width="7.598cm" svg:height="1.827cm" svg:x="0.95cm" svg:y="1.35cm">
          <draw:image xlink:href="Pictures/10000201000004620000010E75D4D38F469AD966.png" xlink:type="simple" xlink:show="embed" xlink:actuate="onLoad">
            <text:p/>
          </draw:image>
        </draw:frame>
        <draw:custom-shape draw:name="Google Shape;462;p93" draw:style-name="gr7" draw:text-style-name="P18" draw:layer="layout" svg:width="9.148cm" svg:height="2.238cm" svg:x="10.65cm" svg:y="11.26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p93" draw:style-name="gr4" draw:text-style-name="P7" draw:layer="layout" svg:width="13.648cm" svg:height="0.929cm" svg:x="0.15cm" svg:y="13.502cm">
          <text:p text:style-name="P3"><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56;p19:notes" presentation:style-name="pr21" draw:text-style-name="P9" draw:layer="layout" svg:width="16.798cm" svg:height="13.363cm" svg:x="2.1cm" svg:y="14.107cm" presentation:class="notes" presentation:placeholder="true" presentation:user-transformed="true">
            <draw:text-box/>
          </draw:frame>
          <draw:page-thumbnail draw:name="Google Shape;457;p19:notes" draw:style-name="gr3" draw:layer="layout" svg:width="19.797cm" svg:height="11.135cm" svg:x="0.6cm" svg:y="2.257cm" draw:page-number="18" presentation:class="page"/>
        </presentation:notes>
      </draw:page>
      <draw:page draw:name="page19" draw:style-name="dp1" draw:master-page-name="BLANK">
        <draw:frame draw:name="Google Shape;468;p94" draw:style-name="gr2" draw:text-style-name="P8" draw:layer="layout" svg:width="19.581cm" svg:height="12.888cm" svg:x="3.333cm" svg:y="0.611cm">
          <draw:image xlink:href="Pictures/10000201000003DD0000028BE40931C3A9C1E21E.png" xlink:type="simple" xlink:show="embed" xlink:actuate="onLoad">
            <text:p/>
          </draw:image>
        </draw:frame>
        <draw:custom-shape draw:name="Google Shape;469;p94" draw:style-name="gr7" draw:text-style-name="P18" draw:layer="layout" svg:width="2.698cm" svg:height="7.788cm" svg:x="19.9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0;p94" draw:style-name="gr2" draw:text-style-name="P8" draw:layer="layout" svg:width="7.598cm" svg:height="1.827cm" svg:x="0.95cm" svg:y="1.35cm">
          <draw:image xlink:href="Pictures/10000201000004620000010E75D4D38F469AD966.png" xlink:type="simple" xlink:show="embed" xlink:actuate="onLoad">
            <text:p/>
          </draw:image>
        </draw:frame>
        <draw:custom-shape draw:name="Google Shape;471;p94" draw:style-name="gr7" draw:text-style-name="P18" draw:layer="layout" svg:width="4.348cm" svg:height="2.238cm" svg:x="15.45cm" svg:y="11.26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94" draw:style-name="gr4" draw:text-style-name="P7" draw:layer="layout" svg:width="13.648cm" svg:height="0.929cm" svg:x="0.15cm" svg:y="13.502cm">
          <text:p text:style-name="P3"><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65;p20:notes" presentation:style-name="pr22" draw:text-style-name="P9" draw:layer="layout" svg:width="16.798cm" svg:height="13.363cm" svg:x="2.1cm" svg:y="14.107cm" presentation:class="notes" presentation:placeholder="true" presentation:user-transformed="true">
            <draw:text-box/>
          </draw:frame>
          <draw:page-thumbnail draw:name="Google Shape;466;p20:notes" draw:style-name="gr3" draw:layer="layout" svg:width="19.797cm" svg:height="11.135cm" svg:x="0.6cm" svg:y="2.257cm" draw:page-number="19" presentation:class="page"/>
        </presentation:notes>
      </draw:page>
      <draw:page draw:name="page20" draw:style-name="dp1" draw:master-page-name="BLANK">
        <draw:frame draw:name="Google Shape;477;p95" draw:style-name="gr2" draw:text-style-name="P8" draw:layer="layout" svg:width="19.581cm" svg:height="12.888cm" svg:x="3.333cm" svg:y="0.611cm">
          <draw:image xlink:href="Pictures/10000201000003DD0000028BE40931C3A9C1E21E.png" xlink:type="simple" xlink:show="embed" xlink:actuate="onLoad">
            <text:p/>
          </draw:image>
        </draw:frame>
        <draw:custom-shape draw:name="Google Shape;478;p95" draw:style-name="gr7" draw:text-style-name="P18" draw:layer="layout" svg:width="2.698cm" svg:height="7.788cm" svg:x="19.9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9;p95" draw:style-name="gr2" draw:text-style-name="P8" draw:layer="layout" svg:width="7.598cm" svg:height="1.827cm" svg:x="0.95cm" svg:y="1.35cm">
          <draw:image xlink:href="Pictures/10000201000004620000010E75D4D38F469AD966.png" xlink:type="simple" xlink:show="embed" xlink:actuate="onLoad">
            <text:p/>
          </draw:image>
        </draw:frame>
        <draw:custom-shape draw:name="Google Shape;480;p95" draw:style-name="gr4" draw:text-style-name="P7" draw:layer="layout" svg:width="13.648cm" svg:height="0.929cm" svg:x="0.15cm" svg:y="13.502cm">
          <text:p text:style-name="P3"><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74;p21:notes" presentation:style-name="pr23" draw:text-style-name="P9" draw:layer="layout" svg:width="16.798cm" svg:height="13.363cm" svg:x="2.1cm" svg:y="14.107cm" presentation:class="notes" presentation:placeholder="true" presentation:user-transformed="true">
            <draw:text-box/>
          </draw:frame>
          <draw:page-thumbnail draw:name="Google Shape;475;p21:notes" draw:style-name="gr3" draw:layer="layout" svg:width="19.797cm" svg:height="11.135cm" svg:x="0.6cm" svg:y="2.257cm" draw:page-number="20" presentation:class="page"/>
        </presentation:notes>
      </draw:page>
      <draw:page draw:name="page21" draw:style-name="dp1" draw:master-page-name="BLANK">
        <draw:custom-shape draw:name="Google Shape;485;p96" draw:style-name="gr4" draw:text-style-name="P7" draw:layer="layout" svg:width="22.798cm" svg:height="1.435cm" svg:x="0.15cm" svg:y="13.275cm">
          <text:p text:style-name="P3"><text:span text:style-name="T22">Creative Commons, Nathan Yergler, Alex Roberts. Licensed to the public under </text:span><text:span text:style-name="T21"><text:a xlink:href="https://creativecommons.org/licenses/by/3.0/" xlink:type="simple">CC BY 3.0 Unported</text:a></text:span><text:span text:style-name="T22">.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96" draw:style-name="gr7" draw:text-style-name="P18" draw:layer="layout" svg:width="2.698cm" svg:height="7.787cm" svg:x="19.9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7;p96" draw:style-name="gr2" draw:text-style-name="P8" draw:layer="layout" svg:width="7.598cm" svg:height="1.827cm" svg:x="0.95cm" svg:y="1.35cm">
          <draw:image xlink:href="Pictures/10000201000004620000010E75D4D38F469AD966.png" xlink:type="simple" xlink:show="embed" xlink:actuate="onLoad">
            <text:p/>
          </draw:image>
        </draw:frame>
        <draw:frame draw:name="Google Shape;488;p96" draw:style-name="gr2" draw:text-style-name="P8" draw:layer="layout" svg:width="7.677cm" svg:height="6.427cm" svg:x="1.65cm" svg:y="4.2cm">
          <draw:image xlink:href="Pictures/100002010000018300000144B9C9E5FD363D2B1E.png" xlink:type="simple" xlink:show="embed" xlink:actuate="onLoad">
            <text:p/>
          </draw:image>
        </draw:frame>
        <draw:custom-shape draw:name="Google Shape;489;p96" draw:style-name="gr4" draw:text-style-name="P7" draw:layer="layout" svg:width="14.848cm" svg:height="10.647cm" svg:x="9.75cm" svg:y="2.401cm">
          <text:p text:style-name="P19"><text:span text:style-name="T12"/></text:p>
          <text:p text:style-name="P3"><text:span text:style-name="T8">Legal code, harmonized for national/international law</text:span></text:p>
          <text:p text:style-name="P15"><text:span text:style-name="T9"/></text:p>
          <text:p text:style-name="P15"><text:span text:style-name="T9"/></text:p>
          <text:p text:style-name="P15"><text:span text:style-name="T9"/></text:p>
          <text:p text:style-name="P1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96" draw:style-name="gr8" draw:text-style-name="P7" draw:layer="layout" svg:width="9.181cm" svg:height="2.647cm" svg:x="5.886cm" svg:y="5.219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82;p22:notes" presentation:style-name="pr24" draw:text-style-name="P9" draw:layer="layout" svg:width="16.798cm" svg:height="13.363cm" svg:x="2.1cm" svg:y="14.107cm" presentation:class="notes" presentation:placeholder="true" presentation:user-transformed="true">
            <draw:text-box/>
          </draw:frame>
          <draw:page-thumbnail draw:name="Google Shape;483;p22:notes" draw:style-name="gr3" draw:layer="layout" svg:width="19.797cm" svg:height="11.135cm" svg:x="0.6cm" svg:y="2.257cm" draw:page-number="21" presentation:class="page"/>
        </presentation:notes>
      </draw:page>
      <draw:page draw:name="page22" draw:style-name="dp1" draw:master-page-name="BLANK">
        <draw:custom-shape draw:name="Google Shape;495;p97" draw:style-name="gr7" draw:text-style-name="P18" draw:layer="layout" svg:width="2.698cm" svg:height="7.788cm" svg:x="19.9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p97" draw:style-name="gr2" draw:text-style-name="P8" draw:layer="layout" svg:width="7.598cm" svg:height="1.827cm" svg:x="0.95cm" svg:y="1.35cm">
          <draw:image xlink:href="Pictures/10000201000004620000010E75D4D38F469AD966.png" xlink:type="simple" xlink:show="embed" xlink:actuate="onLoad">
            <text:p/>
          </draw:image>
        </draw:frame>
        <draw:frame draw:name="Google Shape;497;p97" draw:style-name="gr2" draw:text-style-name="P8" draw:layer="layout" svg:width="7.677cm" svg:height="6.427cm" svg:x="1.65cm" svg:y="4.2cm">
          <draw:image xlink:href="Pictures/10000000000001830000014206F578701859D4F5.png" xlink:type="simple" xlink:show="embed" xlink:actuate="onLoad">
            <text:p/>
          </draw:image>
        </draw:frame>
        <draw:custom-shape draw:name="Google Shape;498;p97" draw:style-name="gr4" draw:text-style-name="P7" draw:layer="layout" svg:width="14.848cm" svg:height="10.647cm" svg:x="9.75cm" svg:y="2.401cm">
          <text:p text:style-name="P19"><text:span text:style-name="T12"/></text:p>
          <text:p text:style-name="P3"><text:span text:style-name="T8">Legal code, harmonized for national/international law</text:span></text:p>
          <text:p text:style-name="P15"><text:span text:style-name="T9"/></text:p>
          <text:p text:style-name="P3"><text:span text:style-name="T8">Human readable, understandable text</text:span></text:p>
          <text:p text:style-name="P15"><text:span text:style-name="T9"/></text:p>
          <text:p text:style-name="P15"><text:span text:style-name="T9"/></text:p>
          <text:p text:style-name="P15"><text:span text:style-name="T9"/></text:p>
          <text:p text:style-name="P1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9;p97" draw:style-name="gr4" draw:text-style-name="P7" draw:layer="layout" svg:width="22.798cm" svg:height="1.435cm" svg:x="0.15cm" svg:y="13.275cm">
          <text:p text:style-name="P3"><text:span text:style-name="T22">Creative Commons, Nathan Yergler, Alex Roberts. Licensed to the public under </text:span><text:span text:style-name="T21"><text:a xlink:href="https://creativecommons.org/licenses/by/3.0/" xlink:type="simple">CC BY 3.0 Unported</text:a></text:span><text:span text:style-name="T22">.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92;p23:notes" presentation:style-name="pr25" draw:text-style-name="P9" draw:layer="layout" svg:width="16.798cm" svg:height="13.363cm" svg:x="2.1cm" svg:y="14.107cm" presentation:class="notes" presentation:placeholder="true" presentation:user-transformed="true">
            <draw:text-box/>
          </draw:frame>
          <draw:page-thumbnail draw:name="Google Shape;493;p23:notes" draw:style-name="gr3" draw:layer="layout" svg:width="19.797cm" svg:height="11.135cm" svg:x="0.6cm" svg:y="2.257cm" draw:page-number="22" presentation:class="page"/>
        </presentation:notes>
      </draw:page>
      <draw:page draw:name="page23" draw:style-name="dp1" draw:master-page-name="BLANK">
        <draw:custom-shape draw:name="Google Shape;504;p98" draw:style-name="gr7" draw:text-style-name="P18" draw:layer="layout" svg:width="2.698cm" svg:height="7.788cm" svg:x="19.9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5;p98" draw:style-name="gr2" draw:text-style-name="P8" draw:layer="layout" svg:width="7.598cm" svg:height="1.827cm" svg:x="0.95cm" svg:y="1.35cm">
          <draw:image xlink:href="Pictures/10000201000004620000010E75D4D38F469AD966.png" xlink:type="simple" xlink:show="embed" xlink:actuate="onLoad">
            <text:p/>
          </draw:image>
        </draw:frame>
        <draw:frame draw:name="Google Shape;506;p98" draw:style-name="gr2" draw:text-style-name="P8" draw:layer="layout" svg:width="7.677cm" svg:height="6.427cm" svg:x="1.65cm" svg:y="4.2cm">
          <draw:image xlink:href="Pictures/1000000000000183000001411A3B91D382FA5485.png" xlink:type="simple" xlink:show="embed" xlink:actuate="onLoad">
            <text:p/>
          </draw:image>
        </draw:frame>
        <draw:custom-shape draw:name="Google Shape;507;p98" draw:style-name="gr4" draw:text-style-name="P7" draw:layer="layout" svg:width="14.848cm" svg:height="11.677cm" svg:x="9.75cm" svg:y="2.401cm">
          <text:p text:style-name="P19"><text:span text:style-name="T12"/></text:p>
          <text:p text:style-name="P3"><text:span text:style-name="T8">Legal code, harmonized for national/international law</text:span></text:p>
          <text:p text:style-name="P15"><text:span text:style-name="T9"/></text:p>
          <text:p text:style-name="P3"><text:span text:style-name="T8">Human readable, understandable text</text:span></text:p>
          <text:p text:style-name="P15"><text:span text:style-name="T9"/></text:p>
          <text:p text:style-name="P3"><text:span text:style-name="T8">Machine readable html tag attachable to metadata</text:span></text:p>
          <text:p text:style-name="P15"><text:span text:style-name="T9"/></text:p>
          <text:p text:style-name="P1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8;p98" draw:style-name="gr4" draw:text-style-name="P7" draw:layer="layout" svg:width="22.798cm" svg:height="1.435cm" svg:x="0.15cm" svg:y="13.275cm">
          <text:p text:style-name="P3"><text:span text:style-name="T22">Creative Commons, Nathan Yergler, Alex Roberts. Licensed to the public under </text:span><text:span text:style-name="T21"><text:a xlink:href="https://creativecommons.org/licenses/by/3.0/" xlink:type="simple">CC BY 3.0 Unported</text:a></text:span><text:span text:style-name="T22">.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01;p24:notes" presentation:style-name="pr26" draw:text-style-name="P9" draw:layer="layout" svg:width="16.798cm" svg:height="13.363cm" svg:x="2.1cm" svg:y="14.107cm" presentation:class="notes" presentation:placeholder="true" presentation:user-transformed="true">
            <draw:text-box/>
          </draw:frame>
          <draw:page-thumbnail draw:name="Google Shape;502;p24:notes" draw:style-name="gr3" draw:layer="layout" svg:width="19.797cm" svg:height="11.135cm" svg:x="0.6cm" svg:y="2.257cm" draw:page-number="23" presentation:class="page"/>
        </presentation:notes>
      </draw:page>
      <draw:page draw:name="page24" draw:style-name="dp1" draw:master-page-name="BLANK">
        <draw:custom-shape draw:name="Google Shape;513;p99" draw:style-name="gr7" draw:text-style-name="P18" draw:layer="layout" svg:width="2.698cm" svg:height="7.787cm" svg:x="19.9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4;p99" draw:style-name="gr2" draw:text-style-name="P8" draw:layer="layout" svg:width="7.598cm" svg:height="1.827cm" svg:x="0.95cm" svg:y="1.35cm">
          <draw:image xlink:href="Pictures/10000201000004620000010E75D4D38F469AD966.png" xlink:type="simple" xlink:show="embed" xlink:actuate="onLoad">
            <text:p/>
          </draw:image>
        </draw:frame>
        <draw:frame draw:name="Google Shape;515;p99" draw:style-name="gr2" draw:text-style-name="P8" draw:layer="layout" svg:width="7.677cm" svg:height="6.427cm" svg:x="1.65cm" svg:y="4.2cm">
          <draw:image xlink:href="Pictures/1000000000000183000001411A3B91D382FA5485.png" xlink:type="simple" xlink:show="embed" xlink:actuate="onLoad">
            <text:p/>
          </draw:image>
        </draw:frame>
        <draw:custom-shape draw:name="Google Shape;516;p99" draw:style-name="gr4" draw:text-style-name="P7" draw:layer="layout" svg:width="22.798cm" svg:height="1.435cm" svg:x="0.15cm" svg:y="13.275cm">
          <text:p text:style-name="P3"><text:span text:style-name="T22">Creative Commons, Nathan Yergler, Alex Roberts. Licensed to the public under </text:span><text:span text:style-name="T21"><text:a xlink:href="https://creativecommons.org/licenses/by/3.0/" xlink:type="simple">CC BY 3.0 Unported</text:a></text:span><text:span text:style-name="T22">.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p99" draw:style-name="gr9" draw:text-style-name="P20" draw:layer="layout" svg:width="14.88cm" svg:height="1.714cm" svg:x="10.507cm" svg:y="6.752cm">
          <text:p text:style-name="P14"><text:span text:style-name="T18">Who to use this in pract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10;p25:notes" presentation:style-name="pr27" draw:text-style-name="P9" draw:layer="layout" svg:width="16.798cm" svg:height="13.363cm" svg:x="2.1cm" svg:y="14.107cm" presentation:class="notes" presentation:placeholder="true" presentation:user-transformed="true">
            <draw:text-box/>
          </draw:frame>
          <draw:page-thumbnail draw:name="Google Shape;511;p25:notes" draw:style-name="gr3" draw:layer="layout" svg:width="19.797cm" svg:height="11.135cm" svg:x="0.6cm" svg:y="2.257cm" draw:page-number="24" presentation:class="page"/>
        </presentation:notes>
      </draw:page>
      <draw:page draw:name="page25" draw:style-name="dp1" draw:master-page-name="BLANK">
        <draw:custom-shape draw:name="Google Shape;522;p100" draw:style-name="gr7" draw:text-style-name="P18" draw:layer="layout" svg:width="2.698cm" svg:height="7.787cm" svg:x="19.9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3;p100" draw:style-name="gr2" draw:text-style-name="P8" draw:layer="layout" svg:width="7.598cm" svg:height="1.827cm" svg:x="0.95cm" svg:y="1.35cm">
          <draw:image xlink:href="Pictures/10000201000004620000010E75D4D38F469AD966.png" xlink:type="simple" xlink:show="embed" xlink:actuate="onLoad">
            <text:p/>
          </draw:image>
        </draw:frame>
        <draw:frame draw:name="Google Shape;524;p100" draw:style-name="gr2" draw:text-style-name="P8" draw:layer="layout" svg:width="7.677cm" svg:height="6.427cm" svg:x="1.65cm" svg:y="4.2cm">
          <draw:image xlink:href="Pictures/1000000000000183000001411A3B91D382FA5485.png" xlink:type="simple" xlink:show="embed" xlink:actuate="onLoad">
            <text:p/>
          </draw:image>
        </draw:frame>
        <draw:custom-shape draw:name="Google Shape;525;p100" draw:style-name="gr4" draw:text-style-name="P7" draw:layer="layout" svg:width="22.798cm" svg:height="1.435cm" svg:x="0.15cm" svg:y="13.275cm">
          <text:p text:style-name="P3"><text:span text:style-name="T22">Creative Commons, Nathan Yergler, Alex Roberts. Licensed to the public under </text:span><text:span text:style-name="T21"><text:a xlink:href="https://creativecommons.org/licenses/by/3.0/" xlink:type="simple">CC BY 3.0 Unported</text:a></text:span><text:span text:style-name="T22">.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p100" draw:style-name="gr9" draw:text-style-name="P20" draw:layer="layout" svg:width="24.436cm" svg:height="6.73cm" svg:x="0.481cm" svg:y="5.094cm">
          <text:p text:style-name="P14"><text:span text:style-name="T18">Creative Commons</text:span><text:span text:style-name="T33"> - What is licensed?</text:span></text:p>
          <text:p text:style-name="P14"><text:span text:style-name="T30"/></text:p>
          <text:p text:style-name="P14"><text:span text:style-name="T18">Nathan Yergler, Alex Roberts </text:span><text:span text:style-name="T33">- Who is to be attributed?</text:span></text:p>
          <text:p text:style-name="P14"><text:span text:style-name="T30"/></text:p>
          <text:p text:style-name="P14"><text:span text:style-name="T18">Licensed to the public under </text:span><text:span text:style-name="T34"><text:a xlink:href="https://creativecommons.org/licenses/by/3.0/" xlink:type="simple">CC BY 3.0 Unported</text:a></text:span><text:span text:style-name="T18"><text:s/></text:span><text:span text:style-name="T33">- Which 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19;p26:notes" presentation:style-name="pr28" draw:text-style-name="P9" draw:layer="layout" svg:width="16.798cm" svg:height="13.363cm" svg:x="2.1cm" svg:y="14.107cm" presentation:class="notes" presentation:placeholder="true" presentation:user-transformed="true">
            <draw:text-box/>
          </draw:frame>
          <draw:page-thumbnail draw:name="Google Shape;520;p26:notes" draw:style-name="gr3" draw:layer="layout" svg:width="19.797cm" svg:height="11.135cm" svg:x="0.6cm" svg:y="2.257cm" draw:page-number="25" presentation:class="page"/>
        </presentation:notes>
      </draw:page>
      <draw:page draw:name="page26" draw:style-name="dp1" draw:master-page-name="BLANK">
        <draw:custom-shape draw:name="Google Shape;531;p101" draw:style-name="gr4" draw:text-style-name="P7" draw:layer="layout" svg:width="13.648cm" svg:height="0.929cm" svg:x="0.15cm" svg:y="13.5cm">
          <text:p text:style-name="P3"><text:span text:style-name="T32">CC-BY 4.0 <text:s/>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101" draw:style-name="gr7" draw:text-style-name="P18" draw:layer="layout" svg:width="2.698cm" svg:height="7.787cm" svg:x="19.95cm" svg:y="0.611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3;p101" draw:style-name="gr2" draw:text-style-name="P8" draw:layer="layout" svg:width="7.598cm" svg:height="1.827cm" svg:x="0.95cm" svg:y="1.35cm">
          <draw:image xlink:href="Pictures/10000201000004620000010E75D4D38F469AD966.png" xlink:type="simple" xlink:show="embed" xlink:actuate="onLoad">
            <text:p/>
          </draw:image>
        </draw:frame>
        <draw:custom-shape draw:name="Google Shape;534;p101" draw:style-name="gr4" draw:text-style-name="P7" draw:layer="layout" svg:width="11.992cm" svg:height="1.932cm" svg:x="9.75cm" svg:y="1.366cm">
          <text:p text:style-name="P10"><text:span text:style-name="T6">Challe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5;p101" draw:style-name="gr2" draw:text-style-name="P8" draw:layer="layout" svg:width="1.419cm" svg:height="1.604cm" svg:x="1.745cm" svg:y="5.08cm">
          <draw:image xlink:href="Pictures/10000201000000500000005FBF2D701A62A618AB.png" xlink:type="simple" xlink:show="embed" xlink:actuate="onLoad">
            <text:p/>
          </draw:image>
        </draw:frame>
        <draw:frame draw:name="Google Shape;536;p101" draw:style-name="gr2" draw:text-style-name="P8" draw:layer="layout" svg:width="1.419cm" svg:height="1.603cm" svg:x="1.745cm" svg:y="6.985cm">
          <draw:image xlink:href="Pictures/10000201000000500000005FFBD869CC92D5B6BB.png" xlink:type="simple" xlink:show="embed" xlink:actuate="onLoad">
            <text:p/>
          </draw:image>
        </draw:frame>
        <draw:frame draw:name="Google Shape;537;p101" draw:style-name="gr2" draw:text-style-name="P8" draw:layer="layout" svg:width="1.419cm" svg:height="1.603cm" svg:x="1.745cm" svg:y="8.709cm">
          <draw:image xlink:href="Pictures/10000201000000500000005F08E0A9CA0F07BAD5.png" xlink:type="simple" xlink:show="embed" xlink:actuate="onLoad">
            <text:p/>
          </draw:image>
        </draw:frame>
        <draw:frame draw:name="Google Shape;538;p101" draw:style-name="gr2" draw:text-style-name="P8" draw:layer="layout" svg:width="1.419cm" svg:height="1.586cm" svg:x="1.745cm" svg:y="10.413cm">
          <draw:image xlink:href="Pictures/10000201000000500000005EDA0D2A1D719EF0FA.png" xlink:type="simple" xlink:show="embed" xlink:actuate="onLoad">
            <text:p/>
          </draw:image>
        </draw:frame>
        <draw:custom-shape draw:name="Google Shape;539;p101" draw:style-name="gr4" draw:text-style-name="P7" draw:layer="layout" svg:width="23.187cm" svg:height="7.56cm" svg:x="3.198cm" svg:y="5.364cm">
          <text:p text:style-name="P21"><text:span text:style-name="T29">Multiple Attributions for several sources (license stacking)</text:span></text:p>
          <text:p text:style-name="P21"><text:span text:style-name="T29">Multiple incompatible source licenses</text:span></text:p>
          <text:p text:style-name="P21"><text:span text:style-name="T29">Legal commercial definition (e.g. use by journals)</text:span></text:p>
          <text:p text:style-name="P21"><text:span text:style-name="T29">Unintentional restri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p101" draw:style-name="gr4" draw:text-style-name="P7" draw:layer="layout" svg:width="0.508cm" svg:height="0.72cm" svg:x="1.35cm" svg:y="12cm">
          <text:p text:style-name="P3"><text:span text:style-name="T1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28;p27:notes" presentation:style-name="pr29" draw:text-style-name="P9" draw:layer="layout" svg:width="16.798cm" svg:height="13.363cm" svg:x="2.1cm" svg:y="14.107cm" presentation:class="notes" presentation:placeholder="true" presentation:user-transformed="true">
            <draw:text-box/>
          </draw:frame>
          <draw:page-thumbnail draw:name="Google Shape;529;p27:notes" draw:style-name="gr3" draw:layer="layout" svg:width="19.797cm" svg:height="11.135cm" svg:x="0.6cm" svg:y="2.257cm" draw:page-number="26" presentation:class="page"/>
        </presentation:notes>
      </draw:page>
      <draw:page draw:name="page27" draw:style-name="dp1" draw:master-page-name="Default">
        <draw:custom-shape draw:name="Google Shape;545;p102" draw:style-name="gr4" draw:text-style-name="P7" draw:layer="layout" svg:width="22.594cm" svg:height="11.238cm" svg:x="3.281cm" svg:y="2.401cm">
          <text:p text:style-name="P21"><text:span text:style-name="T8">Databases are different to simple data (e.g. EU-copyright)</text:span></text:p>
          <text:p text:style-name="P21"><text:span text:style-name="T8">Open Data Commons Public Domain Dedication and License (PDDL)</text:span></text:p>
          <text:p text:style-name="P21"><text:span text:style-name="T8">Open Data Commons Attribution License (ODC-By)</text:span></text:p>
          <text:p text:style-name="P21"><text:span text:style-name="T8">Open Data Commons Open Database License (ODb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102" draw:style-name="gr4" draw:text-style-name="P7" draw:layer="layout" svg:width="10.618cm" svg:height="1.933cm" svg:x="8.249cm" svg:y="0.451cm">
          <text:p text:style-name="P10"><text:span text:style-name="T6">Open Data Com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7;p102" draw:style-name="gr2" draw:text-style-name="P8" draw:layer="layout" svg:width="7.336cm" svg:height="1.911cm" svg:x="0.464cm" svg:y="0.338cm">
          <draw:image xlink:href="Pictures/10000201000001D40000007A0A33201C91FA7168.png" xlink:type="simple" xlink:show="embed" xlink:actuate="onLoad">
            <text:p/>
          </draw:image>
        </draw:frame>
        <draw:frame draw:name="Google Shape;548;p102" draw:style-name="gr2" draw:text-style-name="P8" draw:layer="layout" svg:width="1.42cm" svg:height="1.604cm" svg:x="1.652cm" svg:y="4.95cm">
          <draw:image xlink:href="Pictures/10000201000000500000005F77ACFE49A963AA6D.png" xlink:type="simple" xlink:show="embed" xlink:actuate="onLoad">
            <text:p/>
          </draw:image>
        </draw:frame>
        <draw:frame draw:name="Google Shape;549;p102" draw:style-name="gr2" draw:text-style-name="P8" draw:layer="layout" svg:width="1.42cm" svg:height="1.605cm" svg:x="1.652cm" svg:y="8.069cm">
          <draw:image xlink:href="Pictures/10000201000000500000005FBF2D701A62A618AB.png" xlink:type="simple" xlink:show="embed" xlink:actuate="onLoad">
            <text:p/>
          </draw:image>
        </draw:frame>
        <draw:frame draw:name="Google Shape;550;p102" draw:style-name="gr2" draw:text-style-name="P8" draw:layer="layout" svg:width="1.42cm" svg:height="1.605cm" svg:x="1.652cm" svg:y="10.575cm">
          <draw:image xlink:href="Pictures/10000201000000500000005FBF2D701A62A618AB.png" xlink:type="simple" xlink:show="embed" xlink:actuate="onLoad">
            <text:p/>
          </draw:image>
        </draw:frame>
        <draw:frame draw:name="Google Shape;551;p102" draw:style-name="gr2" draw:text-style-name="P8" draw:layer="layout" svg:width="1.42cm" svg:height="1.604cm" svg:x="0.079cm" svg:y="10.575cm">
          <draw:image xlink:href="Pictures/10000201000000500000005FFBD869CC92D5B6BB.png" xlink:type="simple" xlink:show="embed" xlink:actuate="onLoad">
            <text:p/>
          </draw:image>
        </draw:frame>
        <draw:custom-shape draw:name="Google Shape;552;p102" draw:style-name="gr4" draw:text-style-name="P7" draw:layer="layout" svg:width="8.136cm" svg:height="1.036cm" svg:x="0.15cm" svg:y="13.125cm">
          <text:p text:style-name="P3"><text:span text:style-name="T22">Icons </text:span><text:span text:style-name="T31"><text:a xlink:href="https://creativecommons.org/licenses/by/4.0/" xlink:type="simple">CC-BY 4.0</text:a></text:span><text:span text:style-name="T32"><text:s/></text:span><text:span text:style-name="T22"><text:s text:c="2"/></text:span><text:span text:style-name="T21"><text:a xlink:href="https://creativecommons.org/" xlink:type="simple">https://creativecommons.org</text:a></text:span><text:span text:style-name="T22">/</text:span></text:p>
          <text:p text:style-name="P3"><text:span text:style-name="T21"><text:a xlink:href="https://opendatacommons.org/" xlink:type="simple">https://opendata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42;g341d7133ebf_0_64:notes" presentation:style-name="pr30" draw:text-style-name="P9" draw:layer="layout" svg:width="15.239cm" svg:height="11.429cm" svg:x="1.905cm" svg:y="12.065cm" presentation:class="notes" presentation:placeholder="true" presentation:user-transformed="true">
            <draw:text-box/>
          </draw:frame>
          <draw:page-thumbnail draw:name="Google Shape;543;g341d7133ebf_0_64:notes" draw:style-name="gr3" draw:layer="layout" svg:width="12.7cm" svg:height="9.524cm" svg:x="3.176cm" svg:y="1.905cm" draw:page-number="27" presentation:class="page"/>
        </presentation:notes>
      </draw:page>
      <draw:page draw:name="page28" draw:style-name="dp1" draw:master-page-name="Default">
        <draw:custom-shape draw:name="Google Shape;557;p103" draw:style-name="gr4" draw:text-style-name="P7" draw:layer="layout" svg:width="15.33cm" svg:height="1.933cm" svg:x="6.346cm" svg:y="0.751cm">
          <text:p text:style-name="P10"><text:span text:style-name="T6">Repository specific regul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8;p103" draw:style-name="gr4" draw:text-style-name="P7" draw:layer="layout" svg:width="20.099cm" svg:height="9.566cm" svg:x="1.5cm" svg:y="5.054cm">
          <text:p text:style-name="P3"><text:span text:style-name="T12"/></text:p>
          <text:p text:style-name="P3"><text:span text:style-name="T35">Individuals submitting data to the international sequence databases managed collaboratively by DDBJ, EMBL, and GenBank should be aware of the following:</text:span></text:p>
          <text:p text:style-name="P3"><text:span text:style-name="T12"/></text:p>
          <text:p text:style-name="P3"><text:span text:style-name="T12"/></text:p>
          <text:list text:style-name="L7">
            <text:list-item>
              <text:p text:style-name="P3"><text:span text:style-name="T35"><text:s text:c="4"/></text:span><text:span text:style-name="T35">The INSDC has a uniform policy of </text:span><text:span text:style-name="T36">free and unrestricted access</text:span><text:span text:style-name="T35"> to all of the data records their databases contain. Scientists worldwide can access these records to plan experiments or publish any analysis or critique. Appropriate credit is given by citing the original submission, following the practices of scientists utilising published scientific literature.</text:span></text:p>
            </text:list-item>
          </text:list>
          <text:p text:style-name="P3"><text:span text:style-name="T12"/></text:p>
          <text:list text:continue-numbering="true" text:style-name="L7">
            <text:list-item>
              <text:p text:style-name="P3"><text:span text:style-name="T35"><text:s text:c="4"/></text:span><text:span text:style-name="T35">The INSDC will </text:span><text:span text:style-name="T36">not attach statements to records that restrict access to the data</text:span><text:span text:style-name="T35">, limit the use of the information in these records, or prohibit certain types of publications based on these records. Specifically, no use restrictions or licensing requirements will be included in any sequence data records, and no restrictions or licensing fees will be placed on the redistribution or use of the database by any party.</text:span></text:p>
            </text:list-item>
          </text:list>
          <text:p text:style-name="P3"><text:span text:style-name="T12"/></text:p>
          <text:p text:style-name="P3"><text:span text:style-name="T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9;p103" draw:style-name="gr2" draw:text-style-name="P8" draw:layer="layout" svg:width="5.713cm" svg:height="1.626cm" svg:x="1.65cm" svg:y="3.173cm">
          <draw:image xlink:href="Pictures/100002010000012000000052809938CC003C5272.png" xlink:type="simple" xlink:show="embed" xlink:actuate="onLoad">
            <text:p/>
          </draw:image>
        </draw:frame>
        <draw:custom-shape draw:name="Google Shape;560;p103" draw:style-name="gr4" draw:text-style-name="P7" draw:layer="layout" svg:width="9.047cm" svg:height="0.671cm" svg:x="0.15cm" svg:y="13.65cm">
          <text:p text:style-name="P3"><text:a xlink:href="https://www.ebi.ac.uk/ena/standards-and-policies" xlink:type="simple">https://www.ebi.ac.uk/ena/standards-and-policies</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1;p103" draw:style-name="gr2" draw:text-style-name="P8" draw:layer="layout" svg:width="2.717cm" svg:height="3.233cm" svg:x="21.9cm" svg:y="6.816cm">
          <draw:image xlink:href="Pictures/1000020100000089000000A3638214AE1AFF79E6.png" xlink:type="simple" xlink:show="embed" xlink:actuate="onLoad">
            <text:p/>
          </draw:image>
        </draw:frame>
        <draw:custom-shape draw:name="Google Shape;562;p103" draw:style-name="gr4" draw:text-style-name="P7" draw:layer="layout" svg:width="4.021cm" svg:height="0.855cm" svg:x="21.179cm" svg:y="13.18cm">
          <text:p text:style-name="P3"><text:span text:style-name="T37">Icons </text:span><text:span text:style-name="T38"><text:a xlink:href="https://creativecommons.org/licenses/by/4.0/" xlink:type="simple">CC-BY 4.0</text:a></text:span><text:span text:style-name="T37"><text:s/></text:span></text:p>
          <text:p text:style-name="P3"><text:span text:style-name="T37"><text:s/></text:span><text:span text:style-name="T37">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54;g3418092b3bd_0_155:notes" presentation:style-name="pr31" draw:text-style-name="P9" draw:layer="layout" svg:width="15.239cm" svg:height="11.429cm" svg:x="1.905cm" svg:y="12.065cm" presentation:class="notes" presentation:placeholder="true" presentation:user-transformed="true">
            <draw:text-box/>
          </draw:frame>
          <draw:page-thumbnail draw:name="Google Shape;555;g3418092b3bd_0_155:notes" draw:style-name="gr3" draw:layer="layout" svg:width="12.7cm" svg:height="9.524cm" svg:x="3.176cm" svg:y="1.905cm" draw:page-number="28" presentation:class="page"/>
        </presentation:notes>
      </draw:page>
      <draw:page draw:name="page29" draw:style-name="dp1" draw:master-page-name="Default">
        <draw:custom-shape draw:name="Google Shape;567;p104" draw:style-name="gr4" draw:text-style-name="P7" draw:layer="layout" svg:width="25.807cm" svg:height="2.644cm" svg:x="0.695cm" svg:y="0.457cm">
          <text:p text:style-name="P3"><text:span text:style-name="T12"/></text:p>
          <text:p text:style-name="P3"><text:span text:style-name="T39">Norwegian Licence for Open Government Data (NLOD)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8;p104" draw:style-name="gr2" draw:text-style-name="P8" draw:layer="layout" svg:width="1.983cm" svg:height="2.161cm" svg:x="1.466cm" svg:y="3.3cm">
          <draw:image xlink:href="Pictures/10000201000000640000006D4F43EAC208643CD3.png" xlink:type="simple" xlink:show="embed" xlink:actuate="onLoad">
            <text:p/>
          </draw:image>
        </draw:frame>
        <draw:frame draw:name="Google Shape;569;p104" draw:style-name="gr2" draw:text-style-name="P8" draw:layer="layout" svg:width="7.281cm" svg:height="1.408cm" svg:x="3.968cm" svg:y="3.75cm">
          <draw:image xlink:href="Pictures/100002010000016F00000047276FEA79EBFE4AC9.png" xlink:type="simple" xlink:show="embed" xlink:actuate="onLoad">
            <text:p/>
          </draw:image>
        </draw:frame>
        <draw:custom-shape draw:name="Google Shape;570;p104" draw:style-name="gr4" draw:text-style-name="P7" draw:layer="layout" svg:width="24.149cm" svg:height="10.461cm" svg:x="0.538cm" svg:y="5.303cm">
          <text:p text:style-name="P3"><text:span text:style-name="T40">A licence compatible by contract shall mean the following licences:</text:span></text:p>
          <text:p text:style-name="P3"><text:span text:style-name="T41"/></text:p>
          <text:p text:style-name="P3"><text:span text:style-name="T40">for all information: Open Government Licence (version 1.0, 2.0 and 3.0), </text:span><text:span text:style-name="T42">Creative Commons Attribution Licence (international version 4.0 and norwegian version 4.0)</text:span></text:p>
          <text:p text:style-name="P3"><text:span text:style-name="T41"/></text:p>
          <text:p text:style-name="P3"><text:span text:style-name="T40">for those parts of the information which do not constitute databases: </text:span><text:span text:style-name="T42">Creative Commons Attribution Licence (generic version 1.0, 2.0, 2.5 and unported version 3.0) and Creative Commons Navngivelse 3.0 Norge</text:span></text:p>
          <text:p text:style-name="P3"><text:span text:style-name="T41"/></text:p>
          <text:p text:style-name="P3"><text:span text:style-name="T40">for those parts of the information which constitute databases: </text:span><text:span text:style-name="T42">Open Data Commons Attribution License (version 1.0)</text:span><text:span text:style-name="T40">.</text:span></text:p>
          <text:p text:style-name="P3"><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p104" draw:style-name="gr4" draw:text-style-name="P7" draw:layer="layout" svg:width="13.555cm" svg:height="0.581cm" svg:x="0.204cm" svg:y="13.651cm">
          <text:p text:style-name="P3"><text:a xlink:href="https://data.norge.no/norwegian-licence-open-government-data-nlod-20" xlink:type="simple">https://data.norge.no/norwegian-licence-open-government-data-nlod-20</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2;p104" draw:style-name="gr2" draw:text-style-name="P8" draw:layer="layout" svg:width="5.078cm" svg:height="2.816cm" svg:x="18.15cm" svg:y="3.3cm">
          <draw:image xlink:href="Pictures/10000201000001000000008E4605511858E77E6C.png" xlink:type="simple" xlink:show="embed" xlink:actuate="onLoad">
            <text:p/>
          </draw:image>
        </draw:frame>
        <draw:custom-shape draw:name="Google Shape;573;p104" draw:style-name="gr4" draw:text-style-name="P7" draw:layer="layout" svg:width="4.021cm" svg:height="0.855cm" svg:x="21.179cm" svg:y="13.18cm">
          <text:p text:style-name="P3"><text:span text:style-name="T37">Icons </text:span><text:span text:style-name="T38"><text:a xlink:href="https://creativecommons.org/licenses/by/4.0/" xlink:type="simple">CC-BY 4.0</text:a></text:span><text:span text:style-name="T37"><text:s/></text:span></text:p>
          <text:p text:style-name="P3"><text:span text:style-name="T37"><text:s/></text:span><text:span text:style-name="T37">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64;g3418092b3bd_0_164:notes" presentation:style-name="pr32" draw:text-style-name="P9" draw:layer="layout" svg:width="15.239cm" svg:height="11.429cm" svg:x="1.905cm" svg:y="12.065cm" presentation:class="notes" presentation:placeholder="true" presentation:user-transformed="true">
            <draw:text-box/>
          </draw:frame>
          <draw:page-thumbnail draw:name="Google Shape;565;g3418092b3bd_0_164:notes" draw:style-name="gr3" draw:layer="layout" svg:width="12.7cm" svg:height="9.524cm" svg:x="3.176cm" svg:y="1.905cm" draw:page-number="29" presentation:class="page"/>
        </presentation:notes>
      </draw:page>
      <draw:page draw:name="page30" draw:style-name="dp1" draw:master-page-name="BLANK">
        <draw:custom-shape draw:name="Google Shape;578;p105" draw:style-name="gr4" draw:text-style-name="P7" draw:layer="layout" svg:width="15.097cm" svg:height="1.932cm" svg:x="5.519cm" svg:y="0.751cm">
          <text:p text:style-name="P10"><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105" draw:style-name="gr4" draw:text-style-name="P7" draw:layer="layout" svg:width="23.187cm" svg:height="12.899cm" svg:x="3.212cm" svg:y="2.402cm">
          <text:p xml:id="id55" text:id="id55" text:style-name="P21"><text:span text:style-name="T8">Special considerations for Software</text:span></text:p>
          <text:p xml:id="id56" text:id="id56" text:style-name="P21"><text:span text:style-name="T8">Liability</text:span></text:p>
          <text:p xml:id="id57" text:id="id57" text:style-name="P21"><text:span text:style-name="T8">Warranty</text:span></text:p>
          <text:p xml:id="id58" text:id="id58" text:style-name="P21"><text:span text:style-name="T8">Modifications</text:span></text:p>
          <text:p xml:id="id59" text:id="id59" text:style-name="P21"><text:span text:style-name="T8">Network use = 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seq>
        </anim:par>
        <presentation:notes draw:style-name="dp2">
          <draw:frame draw:name="Google Shape;575;p28:notes" presentation:style-name="pr33" draw:text-style-name="P9" draw:layer="layout" svg:width="16.798cm" svg:height="13.363cm" svg:x="2.1cm" svg:y="14.107cm" presentation:class="notes" presentation:placeholder="true" presentation:user-transformed="true">
            <draw:text-box/>
          </draw:frame>
          <draw:page-thumbnail draw:name="Google Shape;576;p28:notes" draw:style-name="gr3" draw:layer="layout" svg:width="19.797cm" svg:height="11.135cm" svg:x="0.6cm" svg:y="2.257cm" draw:page-number="30" presentation:class="page"/>
        </presentation:notes>
      </draw:page>
      <draw:page draw:name="page31" draw:style-name="dp1" draw:master-page-name="BLANK">
        <draw:custom-shape draw:name="Google Shape;584;p106" draw:style-name="gr4" draw:text-style-name="P7" draw:layer="layout" svg:width="15.097cm" svg:height="1.932cm" svg:x="5.519cm" svg:y="0.751cm">
          <text:p text:style-name="P10"><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5;p106" draw:style-name="gr2" draw:text-style-name="P8" draw:layer="layout" svg:width="2.527cm" svg:height="2.998cm" svg:x="0.6cm" svg:y="6.147cm">
          <draw:image xlink:href="Pictures/10000201000000AC000000CC09C64DC40900048A.png" xlink:type="simple" xlink:show="embed" xlink:actuate="onLoad">
            <text:p/>
          </draw:image>
        </draw:frame>
        <draw:frame draw:name="Google Shape;586;p106" draw:style-name="gr2" draw:text-style-name="P8" draw:layer="layout" svg:width="2.637cm" svg:height="3.148cm" svg:x="22.411cm" svg:y="6.075cm">
          <draw:image xlink:href="Pictures/100002010000009B000000B962702F4D80AA8002.png" xlink:type="simple" xlink:show="embed" xlink:actuate="onLoad">
            <text:p/>
          </draw:image>
        </draw:frame>
        <draw:frame draw:name="Google Shape;587;p106" draw:style-name="gr2" draw:text-style-name="P8" draw:layer="layout" svg:width="2.388cm" svg:height="3.185cm" svg:x="0.601cm" svg:y="0.414cm">
          <draw:image xlink:href="Pictures/1000020100000384000004B05C90364973307A2A.png" xlink:type="simple" xlink:show="embed" xlink:actuate="onLoad">
            <text:p/>
          </draw:image>
        </draw:frame>
        <draw:custom-shape draw:name="Google Shape;588;p106" draw:style-name="gr4" draw:text-style-name="P7" draw:layer="layout" svg:width="4.02cm" svg:height="0.854cm" svg:x="21.179cm" svg:y="13.18cm">
          <text:p text:style-name="P3"><text:span text:style-name="T37">Icons </text:span><text:span text:style-name="T38"><text:a xlink:href="https://creativecommons.org/licenses/by/4.0/" xlink:type="simple">CC-BY 4.0</text:a></text:span><text:span text:style-name="T37"><text:s/></text:span></text:p>
          <text:p text:style-name="P3"><text:span text:style-name="T37"><text:s/></text:span><text:span text:style-name="T37">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81;p29:notes" presentation:style-name="pr34" draw:text-style-name="P9" draw:layer="layout" svg:width="16.798cm" svg:height="13.363cm" svg:x="2.1cm" svg:y="14.107cm" presentation:class="notes" presentation:placeholder="true" presentation:user-transformed="true">
            <draw:text-box/>
          </draw:frame>
          <draw:page-thumbnail draw:name="Google Shape;582;p29:notes" draw:style-name="gr3" draw:layer="layout" svg:width="19.797cm" svg:height="11.135cm" svg:x="0.6cm" svg:y="2.257cm" draw:page-number="31" presentation:class="page"/>
        </presentation:notes>
      </draw:page>
      <draw:page draw:name="page32" draw:style-name="dp1" draw:master-page-name="BLANK">
        <draw:custom-shape draw:name="Google Shape;593;p107" draw:style-name="gr4" draw:text-style-name="P7" draw:layer="layout" svg:width="15.097cm" svg:height="1.932cm" svg:x="5.519cm" svg:y="0.751cm">
          <text:p text:style-name="P10"><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4;p107" draw:style-name="gr2" draw:text-style-name="P8" draw:layer="layout" svg:width="2.388cm" svg:height="3.185cm" svg:x="0.6cm" svg:y="0.413cm">
          <draw:image xlink:href="Pictures/1000020100000384000004B05C90364973307A2A.png" xlink:type="simple" xlink:show="embed" xlink:actuate="onLoad">
            <text:p/>
          </draw:image>
        </draw:frame>
        <draw:frame draw:name="Google Shape;595;p107" draw:style-name="gr2" draw:text-style-name="P8" draw:layer="layout" svg:width="2.527cm" svg:height="2.998cm" svg:x="0.6cm" svg:y="6.147cm">
          <draw:image xlink:href="Pictures/10000201000000AC000000CC09C64DC40900048A.png" xlink:type="simple" xlink:show="embed" xlink:actuate="onLoad">
            <text:p/>
          </draw:image>
        </draw:frame>
        <draw:custom-shape draw:name="Google Shape;596;p107" draw:style-name="gr4" draw:text-style-name="P7" draw:layer="layout" svg:width="5.48cm" svg:height="2.916cm" svg:x="3.818cm" svg:y="6.6cm">
          <text:p text:style-name="P3"><text:span text:style-name="T43">MIT 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7;p107" draw:style-name="gr2" draw:text-style-name="P8" draw:layer="layout" svg:width="2.637cm" svg:height="3.148cm" svg:x="22.411cm" svg:y="6.075cm">
          <draw:image xlink:href="Pictures/100002010000009B000000B962702F4D80AA8002.png" xlink:type="simple" xlink:show="embed" xlink:actuate="onLoad">
            <text:p/>
          </draw:image>
        </draw:frame>
        <draw:custom-shape draw:name="Google Shape;598;p107" draw:style-name="gr4" draw:text-style-name="P7" draw:layer="layout" svg:width="4.02cm" svg:height="0.854cm" svg:x="21.179cm" svg:y="13.179cm">
          <text:p text:style-name="P3"><text:span text:style-name="T37">Icons </text:span><text:span text:style-name="T38"><text:a xlink:href="https://creativecommons.org/licenses/by/4.0/" xlink:type="simple">CC-BY 4.0</text:a></text:span><text:span text:style-name="T37"><text:s/></text:span></text:p>
          <text:p text:style-name="P3"><text:span text:style-name="T37"><text:s/></text:span><text:span text:style-name="T37">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9;p107" draw:style-name="gr4" draw:text-style-name="P7" draw:layer="layout" svg:width="6.38cm" svg:height="2.916cm" svg:x="17.573cm" svg:y="4.65cm">
          <text:p text:style-name="P3"><text:span text:style-name="T43">GNU A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90;p30:notes" presentation:style-name="pr35" draw:text-style-name="P9" draw:layer="layout" svg:width="16.798cm" svg:height="13.363cm" svg:x="2.1cm" svg:y="14.107cm" presentation:class="notes" presentation:placeholder="true" presentation:user-transformed="true">
            <draw:text-box/>
          </draw:frame>
          <draw:page-thumbnail draw:name="Google Shape;591;p30:notes" draw:style-name="gr3" draw:layer="layout" svg:width="19.797cm" svg:height="11.135cm" svg:x="0.6cm" svg:y="2.257cm" draw:page-number="32" presentation:class="page"/>
        </presentation:notes>
      </draw:page>
      <draw:page draw:name="page33" draw:style-name="dp1" draw:master-page-name="BLANK">
        <draw:custom-shape draw:name="Google Shape;604;p108" draw:style-name="gr4" draw:text-style-name="P7" draw:layer="layout" svg:width="15.097cm" svg:height="1.932cm" svg:x="5.519cm" svg:y="0.751cm">
          <text:p text:style-name="P10"><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5;p108" draw:style-name="gr2" draw:text-style-name="P8" draw:layer="layout" svg:width="2.527cm" svg:height="2.998cm" svg:x="0.6cm" svg:y="6.147cm">
          <draw:image xlink:href="Pictures/10000201000000AC000000CC09C64DC40900048A.png" xlink:type="simple" xlink:show="embed" xlink:actuate="onLoad">
            <text:p/>
          </draw:image>
        </draw:frame>
        <draw:custom-shape draw:name="Google Shape;606;p108" draw:style-name="gr4" draw:text-style-name="P7" draw:layer="layout" svg:width="5.48cm" svg:height="2.916cm" svg:x="3.818cm" svg:y="6.6cm">
          <text:p text:style-name="P3"><text:span text:style-name="T43">MIT 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7;p108" draw:style-name="gr4" draw:text-style-name="P7" draw:layer="layout" svg:width="5.48cm" svg:height="2.916cm" svg:x="5.592cm" svg:y="9.38cm">
          <text:p text:style-name="P3"><text:span text:style-name="T43">Apache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8;p108" draw:style-name="gr4" draw:text-style-name="P7" draw:layer="layout" svg:width="6.38cm" svg:height="2.916cm" svg:x="10.248cm" svg:y="8.332cm">
          <text:p text:style-name="P3"><text:span text:style-name="T43">GNU L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9;p108" draw:style-name="gr4" draw:text-style-name="P7" draw:layer="layout" svg:width="6.38cm" svg:height="1.551cm" svg:x="16.116cm" svg:y="7.454cm">
          <text:p text:style-name="P3"><text:span text:style-name="T43">GNU 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0;p108" draw:style-name="gr10" draw:text-style-name="P8" draw:layer="layout" svg:width="8.098cm" svg:height="0.006cm" svg:x="4.35cm" svg:y="5.24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11;p108" draw:style-name="gr4" draw:text-style-name="P7" draw:layer="layout" svg:width="6.38cm" svg:height="2.916cm" svg:x="5.4cm" svg:y="3.847cm">
          <text:p text:style-name="P3"><text:span text:style-name="T43">BSD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2;p108" draw:style-name="gr2" draw:text-style-name="P8" draw:layer="layout" svg:width="2.637cm" svg:height="3.148cm" svg:x="22.411cm" svg:y="6.075cm">
          <draw:image xlink:href="Pictures/100002010000009B000000B962702F4D80AA8002.png" xlink:type="simple" xlink:show="embed" xlink:actuate="onLoad">
            <text:p/>
          </draw:image>
        </draw:frame>
        <draw:frame draw:name="Google Shape;613;p108" draw:style-name="gr2" draw:text-style-name="P8" draw:layer="layout" svg:width="2.388cm" svg:height="3.185cm" svg:x="0.601cm" svg:y="0.414cm">
          <draw:image xlink:href="Pictures/1000020100000384000004B05C90364973307A2A.png" xlink:type="simple" xlink:show="embed" xlink:actuate="onLoad">
            <text:p/>
          </draw:image>
        </draw:frame>
        <draw:custom-shape draw:name="Google Shape;614;p108" draw:style-name="gr4" draw:text-style-name="P7" draw:layer="layout" svg:width="4.02cm" svg:height="0.854cm" svg:x="21.179cm" svg:y="13.18cm">
          <text:p text:style-name="P3"><text:span text:style-name="T37">Icons </text:span><text:span text:style-name="T38"><text:a xlink:href="https://creativecommons.org/licenses/by/4.0/" xlink:type="simple">CC-BY 4.0</text:a></text:span><text:span text:style-name="T37"><text:s/></text:span></text:p>
          <text:p text:style-name="P3"><text:span text:style-name="T37"><text:s/></text:span><text:span text:style-name="T37">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5;p108" draw:style-name="gr4" draw:text-style-name="P7" draw:layer="layout" svg:width="6.38cm" svg:height="2.916cm" svg:x="18.473cm" svg:y="4.65cm">
          <text:p text:style-name="P3"><text:span text:style-name="T43">GNU A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01;p31:notes" presentation:style-name="pr36" draw:text-style-name="P9" draw:layer="layout" svg:width="16.798cm" svg:height="13.363cm" svg:x="2.1cm" svg:y="14.107cm" presentation:class="notes" presentation:placeholder="true" presentation:user-transformed="true">
            <draw:text-box/>
          </draw:frame>
          <draw:page-thumbnail draw:name="Google Shape;602;p31:notes" draw:style-name="gr3" draw:layer="layout" svg:width="19.797cm" svg:height="11.135cm" svg:x="0.6cm" svg:y="2.257cm" draw:page-number="33" presentation:class="page"/>
        </presentation:notes>
      </draw:page>
      <draw:page draw:name="page34" draw:style-name="dp1" draw:master-page-name="BLANK">
        <draw:custom-shape draw:name="Google Shape;620;p109" draw:style-name="gr4" draw:text-style-name="P7" draw:layer="layout" svg:width="15.097cm" svg:height="1.932cm" svg:x="5.519cm" svg:y="0.751cm">
          <text:p text:style-name="P10"><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1;p109" draw:style-name="gr2" draw:text-style-name="P8" draw:layer="layout" svg:width="2.527cm" svg:height="2.998cm" svg:x="0.6cm" svg:y="6.147cm">
          <draw:image xlink:href="Pictures/10000201000000AC000000CC09C64DC40900048A.png" xlink:type="simple" xlink:show="embed" xlink:actuate="onLoad">
            <text:p/>
          </draw:image>
        </draw:frame>
        <draw:custom-shape draw:name="Google Shape;622;p109" draw:style-name="gr4" draw:text-style-name="P7" draw:layer="layout" svg:width="5.48cm" svg:height="2.916cm" svg:x="3.818cm" svg:y="6.6cm">
          <text:p text:style-name="P3"><text:span text:style-name="T43">MIT 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3;p109" draw:style-name="gr4" draw:text-style-name="P7" draw:layer="layout" svg:width="7.772cm" svg:height="2.916cm" svg:x="4.292cm" svg:y="9.38cm">
          <text:p text:style-name="P3"><text:span text:style-name="T43">Apache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4;p109" draw:style-name="gr4" draw:text-style-name="P7" draw:layer="layout" svg:width="6.38cm" svg:height="2.916cm" svg:x="11.048cm" svg:y="8.332cm">
          <text:p text:style-name="P3"><text:span text:style-name="T43">GNU L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5;p109" draw:style-name="gr4" draw:text-style-name="P7" draw:layer="layout" svg:width="6.38cm" svg:height="2.916cm" svg:x="18.473cm" svg:y="4.65cm">
          <text:p text:style-name="P3"><text:span text:style-name="T43">GNU A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6;p109" draw:style-name="gr4" draw:text-style-name="P7" draw:layer="layout" svg:width="6.38cm" svg:height="1.551cm" svg:x="16.116cm" svg:y="7.454cm">
          <text:p text:style-name="P3"><text:span text:style-name="T43">GNU 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7;p109" draw:style-name="gr10" draw:text-style-name="P8" draw:layer="layout" svg:width="8.098cm" svg:height="0.006cm" svg:x="4.35cm" svg:y="5.24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28;p109" draw:style-name="gr4" draw:text-style-name="P7" draw:layer="layout" svg:width="6.38cm" svg:height="2.916cm" svg:x="5.4cm" svg:y="3.847cm">
          <text:p text:style-name="P3"><text:span text:style-name="T43">BSD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9;p109" draw:style-name="gr2" draw:text-style-name="P8" draw:layer="layout" svg:width="2.637cm" svg:height="3.148cm" svg:x="22.411cm" svg:y="6.075cm">
          <draw:image xlink:href="Pictures/100002010000009B000000B962702F4D80AA8002.png" xlink:type="simple" xlink:show="embed" xlink:actuate="onLoad">
            <text:p/>
          </draw:image>
        </draw:frame>
        <draw:frame draw:name="Google Shape;630;p109" draw:style-name="gr2" draw:text-style-name="P8" draw:layer="layout" svg:width="2.388cm" svg:height="3.185cm" svg:x="0.601cm" svg:y="0.414cm">
          <draw:image xlink:href="Pictures/1000020100000384000004B05C90364973307A2A.png" xlink:type="simple" xlink:show="embed" xlink:actuate="onLoad">
            <text:p/>
          </draw:image>
        </draw:frame>
        <draw:custom-shape draw:name="Google Shape;631;p109" draw:style-name="gr4" draw:text-style-name="P7" draw:layer="layout" svg:width="4.02cm" svg:height="0.854cm" svg:x="21.179cm" svg:y="12.08cm">
          <text:p text:style-name="P3"><text:span text:style-name="T37">Icons </text:span><text:span text:style-name="T38"><text:a xlink:href="https://creativecommons.org/licenses/by/4.0/" xlink:type="simple">CC-BY 4.0</text:a></text:span><text:span text:style-name="T37"><text:s/></text:span></text:p>
          <text:p text:style-name="P3"><text:span text:style-name="T37"><text:s/></text:span><text:span text:style-name="T37">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2;p109" draw:style-name="gr8" draw:text-style-name="P7" draw:layer="layout" svg:width="12.745cm" svg:height="2.729cm" svg:x="3.975cm" svg:y="11.25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3;p109" draw:style-name="gr2" draw:text-style-name="P8" draw:layer="layout" svg:width="6.6cm" svg:height="1.41cm" svg:x="14.623cm" svg:y="12.54cm">
          <draw:image xlink:href="Pictures/1000020100000462000000F079C5C1BB639A9BF9.png" xlink:type="simple" xlink:show="embed" xlink:actuate="onLoad">
            <text:p/>
          </draw:image>
        </draw:frame>
        <draw:custom-shape draw:name="Google Shape;634;p109" draw:style-name="gr11" draw:text-style-name="P7" draw:layer="layout" svg:width="13.108cm" svg:height="1.164cm" svg:x="0.832cm" svg:y="12.011cm">
          <text:p text:style-name="P3"><text:a xlink:href="https://opensource.org/licenses" xlink:type="simple">https://opensource.org/licenses</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p109" draw:style-name="gr11" draw:text-style-name="P7" draw:layer="layout" svg:width="11.63cm" svg:height="1.164cm" svg:x="1.071cm" svg:y="12.911cm">
          <text:p text:style-name="P3"><text:a xlink:href="https://choosealicense.com/" xlink:type="simple">https://choosealicense.com/</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17;p32:notes" presentation:style-name="pr37" draw:text-style-name="P9" draw:layer="layout" svg:width="16.798cm" svg:height="13.363cm" svg:x="2.1cm" svg:y="14.107cm" presentation:class="notes" presentation:placeholder="true" presentation:user-transformed="true">
            <draw:text-box/>
          </draw:frame>
          <draw:page-thumbnail draw:name="Google Shape;618;p32:notes" draw:style-name="gr3" draw:layer="layout" svg:width="19.797cm" svg:height="11.135cm" svg:x="0.6cm" svg:y="2.257cm" draw:page-number="34" presentation:class="page"/>
        </presentation:notes>
      </draw:page>
      <draw:page draw:name="page35" draw:style-name="dp1" draw:master-page-name="BLANK">
        <draw:custom-shape draw:name="Google Shape;640;p110" draw:style-name="gr4" draw:text-style-name="P7" draw:layer="layout" svg:width="15.097cm" svg:height="1.932cm" svg:x="5.519cm" svg:y="0.751cm">
          <text:p text:style-name="P10"><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1;p110" draw:style-name="gr2" draw:text-style-name="P8" draw:layer="layout" svg:width="2.388cm" svg:height="3.185cm" svg:x="0.601cm" svg:y="0.414cm">
          <draw:image xlink:href="Pictures/1000020100000384000004B05C90364973307A2A.png" xlink:type="simple" xlink:show="embed" xlink:actuate="onLoad">
            <text:p/>
          </draw:image>
        </draw:frame>
        <draw:frame draw:name="Google Shape;642;p110" draw:style-name="gr2" draw:text-style-name="P8" draw:layer="layout" svg:width="12.895cm" svg:height="11.435cm" svg:x="5.853cm" svg:y="2.363cm">
          <draw:image xlink:href="Pictures/1000000000000547000004AE62914E82E47A13BB.png" xlink:type="simple" xlink:show="embed" xlink:actuate="onLoad">
            <text:p/>
          </draw:image>
        </draw:frame>
        <draw:custom-shape draw:name="Google Shape;643;p110" draw:style-name="gr7" draw:text-style-name="P18" draw:layer="layout" svg:width="25.198cm" svg:height="6.148cm" svg:x="0.15cm" svg:y="7.65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4;p110" draw:style-name="gr4" draw:text-style-name="P7" draw:layer="layout" svg:width="4cm" svg:height="0.854cm" svg:x="0.048cm" svg:y="13.508cm">
          <text:p text:style-name="P3"><text:span text:style-name="T38"><text:a xlink:href="https://creativecommons.org/licenses/by/4.0/" xlink:type="simple">CC-BY 4.0</text:a></text:span></text:p>
          <text:p text:style-name="P3"><text:span text:style-name="T37">http://software-carpentry.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37;p35:notes" presentation:style-name="pr38" draw:text-style-name="P9" draw:layer="layout" svg:width="16.798cm" svg:height="13.363cm" svg:x="2.1cm" svg:y="14.107cm" presentation:class="notes" presentation:placeholder="true" presentation:user-transformed="true">
            <draw:text-box/>
          </draw:frame>
          <draw:page-thumbnail draw:name="Google Shape;638;p35:notes" draw:style-name="gr3" draw:layer="layout" svg:width="19.797cm" svg:height="11.135cm" svg:x="0.6cm" svg:y="2.257cm" draw:page-number="35" presentation:class="page"/>
        </presentation:notes>
      </draw:page>
      <draw:page draw:name="page36" draw:style-name="dp1" draw:master-page-name="BLANK">
        <draw:custom-shape draw:name="Google Shape;649;p111" draw:style-name="gr4" draw:text-style-name="P7" draw:layer="layout" svg:width="15.097cm" svg:height="1.932cm" svg:x="5.519cm" svg:y="0.751cm">
          <text:p text:style-name="P10"><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0;p111" draw:style-name="gr2" draw:text-style-name="P8" draw:layer="layout" svg:width="2.388cm" svg:height="3.185cm" svg:x="0.601cm" svg:y="0.414cm">
          <draw:image xlink:href="Pictures/1000020100000384000004B05C90364973307A2A.png" xlink:type="simple" xlink:show="embed" xlink:actuate="onLoad">
            <text:p/>
          </draw:image>
        </draw:frame>
        <draw:frame draw:name="Google Shape;651;p111" draw:style-name="gr2" draw:text-style-name="P8" draw:layer="layout" svg:width="12.895cm" svg:height="11.435cm" svg:x="5.853cm" svg:y="2.363cm">
          <draw:image xlink:href="Pictures/1000000000000547000004AE62914E82E47A13BB.png" xlink:type="simple" xlink:show="embed" xlink:actuate="onLoad">
            <text:p/>
          </draw:image>
        </draw:frame>
        <draw:custom-shape draw:name="Google Shape;652;p111" draw:style-name="gr7" draw:text-style-name="P18" draw:layer="layout" svg:width="25.198cm" svg:height="2.998cm" svg:x="0.15cm" svg:y="10.8cm">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3;p111" draw:style-name="gr4" draw:text-style-name="P7" draw:layer="layout" svg:width="4cm" svg:height="0.854cm" svg:x="0.048cm" svg:y="13.508cm">
          <text:p text:style-name="P3"><text:span text:style-name="T38"><text:a xlink:href="https://creativecommons.org/licenses/by/4.0/" xlink:type="simple">CC-BY 4.0</text:a></text:span></text:p>
          <text:p text:style-name="P3"><text:span text:style-name="T37">http://software-carpentry.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46;p36:notes" presentation:style-name="pr39" draw:text-style-name="P9" draw:layer="layout" svg:width="16.798cm" svg:height="13.363cm" svg:x="2.1cm" svg:y="14.107cm" presentation:class="notes" presentation:placeholder="true" presentation:user-transformed="true">
            <draw:text-box/>
          </draw:frame>
          <draw:page-thumbnail draw:name="Google Shape;647;p36:notes" draw:style-name="gr3" draw:layer="layout" svg:width="19.797cm" svg:height="11.135cm" svg:x="0.6cm" svg:y="2.257cm" draw:page-number="36" presentation:class="page"/>
        </presentation:notes>
      </draw:page>
      <draw:page draw:name="page37" draw:style-name="dp1" draw:master-page-name="BLANK">
        <draw:custom-shape draw:name="Google Shape;658;p112" draw:style-name="gr4" draw:text-style-name="P7" draw:layer="layout" svg:width="15.097cm" svg:height="1.932cm" svg:x="5.519cm" svg:y="0.751cm">
          <text:p text:style-name="P10"><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9;p112" draw:style-name="gr2" draw:text-style-name="P8" draw:layer="layout" svg:width="2.388cm" svg:height="3.185cm" svg:x="0.601cm" svg:y="0.414cm">
          <draw:image xlink:href="Pictures/1000020100000384000004B05C90364973307A2A.png" xlink:type="simple" xlink:show="embed" xlink:actuate="onLoad">
            <text:p/>
          </draw:image>
        </draw:frame>
        <draw:frame draw:name="Google Shape;660;p112" draw:style-name="gr2" draw:text-style-name="P8" draw:layer="layout" svg:width="12.895cm" svg:height="11.435cm" svg:x="5.853cm" svg:y="2.363cm">
          <draw:image xlink:href="Pictures/1000000000000547000004AE62914E82E47A13BB.png" xlink:type="simple" xlink:show="embed" xlink:actuate="onLoad">
            <text:p/>
          </draw:image>
        </draw:frame>
        <draw:custom-shape draw:name="Google Shape;661;p112" draw:style-name="gr4" draw:text-style-name="P7" draw:layer="layout" svg:width="4cm" svg:height="0.854cm" svg:x="0.048cm" svg:y="13.508cm">
          <text:p text:style-name="P3"><text:span text:style-name="T38"><text:a xlink:href="https://creativecommons.org/licenses/by/4.0/" xlink:type="simple">CC-BY 4.0</text:a></text:span></text:p>
          <text:p text:style-name="P3"><text:span text:style-name="T37">http://software-carpentry.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55;p37:notes" presentation:style-name="pr40" draw:text-style-name="P9" draw:layer="layout" svg:width="16.798cm" svg:height="13.363cm" svg:x="2.1cm" svg:y="14.107cm" presentation:class="notes" presentation:placeholder="true" presentation:user-transformed="true">
            <draw:text-box/>
          </draw:frame>
          <draw:page-thumbnail draw:name="Google Shape;656;p37:notes" draw:style-name="gr3" draw:layer="layout" svg:width="19.797cm" svg:height="11.135cm" svg:x="0.6cm" svg:y="2.257cm" draw:page-number="37" presentation:class="page"/>
        </presentation:notes>
      </draw:page>
      <draw:page draw:name="page38" draw:style-name="dp1" draw:master-page-name="Default">
        <draw:custom-shape draw:name="Google Shape;666;p113" draw:style-name="gr4" draw:text-style-name="P7" draw:layer="layout" svg:width="14.826cm" svg:height="1.933cm" svg:x="5.505cm" svg:y="0.3cm">
          <text:p text:style-name="P10"><text:span text:style-name="T6">Material Transfer Agre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7;p113" draw:style-name="gr4" draw:text-style-name="P7" draw:layer="layout" svg:width="23.188cm" svg:height="12.9cm" svg:x="1.106cm" svg:y="2.402cm">
          <text:p text:style-name="P22"><text:span text:style-name="T12"/></text:p>
          <text:p text:style-name="P23"><text:span text:style-name="T8">Used for e.g. reagents, cell lines, plasmids, mice, ...</text:span></text:p>
          <text:p text:style-name="P24"><text:span text:style-name="T9"/></text:p>
          <text:p text:style-name="P23"><text:span text:style-name="T8">Can safeguard your commercial interest, while allowing others to use your material for research</text:span></text:p>
          <text:p text:style-name="P24"><text:span text:style-name="T9"/></text:p>
          <text:p text:style-name="P23"><text:span text:style-name="T8">Can ensure attribution</text:span></text:p>
          <text:p text:style-name="P24"><text:span text:style-name="T9"/></text:p>
          <text:p text:style-name="P23"><text:span text:style-name="T8">Can enforce remain in Public Domain</text:span></text:p>
          <text:p text:style-name="P24"><text:span text:style-name="T9"/></text:p>
          <text:p text:style-name="P24"><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63;g3418092b3bd_0_174:notes" presentation:style-name="pr41" draw:text-style-name="P9" draw:layer="layout" svg:width="15.239cm" svg:height="11.429cm" svg:x="1.905cm" svg:y="12.065cm" presentation:class="notes" presentation:placeholder="true" presentation:user-transformed="true">
            <draw:text-box/>
          </draw:frame>
          <draw:page-thumbnail draw:name="Google Shape;664;g3418092b3bd_0_174:notes" draw:style-name="gr3" draw:layer="layout" svg:width="12.7cm" svg:height="9.524cm" svg:x="3.176cm" svg:y="1.905cm" draw:page-number="38" presentation:class="page"/>
        </presentation:notes>
      </draw:page>
      <draw:page draw:name="page39" draw:style-name="dp1" draw:master-page-name="Default">
        <draw:custom-shape draw:name="Google Shape;672;p114" draw:style-name="gr4" draw:text-style-name="P7" draw:layer="layout" svg:width="24.021cm" svg:height="1.933cm" svg:x="1.8cm" svg:y="0.45cm">
          <text:p text:style-name="P10"><text:span text:style-name="T6">Uniform Biological Material Transfer Agreem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3;p114" draw:style-name="gr4" draw:text-style-name="P7" draw:layer="layout" svg:width="23.188cm" svg:height="18.816cm" svg:x="1.106cm" svg:y="2.702cm">
          <text:p text:style-name="P25"><text:span text:style-name="T8">Benefits to the Recipient: </text:span></text:p>
          <text:p text:style-name="P25"><text:span text:style-name="T8">Permission to use material for research or teaching purposes</text:span></text:p>
          <text:p text:style-name="P25"><text:span text:style-name="T8">Rights to all research results, modifications, and invention</text:span></text:p>
          <text:p text:style-name="P25"><text:span text:style-name="T8">Patent applications on modifications or inventions</text:span></text:p>
          <text:p text:style-name="P25"><text:span text:style-name="T8">Publishing without editorial comment or review by provider</text:span></text:p>
          <text:p text:style-name="P25"><text:span text:style-name="T8">Limited liability</text:span></text:p>
          <text:p text:style-name="P2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4;p114" draw:style-name="gr4" draw:text-style-name="P7" draw:layer="layout" svg:width="17.114cm" svg:height="0.855cm" svg:x="0.062cm" svg:y="13.125cm">
          <text:p text:style-name="P3"><text:span text:style-name="T38"><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 text:style-name="P3"><text:span text:style-name="T38"><text:a xlink:href="https://blog.addgene.org/why-do-i-need-an-mta-anyway" xlink:type="simple">https://blog.addgene.org/why-do-i-need-an-mta-anyway</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5;p114" draw:style-name="gr2" draw:text-style-name="P8" draw:layer="layout" svg:width="6.7cm" svg:height="1.264cm" svg:x="17.149cm" svg:y="2.185cm">
          <draw:image xlink:href="Pictures/100002010000053C000000FD00C5FBB50899F2AA.png" xlink:type="simple" xlink:show="embed" xlink:actuate="onLoad">
            <text:p/>
          </draw:image>
        </draw:frame>
        <presentation:notes draw:style-name="dp2">
          <draw:frame draw:name="Google Shape;669;g3418092b3bd_0_179:notes" presentation:style-name="pr42" draw:text-style-name="P9" draw:layer="layout" svg:width="15.239cm" svg:height="11.429cm" svg:x="1.905cm" svg:y="12.065cm" presentation:class="notes" presentation:placeholder="true" presentation:user-transformed="true">
            <draw:text-box/>
          </draw:frame>
          <draw:page-thumbnail draw:name="Google Shape;670;g3418092b3bd_0_179:notes" draw:style-name="gr3" draw:layer="layout" svg:width="12.7cm" svg:height="9.524cm" svg:x="3.176cm" svg:y="1.905cm" draw:page-number="39" presentation:class="page"/>
        </presentation:notes>
      </draw:page>
      <draw:page draw:name="page40" draw:style-name="dp1" draw:master-page-name="BLANK">
        <draw:custom-shape draw:name="Google Shape;680;p115" draw:style-name="gr4" draw:text-style-name="P7" draw:layer="layout" svg:width="15.097cm" svg:height="1.932cm" svg:x="5.519cm" svg:y="0.751cm">
          <text:p text:style-name="P10"><text:span text:style-name="T6">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p115" draw:style-name="gr4" draw:text-style-name="P7" draw:layer="layout" svg:width="23.187cm" svg:height="12.899cm" svg:x="3.212cm" svg:y="3.037cm">
          <text:p text:style-name="P14"><text:span text:style-name="T44">Alway add a (standard) license</text:span></text:p>
          <text:p text:style-name="P14"><text:span text:style-name="T44">Ideally: File level license indication</text:span></text:p>
          <text:p text:style-name="P14"><text:span text:style-name="T44">Be aware of the IPR of the code you (re-)use</text:span></text:p>
          <text:p text:style-name="P14"><text:span text:style-name="T45"/></text:p>
          <text:p text:style-name="P14"><text:span text:style-name="T45"/></text:p>
          <text:p text:style-name="P14"><text:span text:style-name="T44">Invent your own license</text:span></text:p>
          <text:p text:style-name="P21"><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p115" draw:style-name="gr4" draw:text-style-name="P7" draw:layer="layout" svg:width="15.097cm" svg:height="1.932cm" svg:x="5.519cm" svg:y="8.794cm">
          <text:p text:style-name="P10"><text:span text:style-name="T6">D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77;p38:notes" presentation:style-name="pr43" draw:text-style-name="P9" draw:layer="layout" svg:width="16.798cm" svg:height="13.363cm" svg:x="2.1cm" svg:y="14.107cm" presentation:class="notes" presentation:placeholder="true" presentation:user-transformed="true">
            <draw:text-box/>
          </draw:frame>
          <draw:page-thumbnail draw:name="Google Shape;678;p38:notes" draw:style-name="gr3" draw:layer="layout" svg:width="19.797cm" svg:height="11.135cm" svg:x="0.6cm" svg:y="2.257cm" draw:page-number="40" presentation:class="page"/>
        </presentation:notes>
      </draw:page>
      <draw:page draw:name="page41" draw:style-name="dp1" draw:master-page-name="BLANK">
        <draw:custom-shape draw:name="Google Shape;687;p116" draw:style-name="gr4" draw:text-style-name="P7" draw:layer="layout" svg:width="10.157cm" svg:height="0.758cm" svg:x="7.97cm" svg:y="12.896cm">
          <text:p text:style-name="P3"><text:span text:style-name="T12">Link to RDMkit: </text:span><text:span text:style-name="T11"><text:a xlink:href="https://rdmkit.elixir-europe.org/" xlink:type="simple">https://rdmkit.elixir-europe.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8;p116" draw:style-name="gr2" draw:text-style-name="P8" draw:layer="layout" svg:width="5.008cm" svg:height="1.347cm" svg:x="17.64cm" svg:y="1.51cm">
          <draw:image xlink:href="Pictures/10000201000001B600000076162FAB6261BFA3D4.png" xlink:type="simple" xlink:show="embed" xlink:actuate="onLoad">
            <text:p/>
          </draw:image>
        </draw:frame>
        <draw:frame draw:name="Google Shape;689;p116" draw:style-name="gr2" draw:text-style-name="P8" draw:layer="layout" svg:width="7.786cm" svg:height="7.797cm" svg:x="8.412cm" svg:y="2.105cm">
          <draw:image xlink:href="Pictures/100002010000057200000573E37E1F5CC3843E52.png" xlink:type="simple" xlink:show="embed" xlink:actuate="onLoad">
            <text:p/>
          </draw:image>
        </draw:frame>
        <draw:frame draw:name="Google Shape;690;p116" draw:style-name="gr2" draw:text-style-name="P8" draw:layer="layout" svg:width="3.562cm" svg:height="13.439cm" svg:x="1.284cm" svg:y="0.215cm">
          <draw:image xlink:href="Pictures/10000201000000E80000036BFAF987F3530D0C4B.png" xlink:type="simple" xlink:show="embed" xlink:actuate="onLoad">
            <text:p/>
          </draw:image>
        </draw:frame>
        <presentation:notes draw:style-name="dp2">
          <draw:frame draw:name="Google Shape;684;p39:notes" presentation:style-name="pr44" draw:text-style-name="P9" draw:layer="layout" svg:width="16.798cm" svg:height="13.363cm" svg:x="2.1cm" svg:y="14.107cm" presentation:class="notes" presentation:placeholder="true" presentation:user-transformed="true">
            <draw:text-box/>
          </draw:frame>
          <draw:page-thumbnail draw:name="Google Shape;685;p39:notes" draw:style-name="gr3" draw:layer="layout" svg:width="19.797cm" svg:height="11.135cm" svg:x="0.6cm" svg:y="2.257cm" draw:page-number="41" presentation:class="page"/>
        </presentation:notes>
      </draw:page>
      <draw:page draw:name="page42" draw:style-name="dp1" draw:master-page-name="TITLE_5f_AND_5f_BODY" presentation:presentation-page-layout-name="AL2T1">
        <draw:custom-shape draw:name="Google Shape;695;p117" draw:style-name="gr6" draw:text-style-name="P7" draw:layer="layout" svg:width="21.88cm" svg:height="6.663cm" svg:x="1.211cm" svg:y="3.082cm">
          <text:p text:style-name="P27"><text:span text:style-name="T30"/></text:p>
          <text:p text:style-name="P28"><text:span text:style-name="T46">Digital Life 2021: Know-how workshop on IPR in digital biotech</text:span></text:p>
          <text:p text:style-name="P29"><text:span text:style-name="T46"><text:a xlink:href="https://rdmkit.elixir-europe.org/sharing" xlink:type="simple">Data life cycle: Sharing | RDMkit</text:a></text:span><text:span text:style-name="T47"><text:s/></text:span></text:p>
          <text:p text:style-name="P29"><text:span text:style-name="T46"><text:a xlink:href="https://rdmkit.elixir-europe.org/licensing" xlink:type="simple">Your tasks: Licensing | RDMkit</text:a></text:span><text:span text:style-name="T47"><text:s/></text:span></text:p>
          <text:p text:style-name="P30"><text:span text:style-name="T46"><text:a xlink:href="https://ufal.github.io/public-license-selector/" xlink:type="simple">EUDAT license chooser for data and software</text:a></text:span></text:p>
          <text:p text:style-name="P28"><text:span text:style-name="T46"><text:a xlink:href="https://choosealicense.com/" xlink:type="simple">Choose a License</text:a></text:span><text:span text:style-name="T48"><text:s/></text:span></text:p>
          <text:p text:style-name="P30"><text:span text:style-name="T46"><text:a xlink:href="https://opensource.org/licenses" xlink:type="simple">Licenses &amp; Standards | Open Source Initiative</text:a></text:span></text:p>
          <text:p text:style-name="P30"><text:span text:style-name="T49"/></text:p>
          <text:p text:style-name="P12"><text:span text:style-name="T49"/></text:p>
          <text:p text:style-name="P30"><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6;p117" draw:style-name="gr2" draw:text-style-name="P8" draw:layer="layout" svg:width="5.772cm" svg:height="1.551cm" svg:x="16.06cm" svg:y="5.256cm">
          <draw:image xlink:href="Pictures/10000201000001B600000076162FAB6261BFA3D4.png" xlink:type="simple" xlink:show="embed" xlink:actuate="onLoad">
            <text:p/>
          </draw:image>
        </draw:frame>
        <draw:frame draw:name="Google Shape;697;p117" draw:style-name="gr2" draw:text-style-name="P8" draw:layer="layout" svg:width="1.454cm" svg:height="1.238cm" svg:x="2.131cm" svg:y="9.843cm">
          <draw:image xlink:href="Pictures/100002010000029500000233BD5FD93275C2781F.png" xlink:type="simple" xlink:show="embed" xlink:actuate="onLoad">
            <text:p/>
          </draw:image>
        </draw:frame>
        <draw:custom-shape draw:name="Google Shape;698;p117" draw:style-name="gr4" draw:text-style-name="P7" draw:layer="layout" svg:width="15.097cm" svg:height="1.932cm" svg:x="5.519cm" svg:y="0.751cm">
          <text:p text:style-name="P10"><text:span text:style-name="T6">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9;p117" draw:style-name="gr2" draw:text-style-name="P8" draw:layer="layout" svg:width="5.193cm" svg:height="3.842cm" svg:x="1.05cm" svg:y="10.127cm">
          <draw:image xlink:href="Pictures/10000201000000FA000000B9C01DD5E7B6DB857F.png" xlink:type="simple" xlink:show="embed" xlink:actuate="onLoad">
            <text:p/>
          </draw:image>
        </draw:frame>
        <presentation:notes draw:style-name="dp2">
          <draw:page-thumbnail draw:name="Google Shape;692;p40:notes" draw:style-name="gr3" draw:layer="layout" svg:width="16.931cm" svg:height="9.523cm" svg:x="1.059cm" svg:y="1.905cm" draw:page-number="42" presentation:class="page"/>
          <draw:frame draw:name="Google Shape;693;p40:notes" presentation:style-name="pr45" draw:text-style-name="P2" draw:layer="layout" svg:width="15.238cm" svg:height="11.428cm" svg:x="1.905cm" svg:y="12.065cm" presentation:class="notes" presentation:user-transformed="true">
            <draw:text-box>
              <text:p text:style-name="P31"><text:span text:style-name="T50">To learn more about &lt;session or topic name&gt;, we recommend you to visit: </text:span></text:p>
            </draw:text-box>
          </draw:frame>
        </presentation:notes>
      </draw:page>
      <draw:page draw:name="page43" draw:style-name="dp1" draw:master-page-name="BLANK">
        <draw:custom-shape draw:name="Google Shape;705;p118" draw:style-name="gr5" draw:text-style-name="P7" draw:layer="layout" svg:width="22.646cm" svg:height="1.848cm" svg:x="0.969cm" svg:y="0.993cm">
          <text:p text:style-name="P10"><text:span text:style-name="T51">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6;p118" draw:style-name="gr12" draw:text-style-name="P7" draw:layer="layout" svg:width="23.661cm" svg:height="3.59cm" svg:x="1.276cm" svg:y="7.351cm">
          <text:p text:style-name="P32"><text:span text:style-name="T52">Except where otherwise noted, this work is licensed under a</text:span></text:p>
          <text:p text:style-name="P32"><text:span text:style-name="T41"/></text:p>
          <text:p text:style-name="P32"><text:span text:style-name="T53"><text:a xlink:href="http://creativecommons.org/licenses/by-nc/4.0/" xlink:type="simple">Creative Commons Attribution 4.0 International License</text:a></text:span></text:p>
          <text:p text:style-name="P33"><text:span text:style-name="T54"><text:a xlink:href="https://creativecommons.org/licenses/by/4.0/" xlink:type="simple"> </text:a></text:span></text:p>
          <text:p text:style-name="P32"><text:span text:style-name="T54"><text:a xlink:href="https://creativecommons.org/licenses/by/4.0/" xlink:type="simple">https://creativecommons.org/licenses/by/4.0/</text:a></text:span></text:p>
          <text:p text:style-name="P32"><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07;p118" draw:style-name="gr2" draw:text-style-name="P8" draw:layer="layout" svg:width="5.406cm" svg:height="2.381cm" svg:x="9.408cm" svg:y="4.455cm">
          <draw:image xlink:href="Pictures/10000201000002C4000001389E17077FD2C9D029.png" xlink:type="simple" xlink:show="embed" xlink:actuate="onLoad">
            <text:p/>
          </draw:image>
        </draw:frame>
        <presentation:notes draw:style-name="dp2">
          <draw:custom-shape draw:name="Google Shape;701;p41:notes" draw:style-name="gr13" draw:text-style-name="P7" draw:layer="layout" svg:width="8.257cm" svg:height="1.264cm" svg:x="10.782cm" svg:y="24.13cm">
            <text:p text:style-name="P3"><text:span text:style-name="T12"><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02;p41:notes" draw:style-name="gr3" draw:layer="layout" svg:width="16.931cm" svg:height="9.523cm" svg:x="1.058cm" svg:y="1.931cm" draw:page-number="43" presentation:class="page"/>
          <draw:frame draw:name="Google Shape;703;p41:notes" presentation:style-name="pr46" draw:text-style-name="P9" draw:layer="layout" svg:width="15.238cm" svg:height="11.428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_20_ELIXIR-background" style:display-name="Title slide ELIXIR-background" style:family="presentation">
      <style:graphic-properties draw:stroke="none" draw:fill="solid" draw:fill-color="#fafafa"/>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shrink-to-fit"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_20_ELIXIR-outline2" style:display-name="Title slide ELIXIR-outline2" style:family="presentation" style:parent-style-name="Title_20_slide_20_ELIXI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3" style:display-name="Title slide ELIXIR-outline3" style:family="presentation" style:parent-style-name="Title_20_slide_20_ELIXI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4" style:display-name="Title slide ELIXIR-outline4" style:family="presentation" style:parent-style-name="Title_20_slide_20_ELIXI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shrink-to-fit" style:shrink-to-fit="true">
        <text:list-style style:name="TWO_5f_OBJECTS-outline1" style:display-name="TWO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text:list-style style:name="TWO_5f_OBJECTS-title" style:display-name="TWO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afafa"/>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2.164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068cm" fo:padding-bottom="0.068cm" fo:padding-left="0.136cm" fo:padding-right="0.136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backgroundobjects">
      <style:graphic-properties draw:stroke="none" draw:fill="none" draw:fill-color="#ffffff" draw:auto-grow-height="false" fo:min-height="1.485cm"/>
    </style:style>
    <style:style style:name="Mpr2" style:family="presentation" style:parent-style-name="Title_20_slide_20_ELIXIR-backgroundobjects">
      <style:graphic-properties draw:stroke="none" draw:fill="none" draw:fill-color="#ffffff" draw:textarea-vertical-align="bottom" draw:auto-grow-height="false" fo:min-height="1.485cm"/>
    </style:style>
    <style:style style:name="Mpr3" style:family="presentation" style:parent-style-name="TWO_5f_OBJECTS-backgroundobjects">
      <style:graphic-properties draw:stroke="none" draw:fill="none" draw:fill-color="#ffffff" draw:auto-grow-height="false" fo:min-height="1.27cm"/>
    </style:style>
    <style:style style:name="Mpr4" style:family="presentation" style:parent-style-name="TWO_5f_OBJECTS-backgroundobjects">
      <style:graphic-properties draw:stroke="none" draw:fill="none" draw:fill-color="#ffffff" draw:textarea-vertical-align="bottom" draw:auto-grow-height="false" fo:min-height="1.27cm"/>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Default-backgroundobjects">
      <style:graphic-properties draw:stroke="none" draw:fill="none" draw:fill-color="#ffffff" draw:auto-grow-height="false" fo:min-height="1.27cm"/>
    </style:style>
    <style:style style:name="Mpr8" style:family="presentation" style:parent-style-name="Default-backgroundobjects">
      <style:graphic-properties draw:stroke="none" draw:fill="none" draw:fill-color="#ffffff" draw:textarea-vertical-align="bottom" draw:auto-grow-height="false" fo:min-height="1.27cm"/>
    </style:style>
    <style:style style:name="Mpr9" style:family="presentation" style:parent-style-name="TITLE_5f_AND_5f_BODY-backgroundobjects">
      <style:graphic-properties draw:stroke="none" draw:fill="none" draw:fill-color="#ffffff" draw:auto-grow-height="false" fo:min-height="1.27cm"/>
    </style:style>
    <style:style style:name="Mpr10"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003f41" style:text-line-through-style="none" style:text-line-through-type="none" style:text-position="0% 100%" style:font-name="Corbel" fo:font-size="18pt" fo:letter-spacing="normal" fo:font-style="italic" style:text-underline-style="none" fo:font-weight="normal" style:font-name-asian="Corbel" style:font-size-asian="18pt" style:font-style-asian="italic" style:font-weight-asian="normal" style:font-name-complex="Corbel" style:font-size-complex="18pt" style:font-style-complex="italic"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_20_ELIXIR" style:display-name="Title slide ELIXIR" style:page-layout-name="PM1" draw:style-name="Mdp1">
      <draw:frame draw:name="Google Shape;274;p67" presentation:style-name="Title_20_slide_20_ELIXIR-outline1" draw:layer="backgroundobjects" svg:width="9.401cm" svg:height="0.749cm" svg:x="14.973cm" svg:y="9.936cm" presentation:class="outline" presentation:placeholder="true" presentation:user-transformed="true">
        <draw:text-box/>
      </draw:frame>
      <draw:frame draw:name="Google Shape;275;p67" draw:style-name="Mgr3" draw:text-style-name="MP5" draw:layer="backgroundobjects" svg:width="11.94cm" svg:height="14.286cm" svg:x="0cm" svg:y="0cm">
        <draw:image xlink:href="Pictures/1000020100000800000005A87429A934D158A4D1.png" xlink:type="simple" xlink:show="embed" xlink:actuate="onLoad">
          <text:p/>
        </draw:image>
      </draw:frame>
      <draw:custom-shape draw:name="Google Shape;276;p67" draw:style-name="Mgr4" draw:text-style-name="MP7" draw:layer="backgroundobjects" svg:width="8.131cm" svg:height="0.905cm" svg:x="16.243cm" svg:y="12.994cm">
        <text:p text:style-name="MP6"><text:span text:style-name="MT1">elixi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7;p67" presentation:style-name="Title_20_slide_20_ELIXIR-title" draw:layer="backgroundobjects" svg:width="13.661cm" svg:height="4.996cm" svg:x="10.712cm" svg:y="3.369cm" presentation:class="title" presentation:placeholder="true" presentation:user-transformed="true">
        <draw:text-box/>
      </draw:frame>
      <draw:frame draw:name="Google Shape;279;p67" draw:style-name="Mgr5" draw:text-style-name="MP5" draw:layer="backgroundobjects" svg:width="5.398cm" svg:height="4.096cm" svg:x="1.258cm" svg:y="5.069cm">
        <draw:image xlink:href="Pictures/1000020100000800000006129C498E2C5ABF3C41.png" xlink:type="simple" xlink:show="embed" xlink:actuate="onLoad">
          <text:p/>
        </draw:image>
      </draw:frame>
      <presentation:notes style:page-layout-name="PM2">
        <draw:page-thumbnail presentation:style-name="Title_20_slide_20_ELIXIR-title" draw:layer="backgroundobjects" svg:width="19.798cm" svg:height="11.136cm" svg:x="0.6cm" svg:y="2.257cm" presentation:class="page"/>
        <draw:frame presentation:style-name="Title_20_slide_20_ELIXIR-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5f_OBJECTS" style:display-name="TWO_OBJECTS" style:page-layout-name="PM1" draw:style-name="Mdp2">
      <draw:frame draw:name="Google Shape;66;p15" presentation:style-name="TWO_5f_OBJECTS-title" draw:layer="backgroundobjects" svg:width="22.858cm" svg:height="2.384cm" svg:x="1.27cm" svg:y="0.57cm" presentation:class="title" presentation:placeholder="true" presentation:user-transformed="true">
        <draw:text-box/>
      </draw:frame>
      <draw:frame draw:name="Google Shape;67;p15" presentation:style-name="TWO_5f_OBJECTS-outline1" draw:layer="backgroundobjects" svg:width="11.154cm" svg:height="8.285cm" svg:x="1.27cm" svg:y="3.343cm" presentation:class="outline" presentation:placeholder="true" presentation:user-transformed="true">
        <draw:text-box/>
      </draw:frame>
      <draw:frame draw:name="Google Shape;68;p15" presentation:style-name="TWO_5f_OBJECTS-outline1" draw:layer="backgroundobjects" svg:width="11.154cm" svg:height="8.285cm" svg:x="12.984cm" svg:y="3.343cm" presentation:class="outline" presentation:placeholder="true" presentation:user-transformed="true">
        <draw:text-box/>
      </draw:frame>
      <presentation:notes style:page-layout-name="PM2">
        <draw:page-thumbnail presentation:style-name="TWO_5f_OBJECTS-title" draw:layer="backgroundobjects" svg:width="16.931cm" svg:height="9.524cm" svg:x="1.059cm" svg:y="1.93cm" presentation:class="page"/>
        <draw:frame presentation:style-name="TWO_5f_OBJECTS-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2">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Google Shape;118;p28" presentation:style-name="TITLE_5f_AND_5f_BODY-title" draw:layer="backgroundobjects" svg:width="22.858cm" svg:height="2.384cm" svg:x="1.27cm" svg:y="0.57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61"/>
    <meta:generator>LibreOfficeDev/6.0.5.2$Linux_X86_64 LibreOffice_project/</meta:generator>
  </office:meta>
</office:document-meta>
</file>