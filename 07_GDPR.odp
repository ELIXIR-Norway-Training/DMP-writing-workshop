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800000002C52A8C77E23918652F.png" manifest:media-type="image/png"/>
  <manifest:file-entry manifest:full-path="Pictures/100002010000051600000432C5304727C0ECF49D.png" manifest:media-type="image/png"/>
  <manifest:file-entry manifest:full-path="Pictures/100002010000044F000003A3D50AD686DBC0D52F.png" manifest:media-type="image/png"/>
  <manifest:file-entry manifest:full-path="Pictures/10000201000002C4000001389E17077FD2C9D029.png" manifest:media-type="image/png"/>
  <manifest:file-entry manifest:full-path="Pictures/TablePreview7.svm" manifest:media-type=""/>
  <manifest:file-entry manifest:full-path="Pictures/TablePreview6.svm" manifest:media-type=""/>
  <manifest:file-entry manifest:full-path="Pictures/TablePreview2.svm" manifest:media-type=""/>
  <manifest:file-entry manifest:full-path="Pictures/1000020100000144000000436534AE613C0E33F2.png" manifest:media-type="image/png"/>
  <manifest:file-entry manifest:full-path="Pictures/100002010000040000000400056732C6DA6137D4.png" manifest:media-type="image/png"/>
  <manifest:file-entry manifest:full-path="Pictures/1000020100000400000004001069E99D172314B3.png" manifest:media-type="image/png"/>
  <manifest:file-entry manifest:full-path="Pictures/10000201000000CA000000327771BA3BABF58435.png" manifest:media-type="image/png"/>
  <manifest:file-entry manifest:full-path="Pictures/1000020100000370000001130697892BF8D75BA8.png" manifest:media-type="image/png"/>
  <manifest:file-entry manifest:full-path="Pictures/100002010000022B000002BD0E32064FAEB92C37.png" manifest:media-type="image/png"/>
  <manifest:file-entry manifest:full-path="Pictures/TablePreview5.svm" manifest:media-type=""/>
  <manifest:file-entry manifest:full-path="Pictures/100002010000010F000000B60939EE7473DC96AC.png" manifest:media-type="image/png"/>
  <manifest:file-entry manifest:full-path="Pictures/10000201000009C40000075B0A51E3C3CD88BC07.png" manifest:media-type="image/png"/>
  <manifest:file-entry manifest:full-path="Pictures/10000201000006000000080027A80628F8DCA6F3.png" manifest:media-type="image/png"/>
  <manifest:file-entry manifest:full-path="Pictures/TablePreview4.svm" manifest:media-type=""/>
  <manifest:file-entry manifest:full-path="Pictures/10000000000001B3000000747D76F1BD4040118B.png" manifest:media-type="image/png"/>
  <manifest:file-entry manifest:full-path="Pictures/100002010000026A000002DB51D9E60E858446FD.png" manifest:media-type="image/png"/>
  <manifest:file-entry manifest:full-path="Pictures/TablePreview3.svm" manifest:media-type=""/>
  <manifest:file-entry manifest:full-path="Pictures/1000020100000800000006129C498E2C5ABF3C41.png" manifest:media-type="image/png"/>
  <manifest:file-entry manifest:full-path="Pictures/100002010000064100000800ABB327E47C0DA0AA.png" manifest:media-type="image/png"/>
  <manifest:file-entry manifest:full-path="Pictures/100002010000042700000569970680E867B6566F.png" manifest:media-type="image/png"/>
  <manifest:file-entry manifest:full-path="Pictures/10000201000000ED00000449C8AB390A94284B94.png" manifest:media-type="image/png"/>
  <manifest:file-entry manifest:full-path="Pictures/100002010000043C0000048C60519F59D334BE38.png" manifest:media-type="image/png"/>
  <manifest:file-entry manifest:full-path="Pictures/10000201000000A300000448EACA50CF4303650F.png" manifest:media-type="image/png"/>
  <manifest:file-entry manifest:full-path="Pictures/100000000000020000000174C5E145BF6683B30C.png" manifest:media-type="image/png"/>
  <manifest:file-entry manifest:full-path="Pictures/1000020100000800000005A87429A934D158A4D1.png" manifest:media-type="image/png"/>
  <manifest:file-entry manifest:full-path="Pictures/100002010000010A000003160292EAC3CA21222E.png" manifest:media-type="image/png"/>
  <manifest:file-entry manifest:full-path="Pictures/TablePreview1.svm" manifest:media-type=""/>
  <manifest:file-entry manifest:full-path="Pictures/100000000000032000000215F33B6484BB0748B4.png" manifest:media-type="image/png"/>
  <manifest:file-entry manifest:full-path="Pictures/10000201000001230000004369D9F581B7E7DD98.png" manifest:media-type="image/png"/>
  <manifest:file-entry manifest:full-path="Pictures/1000020100000300000003005C10A696FD01655D.png" manifest:media-type="image/png"/>
  <manifest:file-entry manifest:full-path="Pictures/100000000000032A0000021CFBC0095C002E1384.png" manifest:media-type="image/png"/>
  <manifest:file-entry manifest:full-path="Pictures/100002010000044B00000106C712797C10D8974B.png" manifest:media-type="image/png"/>
  <manifest:file-entry manifest:full-path="Pictures/100002010000080000000480310B4D60D3BBC837.png" manifest:media-type="image/png"/>
  <manifest:file-entry manifest:full-path="Pictures/100002010000033E000003006FD3819535F777FD.png" manifest:media-type="image/png"/>
  <manifest:file-entry manifest:full-path="Pictures/100002010000021A00000073B3ADA33C6E567737.png" manifest:media-type="image/png"/>
  <manifest:file-entry manifest:full-path="Pictures/10000201000002D0000002D0DDE67520C92BF921.png" manifest:media-type="image/png"/>
  <manifest:file-entry manifest:full-path="Pictures/100002010000011300000027C9C4B16A08A534FA.png" manifest:media-type="image/png"/>
  <manifest:file-entry manifest:full-path="Pictures/10000201000008000000040104A924880F94F5A7.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ce style:name="Exo 2" svg:font-family="'Exo 2'"/>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9cm" fo:padding-bottom="0.19cm" fo:padding-left="0.19cm" fo:padding-right="0.19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18cm" fo:padding-bottom="0cm" fo:padding-left="0cm" fo:padding-right="0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36cm" fo:padding-bottom="0cm" fo:padding-left="0cm" fo:padding-right="0cm" fo:wrap-option="wrap"/>
    </style:style>
    <style:style style:name="gr6"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7" style:family="graphic" style:parent-style-name="standard">
      <style:graphic-properties draw:stroke="solid" svg:stroke-width="0.026cm" svg:stroke-color="#000000" draw:stroke-linejoin="round" draw:fill="solid" draw:fill-color="#073763"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073763" draw:stroke-linejoin="round" draw:fill="solid" draw:fill-color="#073763"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000000" draw:stroke-linejoin="round" draw:fill="solid" draw:fill-color="#073763"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884cm, 0cm, 0.882cm)" draw:image-opacity="100%" style:mirror="none"/>
    </style:style>
    <style:style style:name="gr13" style:family="graphic" style:parent-style-name="standard">
      <style:graphic-properties draw:stroke="none" svg:stroke-width="0cm" draw:fill="solid" draw:fill-color="#073763"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none" draw:textarea-vertical-align="top" draw:auto-grow-height="false" draw:fit-to-size="false" style:shrink-to-fit="false" fo:min-height="0cm" fo:min-width="0cm" fo:padding-top="0.24cm" fo:padding-bottom="0cm" fo:padding-left="0cm" fo:padding-right="0cm" fo:wrap-option="wrap"/>
    </style:style>
    <style:style style:name="gr15" style:family="graphic" style:parent-style-name="standard">
      <style:graphic-properties draw:stroke="solid" svg:stroke-width="0.106cm" svg:stroke-color="#351c75"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106cm" svg:stroke-color="#049cc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106cm" svg:stroke-color="#6aa84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877cm, 0cm, 0.879cm)" draw:image-opacity="100%" style:mirror="none"/>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1.542cm, 0cm)" draw:image-opacity="100%" style:mirror="none"/>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413cm, 0cm, 10.494cm, 0cm)" draw:image-opacity="100%" style:mirror="none"/>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693cm, 0cm, 14.538cm, 0cm)" draw:image-opacity="100%" style:mirror="none"/>
    </style:style>
    <style:style style:name="gr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7.934cm, 0cm, 3.608cm, 0cm)" draw:image-opacity="100%" style:mirror="none"/>
    </style:style>
    <style:style style:name="gr2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4.089cm, 0cm, 0cm, 0cm)" draw:image-opacity="100%" style:mirror="none"/>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668cm, 0cm, 19.42cm, 0cm)" draw:image-opacity="100%" style:mirror="none"/>
    </style:style>
    <style:style style:name="gr2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186cm, 5.065cm, 5.045cm, 5.094cm)" draw:image-opacity="100%" style:mirror="none"/>
    </style:style>
    <style:style style:name="gr27" style:family="graphic" style:parent-style-name="standard">
      <style:graphic-properties draw:stroke="solid" svg:stroke-width="0.026cm" svg:stroke-color="#a64d79" draw:stroke-linejoin="round" draw:fill="solid" draw:fill-color="#a64d79"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solid" svg:stroke-width="0.026cm" svg:stroke-color="#741b47" draw:stroke-linejoin="round" draw:fill="solid" draw:fill-color="#741b47"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solid" svg:stroke-width="0.026cm" svg:stroke-color="#ea9999" draw:stroke-linejoin="round" draw:fill="solid" draw:fill-color="#ea9999"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solid" draw:fill-color="#666666"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solid" svg:stroke-width="0.026cm" svg:stroke-color="#c27ba0" draw:stroke-linejoin="round" draw:fill="solid" draw:fill-color="#c27ba0"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5.627cm, 0cm)" draw:image-opacity="100%" style:mirror="none"/>
    </style:style>
    <style:style style:name="gr3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2.275cm, 0cm, 3.352cm, 0cm)" draw:image-opacity="100%" style:mirror="none"/>
    </style:style>
    <style:style style:name="gr3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975cm, 0cm, 17.652cm, 0cm)" draw:image-opacity="100%" style:mirror="none"/>
    </style:style>
    <style:style style:name="gr35" style:family="graphic" style:parent-style-name="standard">
      <style:graphic-properties draw:stroke="none" svg:stroke-width="0cm" draw:fill="solid" draw:fill-color="#0b5394" draw:textarea-vertical-align="top" draw:auto-grow-height="false" draw:fit-to-size="false" style:shrink-to-fit="false" fo:min-height="0cm" fo:min-width="0cm" fo:padding-top="0.24cm" fo:padding-bottom="0cm" fo:padding-left="0cm" fo:padding-right="0cm" fo:wrap-option="wrap"/>
    </style:style>
    <style:style style:name="gr3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076cm, 0cm, 17.371cm, 0cm)" draw:image-opacity="100%" style:mirror="none"/>
    </style:style>
    <style:style style:name="gr37" style:family="graphic" style:parent-style-name="standard">
      <style:graphic-properties draw:stroke="solid" svg:stroke-width="0.026cm" svg:stroke-color="#cccccc" draw:stroke-linejoin="round"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solid" svg:stroke-width="0.026cm" svg:stroke-color="#434343" draw:stroke-linejoin="round" draw:fill="solid" draw:fill-color="#666666"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none" svg:stroke-width="0cm" draw:fill="solid" draw:fill-color="#efefef"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none" svg:stroke-width="0cm" draw:fill="solid" draw:fill-color="#6fa8dc"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4.41cm, 0cm)" draw:image-opacity="100%" style:mirror="none"/>
    </style:style>
    <style:style style:name="gr43" style:family="graphic" style:parent-style-name="standard">
      <style:graphic-properties draw:stroke="none" svg:stroke-width="0cm" draw:fill="solid" draw:fill-color="#cfe2f3"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solid" svg:stroke-width="0.026cm" svg:stroke-color="#9fc5e8" draw:stroke-linejoin="round" draw:fill="solid" draw:fill-color="#9fc5e8"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solid" svg:stroke-width="0.026cm" svg:stroke-color="#0b5394" draw:stroke-linejoin="round" draw:fill="solid" draw:fill-color="#0b5394" draw:textarea-vertical-align="middle" draw:auto-grow-height="false" draw:fit-to-size="false" style:shrink-to-fit="false" fo:min-height="0cm" fo:min-width="0cm" fo:padding-top="0.18cm" fo:padding-bottom="0cm" fo:padding-left="0cm" fo:padding-right="0cm" fo:wrap-option="wrap"/>
    </style:style>
    <style:style style:name="gr46" style:family="graphic" style:parent-style-name="standard">
      <style:graphic-properties draw:stroke="solid" svg:stroke-width="0.026cm" svg:stroke-color="#6fa8dc" draw:stroke-linejoin="round" draw:fill="solid" draw:fill-color="#6fa8dc"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194cm" fo:padding-bottom="0.125cm" fo:padding-left="0.25cm" fo:padding-right="0.25cm" fo:wrap-option="wrap"/>
    </style:style>
    <style:style style:name="gr48"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49" style:family="graphic" style:parent-style-name="standard">
      <style:graphic-properties draw:stroke="none" svg:stroke-width="0cm" draw:fill="none" draw:textarea-vertical-align="bottom" draw:auto-grow-height="false" draw:fit-to-size="false" style:shrink-to-fit="false" fo:min-height="0cm" fo:min-width="0cm" fo:padding-top="0.127cm" fo:padding-bottom="0.127cm" fo:padding-left="0.254cm" fo:padding-right="0.254cm" fo:wrap-option="wrap"/>
    </style:style>
    <style:style style:name="gr50" style:family="graphic" style:parent-style-name="standard">
      <style:graphic-properties draw:stroke="solid" svg:stroke-width="0.026cm" svg:stroke-color="#20124d" draw:stroke-linejoin="round" draw:fill="solid" draw:fill-color="#20124d" draw:textarea-vertical-align="middle" draw:auto-grow-height="false" draw:fit-to-size="false" style:shrink-to-fit="false" fo:min-height="0cm" fo:min-width="0cm" fo:padding-top="0.254cm" fo:padding-bottom="0.254cm" fo:padding-left="0.254cm" fo:padding-right="0.254cm" fo:wrap-option="wrap"/>
    </style:style>
    <style:style style:name="gr51" style:family="graphic" style:parent-style-name="standard">
      <style:graphic-properties draw:stroke="solid" svg:stroke-width="0.026cm" svg:stroke-color="#351c75" draw:stroke-linejoin="round" draw:fill="solid" draw:fill-color="#351c75" draw:textarea-vertical-align="middle" draw:auto-grow-height="false" draw:fit-to-size="false" style:shrink-to-fit="false" fo:min-height="0cm" fo:min-width="0cm" fo:padding-top="0.254cm" fo:padding-bottom="0.254cm" fo:padding-left="0.254cm" fo:padding-right="0.254cm" fo:wrap-option="wrap"/>
    </style:style>
    <style:style style:name="gr52" style:family="graphic" style:parent-style-name="standard">
      <style:graphic-properties draw:stroke="solid" svg:stroke-width="0.026cm" svg:stroke-color="#674ea7" draw:stroke-linejoin="round" draw:fill="solid" draw:fill-color="#674ea7" draw:textarea-vertical-align="middle" draw:auto-grow-height="false" draw:fit-to-size="false" style:shrink-to-fit="false" fo:min-height="0cm" fo:min-width="0cm" fo:padding-top="0.254cm" fo:padding-bottom="0.254cm" fo:padding-left="0.254cm" fo:padding-right="0.254cm" fo:wrap-option="wrap"/>
    </style:style>
    <style:style style:name="gr53" style:family="graphic" style:parent-style-name="standard">
      <style:graphic-properties draw:stroke="solid" svg:stroke-width="0.026cm" svg:stroke-color="#b4a7d6" draw:stroke-linejoin="round" draw:fill="solid" draw:fill-color="#b4a7d6" draw:textarea-vertical-align="middle" draw:auto-grow-height="false" draw:fit-to-size="false" style:shrink-to-fit="false" fo:min-height="0cm" fo:min-width="0cm" fo:padding-top="0.254cm" fo:padding-bottom="0.254cm" fo:padding-left="0.254cm" fo:padding-right="0.254cm" fo:wrap-option="wrap"/>
    </style:style>
    <style:style style:name="gr54" style:family="graphic" style:parent-style-name="standard">
      <style:graphic-properties draw:stroke="solid" svg:stroke-width="0.026cm" svg:stroke-color="#d9d2e9" draw:stroke-linejoin="round" draw:fill="solid" draw:fill-color="#d9d2e9" draw:textarea-vertical-align="middle" draw:auto-grow-height="false" draw:fit-to-size="false" style:shrink-to-fit="false" fo:min-height="0cm" fo:min-width="0cm" fo:padding-top="0.254cm" fo:padding-bottom="0.254cm" fo:padding-left="0.254cm" fo:padding-right="0.254cm" fo:wrap-option="wrap"/>
    </style:style>
    <style:style style:name="gr55" style:family="graphic" style:parent-style-name="standard">
      <style:graphic-properties draw:stroke="solid" svg:stroke-width="0.1cm" svg:stroke-color="#8e7cc3" draw:stroke-linejoin="round" draw:fill="none" draw:textarea-vertical-align="middle" draw:auto-grow-height="false" draw:fit-to-size="false" style:shrink-to-fit="false" fo:min-height="0cm" fo:min-width="0cm" fo:padding-top="0.219cm" fo:padding-bottom="0.175cm" fo:padding-left="0.3cm" fo:padding-right="0.3cm" fo:wrap-option="wrap"/>
    </style:style>
    <style:style style:name="gr56" style:family="graphic" style:parent-style-name="standard">
      <style:graphic-properties draw:stroke="none" svg:stroke-width="0cm" draw:fill="none" draw:textarea-vertical-align="middle" draw:auto-grow-height="false" draw:fit-to-size="false" style:shrink-to-fit="false" fo:min-height="0cm" fo:min-width="0cm" fo:padding-top="0.24cm" fo:padding-bottom="0cm" fo:padding-left="0cm" fo:padding-right="0cm" fo:wrap-option="wrap"/>
    </style:style>
    <style:style style:name="gr57"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5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59" style:family="graphic" style:parent-style-name="standard">
      <style:graphic-properties draw:stroke="none" svg:stroke-width="0cm" draw:fill="none" draw:textarea-vertical-align="top" draw:auto-grow-height="false" draw:fit-to-size="false" style:shrink-to-fit="false" fo:min-height="0cm" fo:min-width="0cm" fo:padding-top="0.184cm" fo:padding-bottom="0.094cm" fo:padding-left="0.188cm" fo:padding-right="0.188cm" fo:wrap-option="wrap"/>
    </style:style>
    <style:style style:name="gr60" style:family="graphic" style:parent-style-name="standard">
      <style:graphic-properties draw:stroke="none" svg:stroke-width="0cm" draw:fill="none" draw:textarea-vertical-align="top" draw:auto-grow-height="false" draw:fit-to-size="false" style:shrink-to-fit="false" fo:min-height="0cm" fo:min-width="0cm" fo:padding-top="0.139cm" fo:padding-bottom="0.094cm" fo:padding-left="0.188cm" fo:padding-right="0.188cm" fo:wrap-option="wrap"/>
    </style:style>
    <style:style style:name="gr6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357cm)" draw:image-opacity="100%" style:mirror="none"/>
    </style:style>
    <style:style style:name="gr6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63" style:family="graphic" style:parent-style-name="standard">
      <style:graphic-properties draw:stroke="none" svg:stroke-width="0cm" draw:fill="solid" draw:fill-color="#c23669" draw:textarea-vertical-align="middle" draw:auto-grow-height="false" draw:fit-to-size="false" style:shrink-to-fit="false" fo:min-height="0cm" fo:min-width="0cm" fo:padding-top="0.127cm" fo:padding-bottom="0.127cm" fo:padding-left="0.254cm" fo:padding-right="0.254cm" fo:wrap-option="wrap"/>
    </style:style>
    <style:style style:name="gr64"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19cm" fo:padding-right="0.19cm" fo:wrap-option="wrap"/>
    </style:style>
    <style:style style:name="gr65" style:family="graphic" style:parent-style-name="standard">
      <style:graphic-properties draw:stroke="none" svg:stroke-width="0cm" draw:fill="none" draw:textarea-vertical-align="top" draw:auto-grow-height="false" draw:fit-to-size="false" style:shrink-to-fit="false" fo:min-height="0cm" fo:min-width="0cm" fo:padding-top="0.094cm" fo:padding-bottom="0.094cm" fo:padding-left="0.188cm" fo:padding-right="0.188cm" fo:wrap-option="wrap"/>
    </style:style>
    <style:style style:name="gr66" style:family="graphic" style:parent-style-name="standard">
      <style:graphic-properties draw:stroke="solid" svg:stroke-width="0.106cm" svg:stroke-color="#c2366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5.795cm, 0.527cm, 0cm)" draw:image-opacity="100%" style:mirror="none"/>
    </style:style>
    <style:style style:name="gr6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033cm, 0cm, 0cm, 8.594cm)" draw:image-opacity="100%" style:mirror="none"/>
    </style:style>
    <style:style style:name="gr69"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7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11.032cm)" draw:image-opacity="100%" style:mirror="none"/>
    </style:style>
    <style:style style:name="gr71" style:family="graphic" style:parent-style-name="standard">
      <style:graphic-properties draw:stroke="none" svg:stroke-width="0cm" draw:fill="none" draw:textarea-vertical-align="top" draw:auto-grow-height="false" draw:fit-to-size="false" style:shrink-to-fit="false" fo:min-height="0cm" fo:min-width="0cm" fo:padding-top="0.281cm" fo:padding-bottom="0.125cm" fo:padding-left="0.25cm" fo:padding-right="0.25cm" fo:wrap-option="wrap"/>
    </style:style>
    <style:style style:name="gr72" style:family="graphic" style:parent-style-name="standard">
      <style:graphic-properties draw:stroke="none" svg:stroke-width="0cm" draw:fill="solid" draw:fill-color="#4d4948" draw:textarea-vertical-align="top" draw:auto-grow-height="false" fo:min-height="0cm" fo:min-width="0cm" fo:padding-top="0.125cm" fo:padding-bottom="0.125cm" fo:padding-left="0.25cm" fo:padding-right="0.25cm" fo:wrap-option="wrap"/>
    </style:style>
    <style:style style:name="pr1" style:family="presentation" style:parent-style-name="Title_20_slide_20_ELIXIR-subtitle">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2" style:family="presentation" style:parent-style-name="Title_20_slide_20_ELIXIR-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3" style:family="presentation" style:parent-style-name="Title_20_slide_20_ELIXIR-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style:style>
    <style:style style:name="pr4" style:family="presentation" style:parent-style-name="Title_20_slide_20_ELIXIR-notes" style:list-style-name="L2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6"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7"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8"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9"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0"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1"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2"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3"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4"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5"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6"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7"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8"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9"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0"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1"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2"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3"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4"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5"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6"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7"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8"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9"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0"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1"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2"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3"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4" style:family="presentation" style:parent-style-name="Default-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5"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6"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7"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8"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9"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0"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1"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2"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3"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4"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5"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6"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7"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8"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9"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0"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1" style:family="presentation" style:parent-style-name="Default_20_1-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52" style:family="presentation" style:parent-style-name="TWO_5f_OBJECTS-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53" style:family="presentation" style:parent-style-name="Default_20_1-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54" style:family="presentation" style:parent-style-name="TWO_5f_OBJECTS-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55" style:family="presentation" style:parent-style-name="Default_20_2-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co1" style:family="table-column">
      <style:table-column-properties style:column-width="8.135cm" style:use-optimal-column-width="false"/>
    </style:style>
    <style:style style:name="co2" style:family="table-column">
      <style:table-column-properties style:column-width="8.139cm" style:use-optimal-column-width="false"/>
    </style:style>
    <style:style style:name="co3" style:family="table-column">
      <style:table-column-properties style:column-width="8.145cm" style:use-optimal-column-width="false"/>
    </style:style>
    <style:style style:name="ro1" style:family="table-row">
      <style:table-row-properties style:row-height="0.982cm"/>
    </style:style>
    <style:style style:name="ro2" style:family="table-row">
      <style:table-row-properties style:row-height="1.699cm"/>
    </style:style>
    <style:style style:name="ro3" style:family="table-row">
      <style:table-row-properties style:row-height="2.417cm"/>
    </style:style>
    <style:style style:name="ro4" style:family="table-row">
      <style:table-row-properties style:row-height="0.984cm"/>
    </style:style>
    <style:style style:name="ro5" style:family="table-row">
      <style:table-row-properties style:row-height="2.419cm"/>
    </style:style>
    <style:style style:name="ro6" style:family="table-row">
      <style:table-row-properties style:row-height="2.097cm"/>
    </style:style>
    <style:style style:name="ro7" style:family="table-row">
      <style:table-row-properties style:row-height="2.421cm"/>
    </style:style>
    <style:style style:name="ce1" style:family="table-cell">
      <loext:graphic-properties draw:fill="none" draw:textarea-vertical-align="top" fo:padding-top="0.127cm" fo:padding-bottom="0.127cm" fo:padding-left="0.187cm" fo:padding-right="0.187cm"/>
      <style:paragraph-properties fo:border="none"/>
    </style:style>
    <style:style style:name="P1" style:family="paragraph">
      <style:paragraph-properties fo:margin-left="0cm" fo:margin-right="0cm" fo:margin-top="0.141cm" fo:margin-bottom="0cm" fo:line-height="100%" fo:text-align="end"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18pt"/>
    </style:style>
    <style:style style:name="P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36pt"/>
    </style:style>
    <style:style style:name="P5" style:family="paragraph">
      <style:paragraph-properties fo:margin-left="0cm" fo:margin-right="0cm" fo:margin-top="0.106cm" fo:margin-bottom="0cm" fo:line-height="100%" fo:text-align="end"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3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none"/>
      <style:paragraph-properties fo:text-align="start"/>
      <style:text-properties fo:font-size="18pt"/>
    </style:style>
    <style:style style:name="P10"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11" style:family="paragraph">
      <style:paragraph-properties fo:margin-left="0cm" fo:margin-right="0cm" fo:margin-top="0cm" fo:margin-bottom="0cm" fo:line-height="83%" fo:text-align="center" fo:text-indent="0cm" style:writing-mode="lr-tb">
        <style:tab-stops>
          <style:tab-stop style:position="0cm"/>
        </style:tab-stops>
      </style:paragraph-properties>
    </style:style>
    <style:style style:name="P12" style:family="paragraph">
      <style:paragraph-properties fo:margin-left="0.917cm" fo:margin-right="0cm" fo:margin-top="0cm" fo:margin-bottom="0cm" fo:line-height="83%" fo:text-align="center" fo:text-indent="-0.704cm" style:writing-mode="lr-tb">
        <style:tab-stops>
          <style:tab-stop style:position="0cm"/>
        </style:tab-stops>
      </style:paragraph-properties>
    </style:style>
    <style:style style:name="P13" style:family="paragraph">
      <loext:graphic-properties draw:fill="solid" draw:fill-color="#073763"/>
      <style:paragraph-properties fo:text-align="start" style:font-independent-line-spacing="true"/>
      <style:text-properties fo:font-size="14pt"/>
    </style:style>
    <style:style style:name="P14" style:family="paragraph">
      <loext:graphic-properties draw:fill="solid" draw:fill-color="#cccccc"/>
      <style:paragraph-properties fo:text-align="start" style:font-independent-line-spacing="true"/>
      <style:text-properties fo:font-size="14pt"/>
    </style:style>
    <style:style style:name="P15" style:family="paragraph">
      <style:paragraph-properties fo:margin-left="0cm" fo:margin-right="0cm" fo:margin-top="0cm" fo:margin-bottom="0cm" fo:line-height="115%" fo:text-align="start" fo:text-indent="0cm" style:writing-mode="lr-tb"/>
    </style:style>
    <style:style style:name="P1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7"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1.27cm" fo:margin-right="0cm" fo:margin-top="0.494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83%" fo:text-align="start" fo:text-indent="0cm" style:writing-mode="lr-tb">
        <style:tab-stops>
          <style:tab-stop style:position="0cm"/>
        </style:tab-stops>
      </style:paragraph-properties>
    </style:style>
    <style:style style:name="P21" style:family="paragraph">
      <loext:graphic-properties draw:fill="solid" draw:fill-color="#ffffff"/>
      <style:paragraph-properties fo:text-align="start" style:font-independent-line-spacing="true"/>
      <style:text-properties fo:font-size="14pt"/>
    </style:style>
    <style:style style:name="P22"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23" style:family="paragraph">
      <loext:graphic-properties draw:fill="solid" draw:fill-color="#a64d79"/>
      <style:paragraph-properties fo:text-align="start" style:font-independent-line-spacing="true"/>
      <style:text-properties fo:font-size="14pt"/>
    </style:style>
    <style:style style:name="P24" style:family="paragraph">
      <loext:graphic-properties draw:fill="solid" draw:fill-color="#741b47"/>
      <style:paragraph-properties fo:text-align="start" style:font-independent-line-spacing="true"/>
      <style:text-properties fo:font-size="14pt"/>
    </style:style>
    <style:style style:name="P25" style:family="paragraph">
      <loext:graphic-properties draw:fill="solid" draw:fill-color="#ea9999"/>
      <style:paragraph-properties fo:text-align="start" style:font-independent-line-spacing="true"/>
      <style:text-properties fo:font-size="14pt"/>
    </style:style>
    <style:style style:name="P26" style:family="paragraph">
      <loext:graphic-properties draw:fill="solid" draw:fill-color="#666666"/>
      <style:paragraph-properties fo:text-align="start" style:font-independent-line-spacing="true"/>
      <style:text-properties fo:font-size="14pt"/>
    </style:style>
    <style:style style:name="P27" style:family="paragraph">
      <loext:graphic-properties draw:fill="solid" draw:fill-color="#c27ba0"/>
      <style:paragraph-properties fo:text-align="start" style:font-independent-line-spacing="true"/>
      <style:text-properties fo:font-size="14pt"/>
    </style:style>
    <style:style style:name="P28" style:family="paragraph">
      <style:paragraph-properties fo:margin-left="0cm" fo:margin-right="0cm" fo:margin-top="0.494cm" fo:margin-bottom="0cm" fo:line-height="115%" fo:text-align="start" fo:text-indent="0cm" style:writing-mode="lr-tb">
        <style:tab-stops>
          <style:tab-stop style:position="0cm"/>
        </style:tab-stops>
      </style:paragraph-properties>
    </style:style>
    <style:style style:name="P29" style:family="paragraph">
      <loext:graphic-properties draw:fill="solid" draw:fill-color="#0b5394"/>
      <style:paragraph-properties fo:text-align="start" style:font-independent-line-spacing="true"/>
      <style:text-properties fo:font-size="14pt"/>
    </style:style>
    <style:style style:name="P30" style:family="paragraph">
      <style:paragraph-properties fo:margin-left="1.199cm" fo:margin-right="0cm" fo:margin-top="0cm" fo:margin-bottom="0cm" fo:line-height="83%" fo:text-align="justify" fo:text-indent="-0.898cm" style:writing-mode="lr-tb">
        <style:tab-stops>
          <style:tab-stop style:position="0cm"/>
        </style:tab-stops>
      </style:paragraph-properties>
    </style:style>
    <style:style style:name="P31" style:family="paragraph">
      <loext:graphic-properties draw:fill="solid" draw:fill-color="#efefef"/>
      <style:paragraph-properties fo:text-align="start" style:font-independent-line-spacing="true"/>
      <style:text-properties fo:font-size="14pt"/>
    </style:style>
    <style:style style:name="P32" style:family="paragraph">
      <loext:graphic-properties draw:fill="solid" draw:fill-color="#6fa8dc"/>
      <style:paragraph-properties fo:text-align="start" style:font-independent-line-spacing="true"/>
      <style:text-properties fo:font-size="14pt"/>
    </style:style>
    <style:style style:name="P33" style:family="paragraph">
      <style:paragraph-properties fo:margin-left="0cm" fo:margin-right="0cm" fo:margin-top="0cm" fo:margin-bottom="0cm" fo:line-height="100%" fo:text-align="start" fo:text-indent="0cm" style:writing-mode="lr-tb"/>
    </style:style>
    <style:style style:name="P34" style:family="paragraph">
      <loext:graphic-properties draw:fill="solid" draw:fill-color="#cfe2f3"/>
      <style:paragraph-properties fo:text-align="start" style:font-independent-line-spacing="true"/>
      <style:text-properties fo:font-size="14pt"/>
    </style:style>
    <style:style style:name="P35" style:family="paragraph">
      <loext:graphic-properties draw:fill="solid" draw:fill-color="#9fc5e8"/>
      <style:paragraph-properties fo:text-align="start" style:font-independent-line-spacing="true"/>
      <style:text-properties fo:font-size="14pt"/>
    </style:style>
    <style:style style:name="P36" style:family="paragraph">
      <style:paragraph-properties fo:margin-left="0cm" fo:margin-right="0cm" fo:margin-top="0cm" fo:margin-bottom="0cm" fo:line-height="83%" fo:text-align="justify" fo:text-indent="0cm" style:writing-mode="lr-tb"/>
    </style:style>
    <style:style style:name="P37" style:family="paragraph">
      <style:paragraph-properties fo:margin-left="0cm" fo:margin-right="0cm" fo:margin-top="0cm" fo:margin-bottom="0cm" fo:line-height="93%" fo:text-align="center" fo:text-indent="0cm" style:writing-mode="lr-tb">
        <style:tab-stops>
          <style:tab-stop style:position="0cm"/>
        </style:tab-stops>
      </style:paragraph-properties>
    </style:style>
    <style:style style:name="P38" style:family="paragraph">
      <loext:graphic-properties draw:fill="solid" draw:fill-color="#20124d"/>
      <style:paragraph-properties fo:text-align="start" style:font-independent-line-spacing="true"/>
      <style:text-properties fo:font-size="14pt"/>
    </style:style>
    <style:style style:name="P39" style:family="paragraph">
      <loext:graphic-properties draw:fill="solid" draw:fill-color="#351c75"/>
      <style:paragraph-properties fo:text-align="start" style:font-independent-line-spacing="true"/>
      <style:text-properties fo:font-size="14pt"/>
    </style:style>
    <style:style style:name="P40" style:family="paragraph">
      <loext:graphic-properties draw:fill="solid" draw:fill-color="#674ea7"/>
      <style:paragraph-properties fo:text-align="start" style:font-independent-line-spacing="true"/>
      <style:text-properties fo:font-size="14pt"/>
    </style:style>
    <style:style style:name="P41" style:family="paragraph">
      <loext:graphic-properties draw:fill="solid" draw:fill-color="#b4a7d6"/>
      <style:paragraph-properties fo:text-align="start" style:font-independent-line-spacing="true"/>
      <style:text-properties fo:font-size="14pt"/>
    </style:style>
    <style:style style:name="P42" style:family="paragraph">
      <loext:graphic-properties draw:fill="solid" draw:fill-color="#d9d2e9"/>
      <style:paragraph-properties fo:text-align="start" style:font-independent-line-spacing="true"/>
      <style:text-properties fo:font-size="14pt"/>
    </style:style>
    <style:style style:name="P43" style:family="paragraph">
      <style:paragraph-properties fo:margin-left="0cm" fo:margin-right="0cm" fo:margin-top="0.494cm" fo:margin-bottom="0cm" fo:line-height="100%" fo:text-align="start" fo:text-indent="0cm" style:writing-mode="lr-tb">
        <style:tab-stops>
          <style:tab-stop style:position="0cm"/>
        </style:tab-stops>
      </style:paragraph-properties>
    </style:style>
    <style:style style:name="P44" style:family="paragraph">
      <style:paragraph-properties fo:margin-left="0cm" fo:margin-right="0cm" fo:margin-top="0cm" fo:margin-bottom="0cm" fo:line-height="93%" fo:text-align="start" fo:text-indent="0cm" style:writing-mode="lr-tb">
        <style:tab-stops>
          <style:tab-stop style:position="0cm"/>
        </style:tab-stops>
      </style:paragraph-properties>
    </style:style>
    <style:style style:name="P45" style:family="paragraph">
      <style:paragraph-properties fo:margin-left="0cm" fo:margin-right="0cm" fo:margin-top="0cm" fo:margin-bottom="0cm" fo:line-height="83%" fo:text-align="justify" fo:text-indent="0cm" style:writing-mode="lr-tb">
        <style:tab-stops>
          <style:tab-stop style:position="0cm"/>
        </style:tab-stops>
      </style:paragraph-properties>
    </style:style>
    <style:style style:name="P46"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47" style:family="paragraph">
      <style:paragraph-properties fo:margin-left="1.27cm" fo:margin-right="0cm" fo:margin-top="0cm" fo:margin-bottom="0cm" fo:line-height="115%" fo:text-align="justify" fo:text-indent="0cm" style:writing-mode="lr-tb">
        <style:tab-stops>
          <style:tab-stop style:position="0cm"/>
        </style:tab-stops>
      </style:paragraph-properties>
    </style:style>
    <style:style style:name="P48"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49" style:family="paragraph">
      <loext:graphic-properties draw:fill="solid" draw:fill-color="#c23669"/>
      <style:paragraph-properties fo:text-align="start" style:font-independent-line-spacing="true"/>
      <style:text-properties fo:font-size="14pt"/>
    </style:style>
    <style:style style:name="P50"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5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52"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53" style:family="paragraph">
      <loext:graphic-properties draw:fill="solid" draw:fill-color="#4d4948"/>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2" style:family="text">
      <style:text-properties fo:font-variant="normal" fo:text-transform="none" fo:color="#003f41" style:text-line-through-style="none" style:text-line-through-type="none" style:text-position="0% 100%" style:font-name="Open Sans" fo:font-size="36pt" fo:letter-spacing="normal" fo:font-style="normal" style:text-underline-style="none" fo:font-weight="bold" style:font-name-asian="Open Sans" style:font-size-asian="36pt" style:font-style-asian="normal" style:font-weight-asian="bold" style:font-name-complex="Open Sans"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 style:family="text">
      <style:text-properties fo:font-variant="normal" fo:text-transform="none" fo:color="#1f497d" style:text-line-through-style="none" style:text-line-through-type="none" style:text-position="0% 100%" style:font-name="Open Sans"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rbel" fo:font-size="7pt" fo:letter-spacing="normal" fo:font-style="normal" style:text-underline-style="none" fo:font-weight="normal" style:font-name-asian="Corbel" style:font-size-asian="7pt" style:font-style-asian="normal" style:font-weight-asian="normal" style:font-name-complex="Corbel" style:font-size-complex="7pt" style:font-style-complex="normal" style:font-weight-complex="normal"/>
    </style:style>
    <style:style style:name="T6" style:family="text">
      <style:text-properties fo:font-variant="normal" fo:text-transform="none" fo:color="#0000ff" style:text-line-through-style="none" style:text-line-through-type="none" style:text-position="0% 100%" style:font-name="Corbel" fo:font-size="7pt" fo:letter-spacing="normal" fo:font-style="normal" style:text-underline-style="solid" style:text-underline-width="auto" style:text-underline-color="font-color" fo:font-weight="normal" style:font-name-asian="Corbel" style:font-size-asian="7pt" style:font-style-asian="normal" style:font-weight-asian="normal" style:font-name-complex="Corbel" style:font-size-complex="7pt" style:font-style-complex="normal" style:font-weight-complex="normal"/>
    </style:style>
    <style:style style:name="T7" style:family="text">
      <style:text-properties fo:font-variant="normal" fo:text-transform="none" fo:color="#003f41" style:text-line-through-style="none" style:text-line-through-type="none" style:text-position="0% 100%" style:font-name="Arial" fo:font-size="43pt" fo:letter-spacing="normal" fo:font-style="normal" style:text-underline-style="none" fo:font-weight="bold" style:font-name-asian="Arial" style:font-size-asian="43pt" style:font-style-asian="normal" style:font-weight-asian="bold" style:font-name-complex="Arial" style:font-size-complex="43pt" style:font-style-complex="normal" style:font-weight-complex="bold"/>
    </style:style>
    <style:style style:name="T8" style:family="text">
      <style:text-properties fo:font-variant="normal" fo:text-transform="none" fo:color="#4d4948" style:text-line-through-style="none" style:text-line-through-type="none" style:text-position="0% 100%" style:font-name="Corbel" fo:font-size="60pt" fo:letter-spacing="normal" fo:font-style="normal" style:text-underline-style="none" fo:font-weight="normal" style:font-name-asian="Corbel" style:font-size-asian="60pt" style:font-style-asian="normal" style:font-weight-asian="normal" style:font-name-complex="Corbel" style:font-size-complex="60pt" style:font-style-complex="normal" style:font-weight-complex="normal"/>
    </style:style>
    <style:style style:name="T9" style:family="text">
      <style:text-properties fo:font-variant="normal" fo:text-transform="none" fo:color="#003f41"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10" style:family="text">
      <style:text-properties fo:font-variant="normal" fo:text-transform="none" fo:color="#ffffff"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font-variant="normal" fo:text-transform="none" fo:color="#0000ff"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15" style:family="text">
      <style:text-properties fo:font-variant="normal" fo:text-transform="none" fo:color="#ffffff"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17" style:family="text">
      <style:text-properties fo:font-variant="normal" fo:text-transform="none" fo:color="#0000ff" style:text-line-through-style="none" style:text-line-through-type="none" style:text-position="0% 100%" style:font-name="Arial" fo:font-size="13pt" fo:letter-spacing="normal" fo:font-style="normal" style:text-underline-style="solid" style:text-underline-width="auto" style:text-underline-color="font-color" fo:font-weight="bold" style:font-name-asian="Arial" style:font-size-asian="13pt" style:font-style-asian="normal" style:font-weight-asian="bold" style:font-name-complex="Arial" style:font-size-complex="13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20" style:family="text">
      <style:text-properties fo:font-variant="normal" fo:text-transform="none" fo:color="#0000ff" style:text-line-through-style="none" style:text-line-through-type="none" style:text-position="0% 100%" style:font-name="Arial" fo:font-size="16pt" fo:letter-spacing="normal" fo:font-style="normal" style:text-underline-style="solid" style:text-underline-width="auto" style:text-underline-color="font-color" fo:font-weight="bold" style:font-name-asian="Arial" style:font-size-asian="16pt" style:font-style-asian="normal" style:font-weight-asian="bold" style:font-name-complex="Arial" style:font-size-complex="16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bold" style:font-name-asian="Arial" style:font-size-asian="17pt" style:font-style-asian="normal" style:font-weight-asian="bold" style:font-name-complex="Arial" style:font-size-complex="17pt" style:font-style-complex="normal" style:font-weight-complex="bold"/>
    </style:style>
    <style:style style:name="T22" style:family="text">
      <style:text-properties fo:font-variant="normal" fo:text-transform="none" fo:color="#202122"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fo:font-variant="normal" fo:text-transform="none" fo:color="#202122"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5" style:family="text">
      <style:text-properties fo:font-variant="normal" fo:text-transform="none" fo:color="#049ccf"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7" style:family="text">
      <style:text-properties fo:font-variant="normal" fo:text-transform="none" fo:color="#ffffff"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28" style:family="text">
      <style:text-properties fo:font-variant="normal" fo:text-transform="none" fo:color="#049cc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9" style:family="text">
      <style:text-properties fo:font-variant="normal" fo:text-transform="none" fo:color="#0000ff" style:text-line-through-style="none" style:text-line-through-type="none" style:text-position="0% 100%" style:font-name="Arial" fo:font-size="12pt" fo:letter-spacing="normal"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30" style:family="text">
      <style:text-properties fo:font-variant="normal" fo:text-transform="none" fo:color="#ffffff"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32" style:family="text">
      <style:text-properties fo:font-variant="normal" fo:text-transform="none" fo:color="#ffffff" style:text-line-through-style="none" style:text-line-through-type="none" style:text-position="0% 100%" style:font-name="Arial" fo:font-size="27pt" fo:letter-spacing="normal" fo:font-style="normal" style:text-underline-style="none" fo:font-weight="bold" style:font-name-asian="Arial" style:font-size-asian="27pt" style:font-style-asian="normal" style:font-weight-asian="bold" style:font-name-complex="Arial" style:font-size-complex="27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4" style:family="text">
      <style:text-properties fo:font-variant="normal" fo:text-transform="none" fo:color="#0000ff" style:text-line-through-style="none" style:text-line-through-type="none" style:text-position="0% 100%" style:font-name="Arial" fo:font-size="10pt" fo:letter-spacing="normal" fo:font-style="normal" style:text-underline-style="solid" style:text-underline-width="auto" style:text-underline-color="font-color" fo:font-weight="bold" style:font-name-asian="Arial" style:font-size-asian="10pt" style:font-style-asian="normal" style:font-weight-asian="bold" style:font-name-complex="Arial" style:font-size-complex="10pt" style:font-style-complex="normal" style:font-weight-complex="bold"/>
    </style:style>
    <style:style style:name="T35" style:family="text">
      <style:text-properties fo:font-variant="normal" fo:text-transform="none" fo:color="#000000" style:text-line-through-style="none" style:text-line-through-type="none" style:text-position="0% 100%" style:font-name="Arial" fo:font-size="29pt" fo:letter-spacing="normal" fo:font-style="normal" style:text-underline-style="none" fo:font-weight="bold" style:font-name-asian="Arial" style:font-size-asian="29pt" style:font-style-asian="normal" style:font-weight-asian="bold" style:font-name-complex="Arial" style:font-size-complex="29pt" style:font-style-complex="normal" style:font-weight-complex="bold"/>
    </style:style>
    <style:style style:name="T36"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 fo:font-size="27pt" fo:letter-spacing="normal" fo:font-style="normal" style:text-underline-style="none" fo:font-weight="bold" style:font-name-asian="Arial" style:font-size-asian="27pt" style:font-style-asian="normal" style:font-weight-asian="bold" style:font-name-complex="Arial" style:font-size-complex="27pt" style:font-style-complex="normal" style:font-weight-complex="bold"/>
    </style:style>
    <style:style style:name="T38" style:family="text">
      <style:text-properties fo:font-variant="normal" fo:text-transform="none" fo:color="#ffffff" style:text-line-through-style="none" style:text-line-through-type="none" style:text-position="0% 100%" style:font-name="Arial" fo:font-size="33pt" fo:letter-spacing="normal" fo:font-style="normal" style:text-underline-style="none" fo:font-weight="bold" style:font-name-asian="Arial" style:font-size-asian="33pt" style:font-style-asian="normal" style:font-weight-asian="bold" style:font-name-complex="Arial" style:font-size-complex="33pt" style:font-style-complex="normal" style:font-weight-complex="bold"/>
    </style:style>
    <style:style style:name="T39" style:family="text">
      <style:text-properties fo:font-variant="normal" fo:text-transform="none" fo:color="#003f41" style:text-line-through-style="none" style:text-line-through-type="none" style:text-position="0% 100%" style:font-name="Arial" fo:font-size="25pt" fo:letter-spacing="normal" fo:font-style="normal" style:text-underline-style="none" fo:font-weight="bold" style:font-name-asian="Arial" style:font-size-asian="25pt" style:font-style-asian="normal" style:font-weight-asian="bold" style:font-name-complex="Arial" style:font-size-complex="25pt" style:font-style-complex="normal" style:font-weight-complex="bold"/>
    </style:style>
    <style:style style:name="T40" style:family="text">
      <style:text-properties fo:font-variant="normal" fo:text-transform="none" fo:color="#003f41"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1"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42" style:family="text">
      <style:text-properties fo:font-variant="normal" fo:text-transform="none" fo:color="#0000ff" style:text-line-through-style="none" style:text-line-through-type="none" style:text-position="0% 100%" style:font-name="Arial" fo:font-size="11pt" fo:letter-spacing="normal"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43"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46"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7" style:family="text">
      <style:text-properties fo:font-variant="normal" fo:text-transform="none" fo:color="#0000ff" style:text-line-through-style="none" style:text-line-through-type="none" style:text-position="0% 100%" style:font-name="Arial" fo:font-size="9pt" fo:letter-spacing="normal" fo:font-style="normal" style:text-underline-style="solid" style:text-underline-width="auto" style:text-underline-color="font-color" fo:font-weight="bold" style:font-name-asian="Arial" style:font-size-asian="9pt" style:font-style-asian="normal" style:font-weight-asian="bold" style:font-name-complex="Arial" style:font-size-complex="9pt" style:font-style-complex="normal" style:font-weight-complex="bold"/>
    </style:style>
    <style:style style:name="T48"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0" style:family="text">
      <style:text-properties fo:font-variant="normal" fo:text-transform="none" fo:color="#049ccf"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1" style:family="text">
      <style:text-properties fo:font-variant="normal" fo:text-transform="none" fo:color="#049ccf"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2" style:family="text">
      <style:text-properties fo:font-variant="normal" fo:text-transform="none" fo:color="#0000ff" style:text-line-through-style="none" style:text-line-through-type="none" style:text-position="0% 100%" style:font-name="Arial" fo:font-size="14pt" fo:letter-spacing="normal" fo:font-style="normal" style:text-underline-style="solid" style:text-underline-width="auto" style:text-underline-color="font-color" fo:font-weight="bold" style:font-name-asian="Arial" style:font-size-asian="14pt" style:font-style-asian="normal" style:font-weight-asian="bold" style:font-name-complex="Arial" style:font-size-complex="14pt" style:font-style-complex="normal" style:font-weight-complex="bold"/>
    </style:style>
    <style:style style:name="T53" style:family="text">
      <style:text-properties fo:font-variant="normal" fo:text-transform="none" fo:color="#023452" style:text-line-through-style="none" style:text-line-through-type="none" style:text-position="0% 100%" style:font-name="Open Sans" fo:font-size="24pt" fo:letter-spacing="normal" fo:font-style="normal" style:text-underline-style="none" fo:font-weight="bold" style:font-name-asian="Open Sans" style:font-size-asian="24pt" style:font-style-asian="normal" style:font-weight-asian="bold" style:font-name-complex="Open Sans" style:font-size-complex="24pt" style:font-style-complex="normal" style:font-weight-complex="bold"/>
    </style:style>
    <style:style style:name="T54" style:family="text">
      <style:text-properties fo:font-variant="normal" fo:text-transform="none" fo:color="#ffffff" style:text-line-through-style="none" style:text-line-through-type="none" style:text-position="0% 100%" style:font-name="Arial" fo:font-size="27pt" fo:letter-spacing="normal" fo:font-style="normal" style:text-underline-style="none" fo:font-weight="normal" style:font-name-asian="Arial" style:font-size-asian="27pt" style:font-style-asian="normal" style:font-weight-asian="normal" style:font-name-complex="Arial" style:font-size-complex="27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56"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bold" style:font-name-asian="Arial" style:font-size-asian="6pt" style:font-style-asian="normal" style:font-weight-asian="bold" style:font-name-complex="Arial" style:font-size-complex="6pt" style:font-style-complex="normal" style:font-weight-complex="bold"/>
    </style:style>
    <style:style style:name="T57"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58" style:family="text">
      <style:text-properties fo:font-variant="normal" fo:text-transform="none" fo:color="#0000ff" style:text-line-through-style="none" style:text-line-through-type="none" style:text-position="0% 100%" style:font-name="Arial" fo:font-size="6pt" fo:letter-spacing="normal" fo:font-style="normal" style:text-underline-style="solid" style:text-underline-width="auto" style:text-underline-color="font-color" fo:font-weight="bold" style:font-name-asian="Arial" style:font-size-asian="6pt" style:font-style-asian="normal" style:font-weight-asian="bold" style:font-name-complex="Arial" style:font-size-complex="6pt" style:font-style-complex="normal" style:font-weight-complex="bold"/>
    </style:style>
    <style:style style:name="T59" style:family="text">
      <style:text-properties fo:font-variant="normal" fo:text-transform="none" fo:color="#049ccf" style:text-line-through-style="none" style:text-line-through-type="none" style:text-position="0% 100%" style:font-name="Arial" fo:font-size="6pt" fo:letter-spacing="normal" fo:font-style="normal" style:text-underline-style="none" fo:font-weight="bold" style:font-name-asian="Arial" style:font-size-asian="6pt" style:font-style-asian="normal" style:font-weight-asian="bold" style:font-name-complex="Arial" style:font-size-complex="6pt" style:font-style-complex="normal" style:font-weight-complex="bold"/>
    </style:style>
    <style:style style:name="T60"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bold" style:font-name-asian="Arial" style:font-size-asian="7pt" style:font-style-asian="normal" style:font-weight-asian="bold" style:font-name-complex="Arial" style:font-size-complex="7pt" style:font-style-complex="normal" style:font-weight-complex="bold"/>
    </style:style>
    <style:style style:name="T62"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name-asian="Arial" style:font-size-asian="7pt" style:font-style-asian="normal" style:font-weight-asian="normal" style:font-name-complex="Arial" style:font-size-complex="7pt" style:font-style-complex="normal" style:font-weight-complex="normal"/>
    </style:style>
    <style:style style:name="T63" style:family="text">
      <style:text-properties fo:font-variant="normal" fo:text-transform="none" fo:color="#0000ff" style:text-line-through-style="none" style:text-line-through-type="none" style:text-position="0% 100%" style:font-name="Arial" fo:font-size="7pt" fo:letter-spacing="normal" fo:font-style="normal" style:text-underline-style="solid" style:text-underline-width="auto" style:text-underline-color="font-color" fo:font-weight="bold" style:font-name-asian="Arial" style:font-size-asian="7pt" style:font-style-asian="normal" style:font-weight-asian="bold" style:font-name-complex="Arial" style:font-size-complex="7pt" style:font-style-complex="normal" style:font-weight-complex="bold"/>
    </style:style>
    <style:style style:name="T64" style:family="text">
      <style:text-properties fo:font-variant="normal" fo:text-transform="none" fo:color="#049ccf" style:text-line-through-style="none" style:text-line-through-type="none" style:text-position="0% 100%" style:font-name="Arial" fo:font-size="7pt" fo:letter-spacing="normal" fo:font-style="normal" style:text-underline-style="none" fo:font-weight="bold" style:font-name-asian="Arial" style:font-size-asian="7pt" style:font-style-asian="normal" style:font-weight-asian="bold" style:font-name-complex="Arial" style:font-size-complex="7pt" style:font-style-complex="normal" style:font-weight-complex="bold"/>
    </style:style>
    <style:style style:name="T65" style:family="text">
      <style:text-properties fo:font-variant="normal" fo:text-transform="none" fo:color="#4d4948"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66" style:family="text">
      <style:text-properties fo:font-variant="normal" fo:text-transform="none" fo:color="#4d4948" style:text-line-through-style="none" style:text-line-through-type="none" style:text-position="0% 100%" style:font-name="Arial" fo:font-size="19pt" fo:letter-spacing="normal" fo:font-style="normal" style:text-underline-style="none" fo:font-weight="bold" style:font-name-asian="Arial" style:font-size-asian="19pt" style:font-style-asian="normal" style:font-weight-asian="bold" style:font-name-complex="Arial" style:font-size-complex="19pt" style:font-style-complex="normal" style:font-weight-complex="bold"/>
    </style:style>
    <style:style style:name="T67"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68" style:family="text">
      <style:text-properties fo:font-variant="normal" fo:text-transform="none" fo:color="#ffffff" style:text-line-through-style="none" style:text-line-through-type="none" style:text-position="0% 100%" style:font-name="Arial" fo:font-size="21pt" fo:letter-spacing="normal" fo:font-style="normal" style:text-underline-style="none" fo:font-weight="bold" style:font-name-asian="Arial" style:font-size-asian="21pt" style:font-style-asian="normal" style:font-weight-asian="bold" style:font-name-complex="Arial" style:font-size-complex="21pt" style:font-style-complex="normal" style:font-weight-complex="bold"/>
    </style:style>
    <style:style style:name="T69" style:family="text">
      <style:text-properties fo:font-variant="normal" fo:text-transform="none" fo:color="#ffffff"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72" style:family="text">
      <style:text-properties fo:font-variant="normal" fo:text-transform="none" fo:color="#4d4948"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73" style:family="text">
      <style:text-properties fo:font-variant="normal" fo:text-transform="none" fo:color="#4d4948"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4" style:family="text">
      <style:text-properties fo:font-variant="normal" fo:text-transform="none" fo:color="#005472" style:text-line-through-style="none" style:text-line-through-type="none" style:text-position="0% 100%" style:font-name="Arial" fo:font-size="34pt" fo:letter-spacing="normal" fo:font-style="normal" style:text-underline-style="none" fo:font-weight="bold" style:font-name-asian="Arial" style:font-size-asian="34pt" style:font-style-asian="normal" style:font-weight-asian="bold" style:font-name-complex="Arial" style:font-size-complex="34pt" style:font-style-complex="normal" style:font-weight-complex="bold"/>
    </style:style>
    <style:style style:name="T75" style:family="text">
      <style:text-properties fo:font-variant="normal" fo:text-transform="none" fo:color="#005472" style:text-line-through-style="none" style:text-line-through-type="none" style:text-position="0% 100%" style:font-name="Corbel" fo:font-size="30pt" fo:letter-spacing="normal" fo:font-style="normal" style:text-underline-style="none" fo:font-weight="bold" style:font-name-asian="Corbel" style:font-size-asian="30pt" style:font-style-asian="normal" style:font-weight-asian="bold" style:font-name-complex="Corbel" style:font-size-complex="30pt" style:font-style-complex="normal" style:font-weight-complex="bold"/>
    </style:style>
    <style:style style:name="T76" style:family="text">
      <style:text-properties fo:font-variant="normal" fo:text-transform="none" fo:color="#000000" style:text-line-through-style="none" style:text-line-through-type="none" style:text-position="0% 100%" style:font-name="Corbel" fo:font-size="14pt" fo:letter-spacing="normal" fo:font-style="normal" style:text-underline-style="none" fo:font-weight="bold" style:font-name-asian="Corbel" style:font-size-asian="14pt" style:font-style-asian="normal" style:font-weight-asian="bold" style:font-name-complex="Corbel" style:font-size-complex="14pt" style:font-style-complex="normal" style:font-weight-complex="bold"/>
    </style:style>
    <style:style style:name="T77" style:family="text">
      <style:text-properties fo:font-variant="normal" fo:text-transform="none" fo:color="#000000"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78" style:family="text">
      <style:text-properties fo:font-variant="normal" fo:text-transform="none" fo:color="#0000ff" style:text-line-through-style="none" style:text-line-through-type="none" style:text-position="0% 100%" style:font-name="Arial" fo:font-size="9pt" fo:letter-spacing="normal" fo:font-style="normal" style:text-underline-style="solid" style:text-underline-width="auto" style:text-underline-color="font-color" fo:font-weight="normal" style:font-name-asian="Arial" style:font-size-asian="9pt" style:font-style-asian="normal" style:font-weight-asian="normal" style:font-name-complex="Arial" style:font-size-complex="9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80" style:family="text">
      <style:text-properties fo:font-variant="normal" fo:text-transform="none" fo:color="#0000ff"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81" style:family="text">
      <style:text-properties fo:font-variant="normal" fo:text-transform="none" fo:color="#0000ff" style:text-line-through-style="none" style:text-line-through-type="none" style:text-position="0% 100%" style:font-name="Arial" fo:font-size="17pt" fo:letter-spacing="normal" fo:font-style="normal" style:text-underline-style="solid" style:text-underline-width="auto" style:text-underline-color="font-color" fo:font-weight="normal" style:font-name-asian="Arial" style:font-size-asian="17pt" style:font-style-asian="normal" style:font-weight-asian="normal" style:font-name-complex="Arial" style:font-size-complex="17pt" style:font-style-complex="normal" style:font-weight-complex="normal"/>
    </style:style>
    <style:style style:name="T82" style:family="text">
      <style:text-properties fo:font-variant="normal" fo:text-transform="none" fo:color="#2a2e3d" style:text-line-through-style="none" style:text-line-through-type="none" style:text-position="0% 100%" style:font-name="Corbel" fo:font-size="15pt" fo:letter-spacing="normal" fo:font-style="normal" style:text-underline-style="none" fo:font-weight="normal" style:font-name-asian="Corbel" style:font-size-asian="15pt" style:font-style-asian="normal" style:font-weight-asian="normal" style:font-name-complex="Corbel" style:font-size-complex="15pt" style:font-style-complex="normal" style:font-weight-complex="normal"/>
    </style:style>
    <style:style style:name="T83" style:family="text">
      <style:text-properties fo:font-variant="normal" fo:text-transform="none" fo:color="#c23669" style:text-line-through-style="none" style:text-line-through-type="none" style:text-position="0% 100%" style:font-name="Corbel" fo:font-size="15pt" fo:letter-spacing="normal" fo:font-style="normal" style:text-underline-style="none" fo:font-weight="bold" style:font-name-asian="Corbel" style:font-size-asian="15pt" style:font-style-asian="normal" style:font-weight-asian="bold" style:font-name-complex="Corbel" style:font-size-complex="15pt" style:font-style-complex="normal" style:font-weight-complex="bold"/>
    </style:style>
    <style:style style:name="T84" style:family="text">
      <style:text-properties fo:font-variant="normal" fo:text-transform="none" fo:color="#f3f0f1"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85" style:family="text">
      <style:text-properties fo:font-variant="normal" fo:text-transform="none" fo:color="#444444" style:text-line-through-style="none" style:text-line-through-type="none" style:text-position="0% 100%" style:font-name="Arial" fo:font-size="23pt" fo:letter-spacing="normal" fo:font-style="normal" style:text-underline-style="none" fo:font-weight="bold" style:font-name-asian="Arial" style:font-size-asian="23pt" style:font-style-asian="normal" style:font-weight-asian="bold" style:font-name-complex="Arial" style:font-size-complex="23pt" style:font-style-complex="normal" style:font-weight-complex="bold"/>
    </style:style>
    <style:style style:name="T86" style:family="text">
      <style:text-properties fo:font-variant="normal" fo:text-transform="none" fo:color="#444444"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87" style:family="text">
      <style:text-properties fo:font-variant="normal" fo:text-transform="none" fo:color="#0000ff" style:text-line-through-style="none" style:text-line-through-type="none" style:text-position="0% 100%" style:font-name="Exo 2" fo:font-size="14pt" fo:letter-spacing="normal" fo:font-style="normal" style:text-underline-style="solid" style:text-underline-width="auto" style:text-underline-color="font-color" fo:font-weight="bold" style:font-name-asian="Exo 2" style:font-size-asian="14pt" style:font-style-asian="normal" style:font-weight-asian="bold" style:font-name-complex="Exo 2" style:font-size-complex="14pt" style:font-style-complex="normal" style:font-weight-complex="bold"/>
    </style:style>
    <style:style style:name="T88" style:family="text">
      <style:text-properties fo:font-variant="normal" fo:text-transform="none" fo:color="#172b4b" style:text-line-through-style="none" style:text-line-through-type="none" style:text-position="0% 100%" style:font-name="Exo 2" fo:font-size="14pt" fo:letter-spacing="normal" fo:font-style="normal" style:text-underline-style="none" fo:font-weight="bold" style:font-name-asian="Exo 2" style:font-size-asian="14pt" style:font-style-asian="normal" style:font-weight-asian="bold" style:font-name-complex="Exo 2" style:font-size-complex="14pt" style:font-style-complex="normal" style:font-weight-complex="bold"/>
    </style:style>
    <style:style style:name="T89" style:family="text">
      <style:text-properties fo:font-variant="normal" fo:text-transform="none" fo:color="#0000ff" style:text-line-through-style="none" style:text-line-through-type="none" style:text-position="0% 100%" style:font-name="Exo 2" fo:font-size="18pt" fo:letter-spacing="normal" fo:font-style="normal" style:text-underline-style="solid" style:text-underline-width="auto" style:text-underline-color="font-color" fo:font-weight="bold" style:font-name-asian="Exo 2" style:font-size-asian="18pt" style:font-style-asian="normal" style:font-weight-asian="bold" style:font-name-complex="Exo 2" style:font-size-complex="18pt" style:font-style-complex="normal" style:font-weight-complex="bold"/>
    </style:style>
    <style:style style:name="T90" style:family="text">
      <style:text-properties fo:font-variant="normal" fo:text-transform="none" fo:color="#172b4b" style:text-line-through-style="none" style:text-line-through-type="none" style:text-position="0% 100%" style:font-name="Exo 2" fo:font-size="18pt" fo:letter-spacing="normal" fo:font-style="normal" style:text-underline-style="none" fo:font-weight="bold" style:font-name-asian="Exo 2" style:font-size-asian="18pt" style:font-style-asian="normal" style:font-weight-asian="bold" style:font-name-complex="Exo 2" style:font-size-complex="18pt" style:font-style-complex="normal" style:font-weight-complex="bold"/>
    </style:style>
    <style:style style:name="T91" style:family="text">
      <style:text-properties fo:font-variant="normal" fo:text-transform="none" fo:color="#c23669" style:text-line-through-style="none" style:text-line-through-type="none" style:text-position="0% 100%" style:font-name="Exo 2" fo:font-size="24pt" fo:letter-spacing="normal" fo:font-style="normal" style:text-underline-style="none" fo:font-weight="bold" style:font-name-asian="Exo 2" style:font-size-asian="24pt" style:font-style-asian="normal" style:font-weight-asian="bold" style:font-name-complex="Exo 2" style:font-size-complex="24pt" style:font-style-complex="normal" style:font-weight-complex="bold"/>
    </style:style>
    <style:style style:name="T92"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93" style:family="text">
      <style:text-properties fo:font-variant="normal" fo:text-transform="none" fo:color="#4d4948"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94" style:family="text">
      <style:text-properties fo:font-variant="normal" fo:text-transform="none" fo:color="#003f41" style:text-line-through-style="none" style:text-line-through-type="none" style:text-position="0% 100%" style:font-name="Open Sans" fo:font-size="18pt" fo:letter-spacing="normal" fo:font-style="italic" style:text-underline-style="none" fo:font-weight="normal" style:font-name-asian="Open Sans" style:font-size-asian="18pt" style:font-style-asian="italic" style:font-weight-asian="normal" style:font-name-complex="Open Sans" style:font-size-complex="18pt" style:font-style-complex="italic" style:font-weight-complex="normal"/>
    </style:style>
    <style:style style:name="T95" style:family="text">
      <style:text-properties fo:font-variant="normal" fo:text-transform="none" fo:color="#000000"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T96" style:family="text">
      <style:text-properties fo:font-variant="normal" fo:text-transform="none" fo:color="#0000ff" style:text-line-through-style="none" style:text-line-through-type="none" style:text-position="0% 100%" style:font-name="Open Sans" fo:font-size="10pt" fo:letter-spacing="normal" fo:font-style="normal" style:text-underline-style="solid" style:text-underline-width="auto" style:text-underline-color="font-color" fo:font-weight="normal" style:font-name-asian="Open Sans" style:font-size-asian="10pt" style:font-style-asian="normal" style:font-weight-asian="normal" style:font-name-complex="Open Sans" style:font-size-complex="1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3cm" text:min-label-width="0.827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25cm" text:min-label-width="0.84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9cm" text:min-label-width="0.95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9cm" text:min-label-width="0.951cm"/>
        <style:text-properties style:font-name="Arial" fo:color="#000000" fo:font-size="100%"/>
      </text:list-level-style-bullet>
      <text:list-level-style-bullet text:level="2" text:bullet-char="◆">
        <style:list-level-properties text:space-before="2.859cm" text:min-label-width="0.951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37cm" text:min-label-width="0.93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37cm" text:min-label-width="0.93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55cm" text:min-label-width="0.91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9cm" text:min-label-width="0.8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78cm" text:min-label-width="0.79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1.625cm" text:min-label-width="0.91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443cm" text:min-label-width="0.82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9cm" text:min-label-width="0.88cm"/>
        <style:text-properties style:font-name="Arial" fo:color="#000000" fo:font-size="100%"/>
      </text:list-level-style-bullet>
      <text:list-level-style-bullet text:level="2" text:bullet-char="◆">
        <style:list-level-properties text:space-before="2.93cm" text:min-label-width="0.88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355cm" text:min-label-width="0.915cm"/>
        <style:text-properties style:font-name="Arial" fo:color="#000000" fo:font-size="100%"/>
      </text:list-level-style-bullet>
      <text:list-level-style-bullet text:level="2" text:bullet-char="◆">
        <style:list-level-properties text:space-before="1.72cm" text:min-label-width="0.78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355cm" text:min-label-width="0.91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531cm" text:min-label-width="0.739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514cm" text:min-label-width="0.75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ELIXIR">
        <draw:frame draw:name="Google Shape;398;p93" presentation:style-name="pr1" draw:text-style-name="P2" draw:layer="layout" svg:width="11.94cm" svg:height="1.536cm" svg:x="12.433cm" svg:y="8.366cm" presentation:class="subtitle" presentation:user-transformed="true">
          <draw:text-box>
            <text:p text:style-name="P1"><text:span text:style-name="T1">Korbinian Bösl</text:span></text:p>
          </draw:text-box>
        </draw:frame>
        <draw:frame draw:name="Google Shape;399;p93" presentation:style-name="pr2" draw:text-style-name="P4" draw:layer="layout" svg:width="14.949cm" svg:height="5.076cm" svg:x="9.966cm" svg:y="0.55cm" presentation:class="title" presentation:user-transformed="true">
          <draw:text-box>
            <text:p text:style-name="P3"><text:span text:style-name="T2">Key Legal Requirements</text:span><text:span text:style-name="T3"><text:line-break/></text:span><text:span text:style-name="T2">for Life Sciences</text:span><text:span text:style-name="T3"><text:line-break/></text:span><text:span text:style-name="T2">Data Management</text:span><text:span text:style-name="T2"><text:line-break/></text:span><text:span text:style-name="T2"/></text:p>
          </draw:text-box>
        </draw:frame>
        <draw:frame draw:name="Google Shape;400;p93" presentation:style-name="pr3" draw:text-style-name="P6" draw:layer="layout" svg:width="9.401cm" svg:height="0.749cm" svg:x="14.884cm" svg:y="9.936cm" presentation:class="outline" presentation:user-transformed="true">
          <draw:text-box>
            <text:p text:style-name="P5"><text:span text:style-name="T4">Data management coordinator</text:span></text:p>
            <text:p text:style-name="P5"><text:span text:style-name="T4">ELIXIR Norway</text:span></text:p>
          </draw:text-box>
        </draw:frame>
        <draw:custom-shape draw:name="Google Shape;401;p93" draw:style-name="gr1" draw:text-style-name="P8" draw:layer="layout" svg:width="19.492cm" svg:height="1.539cm" svg:x="6.359cm" svg:y="13.667cm">
          <text:p text:style-name="P7"><text:span text:style-name="T5">Illustrative Icons from </text:span><text:span text:style-name="T6"><text:a xlink:href="https://fontawesome.com/" xlink:type="simple">Font Awesome</text:a></text:span><text:span text:style-name="T5"><text:s/>licensed under</text:span><text:span text:style-name="T6"><text:a xlink:href="http://creativecommons.org/licenses/by/4.0/" xlink:type="simple"> Creative Commons Attribution 4.0 International License</text:a></text:span><text:span text:style-name="T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2;p93" draw:style-name="gr2" draw:text-style-name="P9" draw:layer="layout" svg:width="4.037cm" svg:height="2.711cm" svg:x="11.564cm" svg:y="10.82cm">
          <draw:image xlink:href="Pictures/100002010000010F000000B60939EE7473DC96AC.png" xlink:type="simple" xlink:show="embed" xlink:actuate="onLoad">
            <text:p/>
          </draw:image>
        </draw:frame>
        <presentation:notes draw:style-name="dp2">
          <draw:frame draw:name="Google Shape;395;g3e5258d1545_0_0:notes" presentation:style-name="pr4" draw:text-style-name="P10" draw:layer="layout" svg:width="15.239cm" svg:height="10.001cm" svg:x="1.905cm" svg:y="12.224cm" presentation:class="notes" presentation:placeholder="true" presentation:user-transformed="true">
            <draw:text-box/>
          </draw:frame>
          <draw:page-thumbnail draw:name="Google Shape;396;g3e5258d1545_0_0:notes" draw:style-name="gr3" draw:layer="layout" svg:width="15.239cm" svg:height="8.572cm" svg:x="1.905cm" svg:y="3.175cm" draw:page-number="1" presentation:class="page"/>
        </presentation:notes>
      </draw:page>
      <draw:page draw:name="page2" draw:style-name="dp1" draw:master-page-name="BLANK">
        <draw:custom-shape draw:name="Google Shape;408;p94" draw:style-name="gr4" draw:text-style-name="P8" draw:layer="layout" svg:width="22.858cm" svg:height="2.382cm" svg:x="1.27cm" svg:y="1.604cm">
          <text:p text:style-name="P11"><text:span text:style-name="T7">Disclaim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94" draw:style-name="gr5" draw:text-style-name="P8" draw:layer="layout" svg:width="22.858cm" svg:height="2.205cm" svg:x="1.27cm" svg:y="6.492cm">
          <text:p text:style-name="P12"><text:span text:style-name="T8">This is not a legal advi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404;p2: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05;p2:notes" draw:style-name="gr3" draw:layer="layout" svg:width="0.002cm" svg:height="0.002cm" svg:x="0cm" svg:y="1.931cm" draw:page-number="2" presentation:class="page"/>
          <draw:frame draw:name="Google Shape;406;p2:notes" presentation:style-name="pr5" draw:text-style-name="P10" draw:layer="layout" svg:width="15.238cm" svg:height="11.428cm" svg:x="1.905cm" svg:y="12.065cm" presentation:class="notes" presentation:placeholder="true" presentation:user-transformed="true">
            <draw:text-box/>
          </draw:frame>
        </presentation:notes>
      </draw:page>
      <draw:page draw:name="page3" draw:style-name="dp1" draw:master-page-name="BLANK">
        <draw:custom-shape draw:name="Google Shape;415;p95" draw:style-name="gr4" draw:text-style-name="P8" draw:layer="layout" svg:width="22.858cm" svg:height="2.382cm" svg:x="1.27cm" svg:y="-0.13cm">
          <text:p text:style-name="P11"><text:span text:style-name="T9">Important Relevant Legisl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95" draw:style-name="gr7" draw:text-style-name="P13" xml:id="id3" draw:id="id3" draw:layer="layout" svg:width="6.417cm" svg:height="1.122cm" svg:x="1.914cm" svg:y="2.787cm">
          <text:p text:style-name="P7"><text:span text:style-name="T10">Research Ethics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17;p95" draw:style-name="gr7" draw:text-style-name="P13" xml:id="id4" draw:id="id4" draw:layer="layout" svg:width="6.417cm" svg:height="1.122cm" svg:x="1.914cm" svg:y="4.335cm">
          <text:p text:style-name="P7"><text:span text:style-name="T10">Health Research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18;p95" draw:style-name="gr8" draw:text-style-name="P14" xml:id="id5" draw:id="id5" draw:layer="layout" svg:width="6.417cm" svg:height="1.122cm" svg:x="1.914cm" svg:y="5.816cm">
          <text:p text:style-name="P7"><text:span text:style-name="T11">Health Registry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19;p95" draw:style-name="gr8" draw:text-style-name="P14" xml:id="id6" draw:id="id6" draw:layer="layout" svg:width="6.417cm" svg:height="1.122cm" svg:x="1.914cm" svg:y="7.298cm">
          <text:p text:style-name="P7"><text:span text:style-name="T11">Biotechnology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20;p95" draw:style-name="gr8" draw:text-style-name="P14" xml:id="id7" draw:id="id7" draw:layer="layout" svg:width="6.417cm" svg:height="1.122cm" svg:x="1.914cm" svg:y="8.78cm">
          <text:p text:style-name="P7"><text:span text:style-name="T11">Archive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21;p95" draw:style-name="gr8" draw:text-style-name="P14" xml:id="id8" draw:id="id8" draw:layer="layout" svg:width="6.417cm" svg:height="1.122cm" svg:x="1.914cm" svg:y="10.261cm">
          <text:p text:style-name="P7"><text:span text:style-name="T11">Patents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22;p95" draw:style-name="gr8" draw:text-style-name="P14" xml:id="id9" draw:id="id9" draw:layer="layout" svg:width="6.417cm" svg:height="1.122cm" svg:x="1.914cm" svg:y="11.743cm">
          <text:p text:style-name="P7"><text:span text:style-name="T11">Copyrights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23;p95" draw:style-name="gr2" draw:text-style-name="P9" xml:id="id1" draw:id="id1" draw:layer="layout" svg:width="6.102cm" svg:height="7.219cm" svg:x="15.225cm" svg:y="2.787cm">
          <draw:image xlink:href="Pictures/100002010000026A000002DB51D9E60E858446FD.png" xlink:type="simple" xlink:show="embed" xlink:actuate="onLoad">
            <text:p/>
          </draw:image>
        </draw:frame>
        <draw:frame draw:name="Google Shape;424;p95" draw:style-name="gr2" draw:text-style-name="P9" xml:id="id2" draw:id="id2" draw:layer="layout" svg:width="3.279cm" svg:height="2.382cm" svg:x="18.494cm" svg:y="5.398cm">
          <draw:image xlink:href="Pictures/100000000000020000000174C5E145BF6683B30C.png" xlink:type="simple" xlink:show="embed" xlink:actuate="onLoad">
            <text:p/>
          </draw:image>
        </draw:frame>
        <draw:custom-shape draw:name="Google Shape;425;p95" draw:style-name="gr9" draw:text-style-name="P8" xml:id="id10" draw:id="id10" draw:layer="layout" svg:width="14.342cm" svg:height="3.176cm" svg:x="11.078cm" svg:y="10.059cm">
          <text:list text:style-name="L5">
            <text:list-item>
              <text:p text:style-name="P15"><text:span text:style-name="T12">Health Register Act: </text:span><text:span text:style-name="T13"><text:a xlink:href="https://lovdata.no/dokument/NL/lov/2014-06-20-43" xlink:type="simple">https://lovdata.no/dokument/NL/lov/2014-06-20-43</text:a></text:span></text:p>
            </text:list-item>
            <text:list-item>
              <text:p text:style-name="P15"><text:span text:style-name="T12">Biotechnology Act: </text:span><text:span text:style-name="T13"><text:a xlink:href="https://lovdata.no/dokument/LTI/lov/2020-06-19-78" xlink:type="simple">https://lovdata.no/dokument/LTI/lov/2020-06-19-78</text:a></text:span></text:p>
            </text:list-item>
            <text:list-item>
              <text:p text:style-name="P15"><text:span text:style-name="T12">Archives Act: </text:span><text:span text:style-name="T13"><text:a xlink:href="https://lovdata.no/dokument/NL/lov/1992-12-04-126" xlink:type="simple">https://lovdata.no/dokument/NL/lov/1992-12-04-126</text:a></text:span></text:p>
            </text:list-item>
            <text:list-item>
              <text:p text:style-name="P15"><text:span text:style-name="T12">Patents Act: </text:span><text:span text:style-name="T13"><text:a xlink:href="https://lovdata.no/dokument/LTI/lov/2019-06-21-49" xlink:type="simple">https://lovdata.no/dokument/LTI/lov/2019-06-21-49</text:a></text:span></text:p>
            </text:list-item>
            <text:list-item>
              <text:p text:style-name="P15"><text:span text:style-name="T12">Copyright Act: </text:span><text:span text:style-name="T13"><text:a xlink:href="https://lovdata.no/dokument/NL/lov/2018-06-15-40" xlink:type="simple">https://lovdata.no/dokument/NL/lov/2018-06-15-40</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0.3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0.4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0.4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0.4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0.4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seq>
        </anim:par>
        <presentation:notes draw:style-name="dp2">
          <draw:custom-shape draw:name="Google Shape;411;p3: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12;p3:notes" draw:style-name="gr3" draw:layer="layout" svg:width="0.002cm" svg:height="0.002cm" svg:x="0cm" svg:y="1.931cm" draw:page-number="3" presentation:class="page"/>
          <draw:frame draw:name="Google Shape;413;p3:notes" presentation:style-name="pr6" draw:text-style-name="P10" draw:layer="layout" svg:width="15.238cm" svg:height="11.428cm" svg:x="1.905cm" svg:y="12.065cm" presentation:class="notes" presentation:placeholder="true" presentation:user-transformed="true">
            <draw:text-box/>
          </draw:frame>
        </presentation:notes>
      </draw:page>
      <draw:page draw:name="page4" draw:style-name="dp1" draw:master-page-name="BLANK">
        <draw:custom-shape draw:name="Google Shape;431;p96" draw:style-name="gr4" draw:text-style-name="P8" draw:layer="layout" svg:width="22.858cm" svg:height="2.382cm" svg:x="1.27cm" svg:y="0.505cm">
          <text:p text:style-name="P11"><text:span text:style-name="T9">Important Relevant Legisl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96" draw:style-name="gr10" draw:text-style-name="P13" xml:id="id12" draw:id="id12" draw:layer="layout" svg:width="6.417cm" svg:height="1.122cm" svg:x="1.914cm" svg:y="4.269cm">
          <text:p text:style-name="P7"><text:span text:style-name="T10">Personal Data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3;p96" draw:style-name="gr11" draw:text-style-name="P13" xml:id="id13" draw:id="id13" draw:layer="layout" svg:width="13.466cm" svg:height="1.266cm" svg:x="1.914cm" svg:y="5.672cm">
          <text:p text:style-name="P7"><text:span text:style-name="T44"/></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4;p96" draw:style-name="gr10" draw:text-style-name="P13" xml:id="id14" draw:id="id14" draw:layer="layout" svg:width="12.727cm" svg:height="1.122cm" svg:x="1.914cm" svg:y="7.298cm">
          <text:p text:style-name="P7"><text:span text:style-name="T10">General Data Protection Regulation (GDP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35;p96" draw:style-name="gr12" draw:text-style-name="P9" xml:id="id11" draw:id="id11" draw:layer="layout" svg:width="5.471cm" svg:height="3.974cm" svg:x="18.038cm" svg:y="4.758cm">
          <draw:image xlink:href="Pictures/100000000000032A0000021CFBC0095C002E1384.png" xlink:type="simple" xlink:show="embed" xlink:actuate="onLoad">
            <text:p/>
          </draw:image>
        </draw:frame>
        <draw:custom-shape draw:name="Google Shape;436;p96" draw:style-name="gr9" draw:text-style-name="P8" xml:id="id15" draw:id="id15" draw:layer="layout" svg:width="12.727cm" svg:height="1.776cm" svg:x="1.914cm" svg:y="8.78cm">
          <text:p text:style-name="P7"><text:span text:style-name="T14">The GDPR is an EU Regulation that applies </text:span><text:span text:style-name="T3"><text:line-break/></text:span><text:span text:style-name="T14">directly to Norway, as a member of the E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0.3s" smil:targetElement="id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0.4s" smil:targetElement="id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0.4s" smil:targetElement="id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anim:par>
          </anim:seq>
        </anim:par>
        <presentation:notes draw:style-name="dp2">
          <draw:custom-shape draw:name="Google Shape;427;p4: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28;p4:notes" draw:style-name="gr3" draw:layer="layout" svg:width="0.002cm" svg:height="0.002cm" svg:x="0cm" svg:y="1.931cm" draw:page-number="4" presentation:class="page"/>
          <draw:frame draw:name="Google Shape;429;p4:notes" presentation:style-name="pr7" draw:text-style-name="P10" draw:layer="layout" svg:width="15.238cm" svg:height="11.428cm" svg:x="1.905cm" svg:y="12.065cm" presentation:class="notes" presentation:placeholder="true" presentation:user-transformed="true">
            <draw:text-box/>
          </draw:frame>
        </presentation:notes>
      </draw:page>
      <draw:page draw:name="page5" draw:style-name="dp1" draw:master-page-name="BLANK">
        <draw:custom-shape draw:name="Google Shape;442;p97" draw:style-name="gr13" draw:text-style-name="P13" xml:id="id17" draw:id="id17" draw:layer="layout" svg:width="14.016cm" svg:height="1.596cm" svg:x="6.005cm" svg:y="1.321cm">
          <text:p text:style-name="P16"><text:span text:style-name="T15">Research Ethics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43;p97" draw:style-name="gr2" draw:text-style-name="P9" xml:id="id16" draw:id="id16" draw:layer="layout" svg:width="1.979cm" svg:height="1.437cm" svg:x="2.371cm" svg:y="1.479cm">
          <draw:image xlink:href="Pictures/100000000000020000000174C5E145BF6683B30C.png" xlink:type="simple" xlink:show="embed" xlink:actuate="onLoad">
            <text:p/>
          </draw:image>
        </draw:frame>
        <draw:custom-shape draw:name="Google Shape;444;p97" draw:style-name="gr9" draw:text-style-name="P8" xml:id="id18" draw:id="id18" draw:layer="layout" svg:width="21.798cm" svg:height="1.138cm" svg:x="0.999cm" svg:y="12.611cm">
          <text:p text:style-name="P3"><text:span text:style-name="T16">Research Ethics Act: </text:span><text:span text:style-name="T17"><text:a xlink:href="https://lovdata.no/dokument/NL/lov/2017-04-28-23" xlink:type="simple">https://lovdata.no/dokument/NL/lov/2017-04-28-23</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5;p97" draw:style-name="gr14" draw:text-style-name="P8" xml:id="id20" draw:id="id20" draw:layer="layout" svg:width="22.498cm" svg:height="7.849cm" svg:x="2.329cm" svg:y="4.156cm">
          <text:p text:style-name="P17"><text:span text:style-name="T18">Withhold-, mislead about-, or selectively/secretly dispose of undesired results.</text:span></text:p>
          <text:p text:style-name="P18"><text:span text:style-name="T18">Conceal of scientific efforts and / or scientific achievements. Improper allocation of authorship etc.</text:span></text:p>
          <text:p text:style-name="P18"><text:span text:style-name="T18">Destruction of research data / material to prevent investigations of miscon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6;p97" draw:style-name="gr2" draw:text-style-name="P9" xml:id="id19" draw:id="id19" draw:layer="layout" svg:width="2.641cm" svg:height="7.849cm" svg:x="0.669cm" svg:y="3.455cm">
          <draw:image xlink:href="Pictures/100002010000010A000003160292EAC3CA21222E.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0.3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0.4s" smil:targetElement="id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anim:par>
          </anim:seq>
        </anim:par>
        <presentation:notes draw:style-name="dp2">
          <draw:custom-shape draw:name="Google Shape;438;p5: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39;p5:notes" draw:style-name="gr3" draw:layer="layout" svg:width="0.002cm" svg:height="0.002cm" svg:x="0cm" svg:y="1.931cm" draw:page-number="5" presentation:class="page"/>
          <draw:frame draw:name="Google Shape;440;p5:notes" presentation:style-name="pr8" draw:text-style-name="P10" draw:layer="layout" svg:width="15.238cm" svg:height="11.428cm" svg:x="1.905cm" svg:y="12.065cm" presentation:class="notes" presentation:placeholder="true" presentation:user-transformed="true">
            <draw:text-box/>
          </draw:frame>
        </presentation:notes>
      </draw:page>
      <draw:page draw:name="page6" draw:style-name="dp1" draw:master-page-name="BLANK">
        <draw:frame draw:name="Google Shape;452;p98" draw:style-name="gr2" draw:text-style-name="P9" xml:id="id21" draw:id="id21" draw:layer="layout" svg:width="1.47cm" svg:height="1.067cm" svg:x="0.493cm" svg:y="0.406cm">
          <draw:image xlink:href="Pictures/100000000000020000000174C5E145BF6683B30C.png" xlink:type="simple" xlink:show="embed" xlink:actuate="onLoad">
            <text:p/>
          </draw:image>
        </draw:frame>
        <draw:custom-shape draw:name="Google Shape;453;p98" draw:style-name="gr9" draw:text-style-name="P8" xml:id="id28" draw:id="id28" draw:layer="layout" svg:width="9.718cm" svg:height="1.283cm" svg:x="7.276cm" svg:y="12.51cm">
          <text:p text:style-name="P3"><text:span text:style-name="T19">Read more at: </text:span><text:span text:style-name="T20"><text:a xlink:href="http://forskningsetikk.no/" xlink:type="simple">forskningsetikk.n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4;p98" draw:style-name="gr2" draw:text-style-name="P9" draw:layer="layout" svg:width="9.542cm" svg:height="2.275cm" svg:x="7.759cm" svg:y="0.621cm">
          <draw:image xlink:href="Pictures/100002010000044B00000106C712797C10D8974B.png" xlink:type="simple" xlink:show="embed" xlink:actuate="onLoad">
            <text:p/>
          </draw:image>
        </draw:frame>
        <draw:custom-shape draw:name="Google Shape;455;p98" draw:style-name="gr15" draw:text-style-name="P8" xml:id="id22" draw:id="id22" draw:layer="layout" svg:width="7.006cm" svg:height="1.546cm" svg:x="1.752cm" svg:y="4.506cm">
          <text:p text:style-name="P7"><text:span text:style-name="T21">General guidelines on research ethic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6;p98" draw:style-name="gr15" draw:text-style-name="P8" xml:id="id23" draw:id="id23" draw:layer="layout" svg:width="9.718cm" svg:height="1.721cm" svg:x="1.817cm" svg:y="6.466cm">
          <text:p text:style-name="P19"><text:span text:style-name="T21">Guidelines for Research Ethics in Science and Technolog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7;p98" draw:style-name="gr16" draw:text-style-name="P8" xml:id="id24" draw:id="id24" draw:layer="layout" svg:width="10.011cm" svg:height="2.041cm" svg:x="12.793cm" svg:y="4.011cm">
          <text:p text:style-name="P20"><text:span text:style-name="T21">Guidelines for the use of genetic studies of huma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8;p98" draw:style-name="gr16" draw:text-style-name="P8" xml:id="id25" draw:id="id25" draw:layer="layout" svg:width="8.913cm" svg:height="1.865cm" svg:x="12.793cm" svg:y="6.323cm">
          <text:p text:style-name="P20"><text:span text:style-name="T21">Guidelines for the inclusion of women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9;p98" draw:style-name="gr16" draw:text-style-name="P8" xml:id="id26" draw:id="id26" draw:layer="layout" svg:width="7.726cm" svg:height="1.721cm" svg:x="1.964cm" svg:y="8.716cm">
          <text:p text:style-name="P20"><text:span text:style-name="T21">Guidelines for clinical trial of drug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0;p98" draw:style-name="gr15" draw:text-style-name="P8" xml:id="id27" draw:id="id27" draw:layer="layout" svg:width="13.306cm" svg:height="2.041cm" svg:x="11.537cm" svg:y="8.556cm">
          <text:p text:style-name="P20"><text:span text:style-name="T21">Guidelines for research ethics and scientific assessment of qualitative research projec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0.3s" smil:targetElement="id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0.4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0.3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0.4s" smil:targetElement="id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0.4s" smil:targetElement="id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anim:par>
          </anim:seq>
        </anim:par>
        <presentation:notes draw:style-name="dp2">
          <draw:custom-shape draw:name="Google Shape;448;p6: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49;p6:notes" draw:style-name="gr3" draw:layer="layout" svg:width="0.002cm" svg:height="0.002cm" svg:x="0cm" svg:y="1.931cm" draw:page-number="6" presentation:class="page"/>
          <draw:frame draw:name="Google Shape;450;p6:notes" presentation:style-name="pr9" draw:text-style-name="P10" draw:layer="layout" svg:width="15.238cm" svg:height="11.428cm" svg:x="1.905cm" svg:y="12.065cm" presentation:class="notes" presentation:placeholder="true" presentation:user-transformed="true">
            <draw:text-box/>
          </draw:frame>
        </presentation:notes>
      </draw:page>
      <draw:page draw:name="page7" draw:style-name="dp1" draw:master-page-name="BLANK">
        <draw:frame draw:name="Google Shape;466;p99" draw:style-name="gr2" draw:text-style-name="P9" xml:id="id29" draw:id="id29" draw:layer="layout" svg:width="1.47cm" svg:height="1.067cm" svg:x="0.493cm" svg:y="0.406cm">
          <draw:image xlink:href="Pictures/100000000000020000000174C5E145BF6683B30C.png" xlink:type="simple" xlink:show="embed" xlink:actuate="onLoad">
            <text:p/>
          </draw:image>
        </draw:frame>
        <draw:custom-shape draw:name="Google Shape;467;p99" draw:style-name="gr9" draw:text-style-name="P8" xml:id="id34" draw:id="id34" draw:layer="layout" svg:width="11.025cm" svg:height="1.283cm" svg:x="13.617cm" svg:y="12.611cm">
          <text:p text:style-name="P3"><text:span text:style-name="T19">Read more at: </text:span><text:span text:style-name="T20"><text:a xlink:href="http://forskningsetikk.no/" xlink:type="simple">forskningsetikk.n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8;p99" draw:style-name="gr2" draw:text-style-name="P9" draw:layer="layout" svg:width="9.542cm" svg:height="2.275cm" svg:x="7.759cm" svg:y="0.621cm">
          <draw:image xlink:href="Pictures/100002010000044B00000106C712797C10D8974B.png" xlink:type="simple" xlink:show="embed" xlink:actuate="onLoad">
            <text:p/>
          </draw:image>
        </draw:frame>
        <draw:custom-shape draw:name="Google Shape;469;p99" draw:style-name="gr17" draw:text-style-name="P8" xml:id="id30" draw:id="id30" draw:layer="layout" svg:width="10.881cm" svg:height="1.721cm" svg:x="1.817cm" svg:y="4.146cm">
          <text:p text:style-name="P16"><text:span text:style-name="T21">The Vancouver Recommendatio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0;p99" draw:style-name="gr17" draw:text-style-name="P8" xml:id="id31" draw:id="id31" draw:layer="layout" svg:width="10.881cm" svg:height="1.721cm" svg:x="1.817cm" svg:y="6.466cm">
          <text:p text:style-name="P16"><text:span text:style-name="T21">Declaration of Helsinki</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1;p99" draw:style-name="gr17" draw:text-style-name="P8" xml:id="id32" draw:id="id32" draw:layer="layout" svg:width="10.881cm" svg:height="1.721cm" svg:x="1.817cm" svg:y="8.716cm">
          <text:p text:style-name="P11"><text:span text:style-name="T21">Oveido Conven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2;p99" draw:style-name="gr18" draw:text-style-name="P21" xml:id="id33" draw:id="id33" draw:layer="layout" svg:width="11.844cm" svg:height="1.957cm" svg:x="1.614cm" svg:y="10.606cm">
          <text:p text:style-name="P7"><text:span text:style-name="T22">Otherwise known as: </text:span><text:span text:style-name="T23">The Convention for the Protection of Human Rights and Dignity of the Human Being with regard to the Application of Biology and Medicine</text:span></text:p>
          <text:p text:style-name="P7"><text:span text:style-name="T24"/></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9" smil:attributeName="visibility" smil:to="visible"/>
                  <anim:transitionFilter smil:dur="0.3s" smil:targetElement="id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0.4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0.5s" smil:targetElement="id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0.5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anim:par>
          </anim:seq>
        </anim:par>
        <presentation:notes draw:style-name="dp2">
          <draw:custom-shape draw:name="Google Shape;462;p7: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63;p7:notes" draw:style-name="gr3" draw:layer="layout" svg:width="0.002cm" svg:height="0.002cm" svg:x="0cm" svg:y="1.931cm" draw:page-number="7" presentation:class="page"/>
          <draw:frame draw:name="Google Shape;464;p7:notes" presentation:style-name="pr10" draw:text-style-name="P10" draw:layer="layout" svg:width="15.238cm" svg:height="11.428cm" svg:x="1.905cm" svg:y="12.065cm" presentation:class="notes" presentation:placeholder="true" presentation:user-transformed="true">
            <draw:text-box/>
          </draw:frame>
        </presentation:notes>
      </draw:page>
      <draw:page draw:name="page8" draw:style-name="dp1" draw:master-page-name="BLANK">
        <draw:custom-shape draw:name="Google Shape;478;p100" draw:style-name="gr13" draw:text-style-name="P13" xml:id="id36" draw:id="id36" draw:layer="layout" svg:width="14.016cm" svg:height="1.596cm" svg:x="6.005cm" svg:y="0.686cm">
          <text:p text:style-name="P16"><text:span text:style-name="T15">Health Research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79;p100" draw:style-name="gr2" draw:text-style-name="P9" xml:id="id35" draw:id="id35" draw:layer="layout" svg:width="1.979cm" svg:height="1.437cm" svg:x="2.371cm" svg:y="0.844cm">
          <draw:image xlink:href="Pictures/100000000000020000000174C5E145BF6683B30C.png" xlink:type="simple" xlink:show="embed" xlink:actuate="onLoad">
            <text:p/>
          </draw:image>
        </draw:frame>
        <draw:custom-shape draw:name="Google Shape;480;p100" draw:style-name="gr9" draw:text-style-name="P8" xml:id="id45" draw:id="id45" draw:layer="layout" svg:width="21.798cm" svg:height="1.138cm" svg:x="0.362cm" svg:y="13.034cm">
          <text:p text:style-name="P3"><text:span text:style-name="T16">Health Research Act:</text:span><text:span text:style-name="T25"> </text:span><text:span text:style-name="T17"><text:a xlink:href="https://lovdata.no/dokument/LTI/lov/2008-06-20-44" xlink:type="simple">https://lovdata.no/dokument/LTI/lov/2008-06-20-44</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100" draw:style-name="gr14" draw:text-style-name="P8" xml:id="id38" draw:id="id38" draw:layer="layout" svg:width="22.498cm" svg:height="1.596cm" svg:x="2.329cm" svg:y="3.098cm">
          <text:p text:style-name="P17"><text:span text:style-name="T3">Prior approval for health resea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100" draw:style-name="gr14" draw:text-style-name="P8" xml:id="id39" draw:id="id39" draw:layer="layout" svg:width="22.498cm" svg:height="1.596cm" svg:x="2.329cm" svg:y="4.58cm">
          <text:p text:style-name="P17"><text:span text:style-name="T3">Consent from participa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p100" draw:style-name="gr14" draw:text-style-name="P8" xml:id="id40" draw:id="id40" draw:layer="layout" svg:width="22.498cm" svg:height="1.596cm" svg:x="2.329cm" svg:y="5.85cm">
          <text:p text:style-name="P17"><text:span text:style-name="T3">Data access rights for participa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100" draw:style-name="gr14" draw:text-style-name="P8" xml:id="id41" draw:id="id41" draw:layer="layout" svg:width="22.498cm" svg:height="1.596cm" svg:x="2.407cm" svg:y="7.156cm">
          <text:p text:style-name="P17"><text:span text:style-name="T3">Biobank Regul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p100" draw:style-name="gr14" draw:text-style-name="P8" xml:id="id42" draw:id="id42" draw:layer="layout" svg:width="22.498cm" svg:height="1.596cm" svg:x="2.407cm" svg:y="8.426cm">
          <text:p text:style-name="P17"><text:span text:style-name="T3">Maximum data storage time for non-archived data </text:span><text:span text:style-name="T3"><text:line-break/></text:span><text:span text:style-name="T3">(Default: 5 years after end of project – exemptions: approv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100" draw:style-name="gr14" draw:text-style-name="P8" xml:id="id43" draw:id="id43" draw:layer="layout" svg:width="22.498cm" svg:height="1.596cm" svg:x="2.407cm" svg:y="10.542cm">
          <text:p text:style-name="P17"><text:span text:style-name="T3">Regional Committees for Medical and Health </text:span><text:span text:style-name="T26">Research Ethics</text:span><text:span text:style-name="T3"> (RE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7;p100" draw:style-name="gr2" draw:text-style-name="P9" xml:id="id44" draw:id="id44" draw:layer="layout" svg:width="7.472cm" svg:height="1.596cm" svg:x="16.671cm" svg:y="11.595cm">
          <draw:image xlink:href="Pictures/100002010000021A00000073B3ADA33C6E567737.png" xlink:type="simple" xlink:show="embed" xlink:actuate="onLoad">
            <text:p/>
          </draw:image>
        </draw:frame>
        <draw:frame draw:name="Google Shape;488;p100" draw:style-name="gr2" draw:text-style-name="P9" xml:id="id37" draw:id="id37" draw:layer="layout" svg:width="1.829cm" svg:height="8.473cm" svg:x="1.43cm" svg:y="3.098cm">
          <draw:image xlink:href="Pictures/10000201000000ED00000449C8AB390A94284B94.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5" smil:attributeName="visibility" smil:to="visible"/>
                  <anim:transitionFilter smil:dur="0.3s" smil:targetElement="id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0.4s" smil:targetElement="id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anim:par>
          </anim:seq>
        </anim:par>
        <presentation:notes draw:style-name="dp2">
          <draw:custom-shape draw:name="Google Shape;474;p8: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75;p8:notes" draw:style-name="gr3" draw:layer="layout" svg:width="0.002cm" svg:height="0.002cm" svg:x="0cm" svg:y="1.931cm" draw:page-number="8" presentation:class="page"/>
          <draw:frame draw:name="Google Shape;476;p8:notes" presentation:style-name="pr11" draw:text-style-name="P10" draw:layer="layout" svg:width="15.238cm" svg:height="11.428cm" svg:x="1.905cm" svg:y="12.065cm" presentation:class="notes" presentation:placeholder="true" presentation:user-transformed="true">
            <draw:text-box/>
          </draw:frame>
        </presentation:notes>
      </draw:page>
      <draw:page draw:name="page9" draw:style-name="dp1" draw:master-page-name="BLANK">
        <draw:custom-shape draw:name="Google Shape;494;p101" draw:style-name="gr13" draw:text-style-name="P13" xml:id="id47" draw:id="id47" draw:layer="layout" svg:width="18.96cm" svg:height="1.826cm" svg:x="5.197cm" svg:y="0.686cm">
          <text:p text:style-name="P16"><text:span text:style-name="T27">GDPR: General Data Protection Regul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95;p101" draw:style-name="gr19" draw:text-style-name="P9" xml:id="id46" draw:id="id46" draw:layer="layout" svg:width="1.979cm" svg:height="1.437cm" svg:x="2.371cm" svg:y="0.844cm">
          <draw:image xlink:href="Pictures/100000000000032000000215F33B6484BB0748B4.png" xlink:type="simple" xlink:show="embed" xlink:actuate="onLoad">
            <text:p/>
          </draw:image>
        </draw:frame>
        <draw:custom-shape draw:name="Google Shape;496;p101" draw:style-name="gr9" draw:text-style-name="P8" xml:id="id62" draw:id="id62" draw:layer="layout" svg:width="21.798cm" svg:height="1.089cm" svg:x="0.278cm" svg:y="13.118cm">
          <text:p text:style-name="P3"><text:span text:style-name="T24">GDPR:</text:span><text:span text:style-name="T28"> </text:span><text:span text:style-name="T29"><text:a xlink:href="https://eur-lex.europa.eu/legal-content/EN/TXT/PDF/?uri=OJ:L:2016:119:FULL" xlink:type="simple">https://eur-lex.europa.eu/legal-content/EN/TXT/PDF/?uri=OJ:L:2016:119:FU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p101" draw:style-name="gr14" draw:text-style-name="P8" xml:id="id49" draw:id="id49" draw:layer="layout" svg:width="22.498cm" svg:height="1.596cm" svg:x="2.329cm" svg:y="3.098cm">
          <text:p text:style-name="P17"><text:span text:style-name="T3">Protection of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101" draw:style-name="gr14" draw:text-style-name="P8" xml:id="id50" draw:id="id50" draw:layer="layout" svg:width="22.498cm" svg:height="1.596cm" svg:x="2.329cm" svg:y="4.368cm">
          <text:p text:style-name="P17"><text:span text:style-name="T3">Privacy by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9;p101" draw:style-name="gr14" draw:text-style-name="P8" xml:id="id52" draw:id="id52" draw:layer="layout" svg:width="22.498cm" svg:height="1.596cm" svg:x="2.329cm" svg:y="5.638cm">
          <text:p text:style-name="P17"><text:span text:style-name="T3">Data Protection Impact Assessment (DP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0;p101" draw:style-name="gr14" draw:text-style-name="P8" xml:id="id54" draw:id="id54" draw:layer="layout" svg:width="22.498cm" svg:height="1.596cm" svg:x="2.407cm" svg:y="6.732cm">
          <text:p text:style-name="P17"><text:span text:style-name="T3">Processing of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1;p101" draw:style-name="gr14" draw:text-style-name="P8" xml:id="id56" draw:id="id56" draw:layer="layout" svg:width="22.498cm" svg:height="1.596cm" svg:x="2.407cm" svg:y="7.791cm">
          <text:p text:style-name="P17"><text:span text:style-name="T3">Technical and organisational measure to secur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2;p101" draw:style-name="gr14" draw:text-style-name="P8" xml:id="id58" draw:id="id58" draw:layer="layout" svg:width="22.498cm" svg:height="1.596cm" svg:x="2.407cm" svg:y="9.061cm">
          <text:p text:style-name="P17"><text:span text:style-name="T3">Records of Processing Activ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3;p101" draw:style-name="gr14" draw:text-style-name="P8" xml:id="id59" draw:id="id59" draw:layer="layout" svg:width="22.498cm" svg:height="1.596cm" svg:x="2.407cm" svg:y="10.119cm">
          <text:p text:style-name="P17"><text:span text:style-name="T3">Access rights, Right to be forgotten, Right on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4;p101" draw:style-name="gr14" draw:text-style-name="P8" xml:id="id61" draw:id="id61" draw:layer="layout" svg:width="22.498cm" svg:height="1.596cm" svg:x="2.407cm" svg:y="11.177cm">
          <text:p text:style-name="P17"><text:span text:style-name="T3">Fine for severe violations: Up to 20 million Eur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5;p101" draw:style-name="gr20" draw:text-style-name="P9" xml:id="id48" draw:id="id48" draw:layer="layout" svg:width="1.213cm" svg:height="2.097cm" svg:x="2.117cm" svg:y="3.322cm">
          <draw:image xlink:href="Pictures/10000201000000A300000448EACA50CF4303650F.png" xlink:type="simple" xlink:show="embed" xlink:actuate="onLoad">
            <text:p/>
          </draw:image>
        </draw:frame>
        <draw:frame draw:name="Google Shape;506;p101" draw:style-name="gr21" draw:text-style-name="P9" xml:id="id51" draw:id="id51" draw:layer="layout" svg:width="1.338cm" svg:height="1.268cm" svg:x="2.117cm" svg:y="5.608cm">
          <draw:image xlink:href="Pictures/10000201000000A300000448EACA50CF4303650F.png" xlink:type="simple" xlink:show="embed" xlink:actuate="onLoad">
            <text:p/>
          </draw:image>
        </draw:frame>
        <draw:frame draw:name="Google Shape;507;p101" draw:style-name="gr22" draw:text-style-name="P9" xml:id="id53" draw:id="id53" draw:layer="layout" svg:width="1.338cm" svg:height="0.856cm" svg:x="2.117cm" svg:y="6.932cm">
          <draw:image xlink:href="Pictures/10000201000000A300000448EACA50CF4303650F.png" xlink:type="simple" xlink:show="embed" xlink:actuate="onLoad">
            <text:p/>
          </draw:image>
        </draw:frame>
        <draw:frame draw:name="Google Shape;508;p101" draw:style-name="gr23" draw:text-style-name="P9" xml:id="id57" draw:id="id57" draw:layer="layout" svg:width="1.213cm" svg:height="2.097cm" svg:x="2.242cm" svg:y="9.096cm">
          <draw:image xlink:href="Pictures/10000201000000A300000448EACA50CF4303650F.png" xlink:type="simple" xlink:show="embed" xlink:actuate="onLoad">
            <text:p/>
          </draw:image>
        </draw:frame>
        <draw:frame draw:name="Google Shape;509;p101" draw:style-name="gr2" draw:text-style-name="P9" xml:id="id55" draw:id="id55" draw:layer="layout" svg:width="0.856cm" svg:height="0.856cm" svg:x="2.411cm" svg:y="8.04cm">
          <draw:image xlink:href="Pictures/1000020100000300000003005C10A696FD01655D.png" xlink:type="simple" xlink:show="embed" xlink:actuate="onLoad">
            <text:p/>
          </draw:image>
        </draw:frame>
        <draw:frame draw:name="Google Shape;510;p101" draw:style-name="gr2" draw:text-style-name="P9" xml:id="id60" draw:id="id60" draw:layer="layout" svg:width="0.551cm" svg:height="0.735cm" svg:x="2.716cm" svg:y="11.528cm">
          <draw:image xlink:href="Pictures/10000201000006000000080027A80628F8DCA6F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6" smil:attributeName="visibility" smil:to="visible"/>
                  <anim:transitionFilter smil:dur="0.3s" smil:targetElement="id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7" smil:attributeName="visibility" smil:to="visible"/>
                  <anim:transitionFilter smil:dur="0.4s" smil:targetElement="id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smil:begin="0s" smil:fill="hold" presentation:node-type="with-previous"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5" smil:attributeName="visibility" smil:to="visible"/>
                  <anim:transitionFilter smil:dur="1s" smil:targetElement="id55"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7" smil:attributeName="visibility" smil:to="visible"/>
                  <anim:transitionFilter smil:dur="1s" smil:targetElement="id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1s" smil:targetElement="id5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9" smil:attributeName="visibility" smil:to="visible"/>
                  <anim:transitionFilter smil:dur="1s" smil:targetElement="id5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0" smil:attributeName="visibility" smil:to="visible"/>
                  <anim:transitionFilter smil:dur="1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1s" smil:targetElement="id6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1s" smil:targetElement="id62" smil:type="fade" smil:subtype="crossfade"/>
                </anim:par>
              </anim:par>
            </anim:par>
          </anim:seq>
        </anim:par>
        <presentation:notes draw:style-name="dp2">
          <draw:custom-shape draw:name="Google Shape;490;p9: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91;p9:notes" draw:style-name="gr3" draw:layer="layout" svg:width="0.002cm" svg:height="0.002cm" svg:x="0cm" svg:y="1.931cm" draw:page-number="9" presentation:class="page"/>
          <draw:frame draw:name="Google Shape;492;p9:notes" presentation:style-name="pr12" draw:text-style-name="P10" draw:layer="layout" svg:width="15.238cm" svg:height="11.428cm" svg:x="1.905cm" svg:y="12.065cm" presentation:class="notes" presentation:placeholder="true" presentation:user-transformed="true">
            <draw:text-box/>
          </draw:frame>
        </presentation:notes>
      </draw:page>
      <draw:page draw:name="page10" draw:style-name="dp1" draw:master-page-name="BLANK">
        <draw:custom-shape draw:name="Google Shape;516;p102" draw:style-name="gr13" draw:text-style-name="P13" xml:id="id64" draw:id="id64" draw:layer="layout" svg:width="18.545cm" svg:height="1.596cm" svg:x="5.088cm" svg:y="0.734cm">
          <text:p text:style-name="P16"><text:span text:style-name="T30">Personal Data Act &amp; Personal Data Regulations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17;p102" draw:style-name="gr2" draw:text-style-name="P9" xml:id="id63" draw:id="id63" draw:layer="layout" svg:width="1.979cm" svg:height="1.437cm" svg:x="2.371cm" svg:y="0.844cm">
          <draw:image xlink:href="Pictures/100000000000020000000174C5E145BF6683B30C.png" xlink:type="simple" xlink:show="embed" xlink:actuate="onLoad">
            <text:p/>
          </draw:image>
        </draw:frame>
        <draw:custom-shape draw:name="Google Shape;518;p102" draw:style-name="gr9" draw:text-style-name="P8" xml:id="id72" draw:id="id72" draw:layer="layout" svg:width="23.567cm" svg:height="2.838cm" svg:x="0.362cm" svg:y="10.825cm">
          <text:p text:style-name="P3"><text:span text:style-name="T24">More information at:</text:span></text:p>
          <text:list text:style-name="L6">
            <text:list-item>
              <text:p text:style-name="P3"><text:span text:style-name="T24">Regulations on the processing of personal data: </text:span><text:span text:style-name="T29"><text:a xlink:href="https://lovdata.no/dokument/SF/forskrift/2018-06-15-876" xlink:type="simple">https://lovdata.no/dokument/SF/forskrift/2018-06-15-876</text:a></text:span></text:p>
            </text:list-item>
            <text:list-item>
              <text:p text:style-name="P3"><text:span text:style-name="T24">Personal Data Act: </text:span><text:span text:style-name="T29"><text:a xlink:href="https://lovdata.no/dokument/NL/lov/2018-06-15-38" xlink:type="simple">https://lovdata.no/dokument/NL/lov/2018-06-15-38</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9;p102" draw:style-name="gr14" draw:text-style-name="P8" xml:id="id65" draw:id="id65" draw:layer="layout" svg:width="22.498cm" svg:height="1.596cm" svg:x="2.004cm" svg:y="2.494cm">
          <text:p text:style-name="P22"><text:span text:style-name="T31">National Implementation of GD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0;p102" draw:style-name="gr14" draw:text-style-name="P8" xml:id="id67" draw:id="id67" draw:layer="layout" svg:width="22.498cm" svg:height="1.596cm" svg:x="2.329cm" svg:y="4.58cm">
          <text:p text:style-name="P17"><text:span text:style-name="T3">Consent from participants (13 years and ol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1;p102" draw:style-name="gr14" draw:text-style-name="P8" xml:id="id69" draw:id="id69" draw:layer="layout" svg:width="22.498cm" svg:height="1.596cm" svg:x="2.329cm" svg:y="6.485cm">
          <text:p text:style-name="P17"><text:span text:style-name="T3">Exceptions for archival, public interest, and scientific reas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2;p102" draw:style-name="gr14" draw:text-style-name="P8" xml:id="id71" draw:id="id71" draw:layer="layout" svg:width="22.498cm" svg:height="2.258cm" svg:x="2.407cm" svg:y="8.187cm">
          <text:p text:style-name="P17"><text:span text:style-name="T3">Authorities: Privacy Ombudsman (Datatilsynet), Privacy Committees,</text:span><text:span text:style-name="T3"><text:line-break/></text:span><text:span text:style-name="T3">Data Inspector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3;p102" draw:style-name="gr24" draw:text-style-name="P9" xml:id="id70" draw:id="id70" draw:layer="layout" svg:width="2.446cm" svg:height="1.922cm" svg:x="0.964cm" svg:y="8.074cm">
          <draw:image xlink:href="Pictures/10000201000000ED00000449C8AB390A94284B94.png" xlink:type="simple" xlink:show="embed" xlink:actuate="onLoad">
            <text:p/>
          </draw:image>
        </draw:frame>
        <draw:frame draw:name="Google Shape;524;p102" draw:style-name="gr25" draw:text-style-name="P9" xml:id="id66" draw:id="id66" draw:layer="layout" svg:width="2.446cm" svg:height="1.922cm" svg:x="0.964cm" svg:y="4.067cm">
          <draw:image xlink:href="Pictures/10000201000000ED00000449C8AB390A94284B94.png" xlink:type="simple" xlink:show="embed" xlink:actuate="onLoad">
            <text:p/>
          </draw:image>
        </draw:frame>
        <draw:frame draw:name="Google Shape;525;p102" draw:style-name="gr26" draw:text-style-name="P9" xml:id="id68" draw:id="id68" draw:layer="layout" svg:width="1.273cm" svg:height="1.263cm" svg:x="1.695cm" svg:y="6.369cm">
          <draw:image xlink:href="Pictures/10000201000002D0000002D0DDE67520C92BF92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3" smil:attributeName="visibility" smil:to="visible"/>
                  <anim:transitionFilter smil:dur="0.3s" smil:targetElement="id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0.4s" smil:targetElement="id64" smil:type="fade" smil:subtype="crossfade"/>
                </anim:par>
                <anim:par smil:begin="0s" smil:fill="hold" presentation:node-type="with-previous"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6" smil:attributeName="visibility" smil:to="visible"/>
                  <anim:transitionFilter smil:dur="1s" smil:targetElement="id66"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0.4s" smil:targetElement="id6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8" smil:attributeName="visibility" smil:to="visible"/>
                  <anim:transitionFilter smil:dur="1s" smil:targetElement="id68" smil:type="fade" smil:subtype="crossfade"/>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0" smil:attributeName="visibility" smil:to="visible"/>
                  <anim:transitionFilter smil:dur="1s" smil:targetElement="id70" smil:type="fade" smil:subtype="crossfade"/>
                </anim:par>
                <anim:par smil:begin="0s" smil:fill="hold" presentation:node-type="with-previous" presentation:preset-class="entrance" presentation:preset-id="ooo-entrance-fade-in">
                  <anim:set smil:begin="0s" smil:dur="0.001s" smil:fill="hold" smil:targetElement="id71" smil:attributeName="visibility" smil:to="visible"/>
                  <anim:transitionFilter smil:dur="0.5s" smil:targetElement="id7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2" smil:attributeName="visibility" smil:to="visible"/>
                  <anim:transitionFilter smil:dur="0.6s" smil:targetElement="id72" smil:type="fade" smil:subtype="crossfade"/>
                </anim:par>
              </anim:par>
            </anim:par>
          </anim:seq>
        </anim:par>
        <presentation:notes draw:style-name="dp2">
          <draw:custom-shape draw:name="Google Shape;512;p10: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13;p10:notes" draw:style-name="gr3" draw:layer="layout" svg:width="0.002cm" svg:height="0.002cm" svg:x="0cm" svg:y="1.931cm" draw:page-number="10" presentation:class="page"/>
          <draw:frame draw:name="Google Shape;514;p10:notes" presentation:style-name="pr13" draw:text-style-name="P10" draw:layer="layout" svg:width="15.238cm" svg:height="11.428cm" svg:x="1.905cm" svg:y="12.065cm" presentation:class="notes" presentation:placeholder="true" presentation:user-transformed="true">
            <draw:text-box/>
          </draw:frame>
        </presentation:notes>
      </draw:page>
      <draw:page draw:name="page11" draw:style-name="dp1" draw:master-page-name="BLANK">
        <draw:custom-shape draw:name="Google Shape;531;p103" draw:style-name="gr4" draw:text-style-name="P8" draw:layer="layout" svg:width="22.858cm" svg:height="2.382cm" svg:x="1.27cm" svg:y="-0.13cm">
          <text:p text:style-name="P11"><text:span text:style-name="T9">Let’s find out: What 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103" draw:style-name="gr27" draw:text-style-name="P23" xml:id="id73" draw:id="id73" draw:layer="layout" svg:width="7.196cm" svg:height="1.122cm" svg:x="1.914cm" svg:y="2.787cm">
          <text:p text:style-name="P7"><text:span text:style-name="T10">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3;p103" draw:style-name="gr28" draw:text-style-name="P24" xml:id="id74" draw:id="id74" draw:layer="layout" svg:width="7.373cm" svg:height="1.122cm" svg:x="3.395cm" svg:y="4.335cm">
          <text:p text:style-name="P7"><text:span text:style-name="T10">Sensitive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4;p103" draw:style-name="gr29" draw:text-style-name="P25" xml:id="id75" draw:id="id75" draw:layer="layout" svg:width="7.196cm" svg:height="1.122cm" svg:x="5.512cm" svg:y="5.816cm">
          <text:p text:style-name="P7"><text:span text:style-name="T11">Genetic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5;p103" draw:style-name="gr8" draw:text-style-name="P14" xml:id="id76" draw:id="id76" draw:layer="layout" svg:width="6.417cm" svg:height="1.122cm" svg:x="8.052cm" svg:y="7.298cm">
          <text:p text:style-name="P7"><text:span text:style-name="T11">Pseu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6;p103" draw:style-name="gr30" draw:text-style-name="P26" xml:id="id77" draw:id="id77" draw:layer="layout" svg:width="6.417cm" svg:height="1.122cm" svg:x="9.745cm" svg:y="8.991cm">
          <text:p text:style-name="P7"><text:span text:style-name="T10">An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0.4s" smil:targetElement="id7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4" smil:attributeName="visibility" smil:to="visible"/>
                  <anim:transitionFilter smil:dur="0.4s" smil:targetElement="id7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smil:attributeName="visibility" smil:to="visible"/>
                  <anim:transitionFilter smil:dur="1s" smil:targetElement="id75" smil:type="fade" smil:subtype="crossfade"/>
                </anim:par>
                <anim:par smil:begin="0s" smil:fill="hold" presentation:node-type="with-previous" presentation:preset-class="entrance" presentation:preset-id="ooo-entrance-fade-in">
                  <anim:set smil:begin="0s" smil:dur="0.001s" smil:fill="hold" smil:targetElement="id76" smil:attributeName="visibility" smil:to="visible"/>
                  <anim:transitionFilter smil:dur="1s" smil:targetElement="id76" smil:type="fade" smil:subtype="crossfade"/>
                </anim:par>
                <anim:par smil:begin="0s" smil:fill="hold" presentation:node-type="with-previous" presentation:preset-class="entrance" presentation:preset-id="ooo-entrance-fade-in">
                  <anim:set smil:begin="0s" smil:dur="0.001s" smil:fill="hold" smil:targetElement="id77" smil:attributeName="visibility" smil:to="visible"/>
                  <anim:transitionFilter smil:dur="1s" smil:targetElement="id77" smil:type="fade" smil:subtype="crossfade"/>
                </anim:par>
              </anim:par>
            </anim:par>
          </anim:seq>
        </anim:par>
        <presentation:notes draw:style-name="dp2">
          <draw:custom-shape draw:name="Google Shape;527;p11: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28;p11:notes" draw:style-name="gr3" draw:layer="layout" svg:width="0.002cm" svg:height="0.002cm" svg:x="0cm" svg:y="1.931cm" draw:page-number="11" presentation:class="page"/>
          <draw:frame draw:name="Google Shape;529;p11:notes" presentation:style-name="pr14" draw:text-style-name="P10" draw:layer="layout" svg:width="15.238cm" svg:height="11.428cm" svg:x="1.905cm" svg:y="12.065cm" presentation:class="notes" presentation:placeholder="true" presentation:user-transformed="true">
            <draw:text-box/>
          </draw:frame>
        </presentation:notes>
      </draw:page>
      <draw:page draw:name="page12" draw:style-name="dp1" draw:master-page-name="BLANK">
        <draw:custom-shape draw:name="Google Shape;542;p104" draw:style-name="gr31" draw:text-style-name="P27" xml:id="id78" draw:id="id78" draw:layer="layout" svg:width="18.96cm" svg:height="1.826cm" svg:x="3.116cm" svg:y="1.346cm">
          <text:p text:style-name="P16"><text:span text:style-name="T32">What defines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3;p104" draw:style-name="gr14" draw:text-style-name="P8" xml:id="id80" draw:id="id80" draw:layer="layout" svg:width="22.498cm" svg:height="1.596cm" svg:x="1.906cm" svg:y="4.368cm">
          <text:p text:style-name="P17"><text:span text:style-name="T3">Any information that relates to an identified or identifiable living individ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4;p104" draw:style-name="gr14" draw:text-style-name="P8" xml:id="id82" draw:id="id82" draw:layer="layout" svg:width="22.498cm" svg:height="1.596cm" svg:x="1.906cm" svg:y="5.638cm">
          <text:p text:style-name="P17"><text:span text:style-name="T3">What if data can be de-identified, encrypted, or pseudonymi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104" draw:style-name="gr14" draw:text-style-name="P8" xml:id="id84" draw:id="id84" draw:layer="layout" svg:width="22.498cm" svg:height="1.596cm" svg:x="1.906cm" svg:y="6.908cm">
          <text:p text:style-name="P17"><text:span text:style-name="T26">^Still, it is considered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104" draw:style-name="gr14" draw:text-style-name="P8" xml:id="id86" draw:id="id86" draw:layer="layout" svg:width="22.498cm" svg:height="1.596cm" svg:x="1.984cm" svg:y="8.214cm">
          <text:p text:style-name="P17"><text:span text:style-name="T3">Truly anonymised → anonymisation must be irrever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7;p104" draw:style-name="gr32" draw:text-style-name="P9" xml:id="id79" draw:id="id79" draw:layer="layout" svg:width="1.338cm" svg:height="1.044cm" svg:x="1.568cm" svg:y="4.592cm">
          <draw:image xlink:href="Pictures/10000201000000A300000448EACA50CF4303650F.png" xlink:type="simple" xlink:show="embed" xlink:actuate="onLoad">
            <text:p/>
          </draw:image>
        </draw:frame>
        <draw:frame draw:name="Google Shape;548;p104" draw:style-name="gr33" draw:text-style-name="P9" xml:id="id81" draw:id="id81" draw:layer="layout" svg:width="1.338cm" svg:height="1.044cm" svg:x="1.568cm" svg:y="5.75cm">
          <draw:image xlink:href="Pictures/10000201000000A300000448EACA50CF4303650F.png" xlink:type="simple" xlink:show="embed" xlink:actuate="onLoad">
            <text:p/>
          </draw:image>
        </draw:frame>
        <draw:frame draw:name="Google Shape;549;p104" draw:style-name="gr34" draw:text-style-name="P9" xml:id="id83" draw:id="id83" draw:layer="layout" svg:width="1.338cm" svg:height="1.044cm" svg:x="1.695cm" svg:y="7.076cm">
          <draw:image xlink:href="Pictures/10000201000000A300000448EACA50CF4303650F.png" xlink:type="simple" xlink:show="embed" xlink:actuate="onLoad">
            <text:p/>
          </draw:image>
        </draw:frame>
        <draw:custom-shape draw:name="Google Shape;550;p104" draw:style-name="gr9" draw:text-style-name="P8" xml:id="id87" draw:id="id87" draw:layer="layout" svg:width="21.798cm" svg:height="1.089cm" svg:x="0.426cm" svg:y="12.763cm">
          <text:p text:style-name="P3"><text:span text:style-name="T24">Further reading</text:span><text:span text:style-name="T28">: </text:span><text:span text:style-name="T29"><text:a xlink:href="https://ec.europa.eu/info/law/law-topic/data-protection/reform/what-personal-data_en" xlink:type="simple">https://ec.europa.eu/info/law/law-topic/data-protection/reform/what-personal-data_e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1;p104" draw:style-name="gr2" draw:text-style-name="P9" xml:id="id85" draw:id="id85" draw:layer="layout" svg:width="1.338cm" svg:height="1.238cm" svg:x="1.695cm" svg:y="8.214cm">
          <draw:image xlink:href="Pictures/100002010000033E000003006FD3819535F777FD.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8" smil:attributeName="visibility" smil:to="visible"/>
                  <anim:transitionFilter smil:dur="0.4s" smil:targetElement="id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smil:attributeName="visibility" smil:to="visible"/>
                  <anim:transitionFilter smil:dur="1s" smil:targetElement="id79" smil:type="fade" smil:subtype="crossfade"/>
                </anim:par>
                <anim:par smil:begin="0s" smil:fill="hold" presentation:node-type="with-previous" presentation:preset-class="entrance" presentation:preset-id="ooo-entrance-fade-in">
                  <anim:set smil:begin="0s" smil:dur="0.001s" smil:fill="hold" smil:targetElement="id80" smil:attributeName="visibility" smil:to="visible"/>
                  <anim:transitionFilter smil:dur="1s" smil:targetElement="id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1" smil:attributeName="visibility" smil:to="visible"/>
                  <anim:transitionFilter smil:dur="1s" smil:targetElement="id81" smil:type="fade" smil:subtype="crossfade"/>
                </anim:par>
                <anim:par smil:begin="0s" smil:fill="hold" presentation:node-type="with-previous" presentation:preset-class="entrance" presentation:preset-id="ooo-entrance-fade-in">
                  <anim:set smil:begin="0s" smil:dur="0.001s" smil:fill="hold" smil:targetElement="id82" smil:attributeName="visibility" smil:to="visible"/>
                  <anim:transitionFilter smil:dur="1s" smil:targetElement="id8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smil:attributeName="visibility" smil:to="visible"/>
                  <anim:transitionFilter smil:dur="1s" smil:targetElement="id83" smil:type="fade" smil:subtype="crossfade"/>
                </anim:par>
                <anim:par smil:begin="0s" smil:fill="hold" presentation:node-type="with-previous" presentation:preset-class="entrance" presentation:preset-id="ooo-entrance-fade-in">
                  <anim:set smil:begin="0s" smil:dur="0.001s" smil:fill="hold" smil:targetElement="id84" smil:attributeName="visibility" smil:to="visible"/>
                  <anim:transitionFilter smil:dur="1s" smil:targetElement="id8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5" smil:attributeName="visibility" smil:to="visible"/>
                  <anim:transitionFilter smil:dur="1s" smil:targetElement="id85" smil:type="fade" smil:subtype="crossfade"/>
                </anim:par>
                <anim:par smil:begin="0s" smil:fill="hold" presentation:node-type="with-previous" presentation:preset-class="entrance" presentation:preset-id="ooo-entrance-fade-in">
                  <anim:set smil:begin="0s" smil:dur="0.001s" smil:fill="hold" smil:targetElement="id86" smil:attributeName="visibility" smil:to="visible"/>
                  <anim:transitionFilter smil:dur="1s" smil:targetElement="id8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7" smil:attributeName="visibility" smil:to="visible"/>
                  <anim:transitionFilter smil:dur="1s" smil:targetElement="id87" smil:type="fade" smil:subtype="crossfade"/>
                </anim:par>
              </anim:par>
            </anim:par>
          </anim:seq>
        </anim:par>
        <presentation:notes draw:style-name="dp2">
          <draw:custom-shape draw:name="Google Shape;538;p12: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39;p12:notes" draw:style-name="gr3" draw:layer="layout" svg:width="0.002cm" svg:height="0.002cm" svg:x="0cm" svg:y="1.931cm" draw:page-number="12" presentation:class="page"/>
          <draw:frame draw:name="Google Shape;540;p12:notes" presentation:style-name="pr15" draw:text-style-name="P10" draw:layer="layout" svg:width="15.238cm" svg:height="11.428cm" svg:x="1.905cm" svg:y="12.065cm" presentation:class="notes" presentation:placeholder="true" presentation:user-transformed="true">
            <draw:text-box/>
          </draw:frame>
        </presentation:notes>
      </draw:page>
      <draw:page draw:name="page13" draw:style-name="dp1" draw:master-page-name="BLANK">
        <draw:custom-shape draw:name="Google Shape;557;p105" draw:style-name="gr31" draw:text-style-name="P27" draw:layer="layout" svg:width="18.96cm" svg:height="1.826cm" svg:x="3.116cm" svg:y="0.711cm">
          <text:p text:style-name="P16"><text:span text:style-name="T32">What is personal data? Examp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8;p105" draw:style-name="gr9" draw:text-style-name="P8" draw:layer="layout" svg:width="21.798cm" svg:height="1.089cm" svg:x="0.426cm" svg:y="12.763cm">
          <text:p text:style-name="P3"><text:span text:style-name="T24">Further reading</text:span><text:span text:style-name="T28">: </text:span><text:span text:style-name="T29"><text:a xlink:href="https://ec.europa.eu/info/law/law-topic/data-protection/reform/what-personal-data_en" xlink:type="simple">https://ec.europa.eu/info/law/law-topic/data-protection/reform/what-personal-data_e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9;p105" draw:style-name="gr2" draw:text-style-name="P9" draw:layer="layout" svg:width="17.465cm" svg:height="8.74cm" svg:x="2.328cm" svg:y="3.174cm">
          <draw:image xlink:href="Pictures/10000201000008000000040104A924880F94F5A7.png" xlink:type="simple" xlink:show="embed" xlink:actuate="onLoad">
            <text:p/>
          </draw:image>
        </draw:frame>
        <presentation:notes draw:style-name="dp2">
          <draw:custom-shape draw:name="Google Shape;553;p13: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54;p13:notes" draw:style-name="gr3" draw:layer="layout" svg:width="0.002cm" svg:height="0.002cm" svg:x="0cm" svg:y="1.931cm" draw:page-number="13" presentation:class="page"/>
          <draw:frame draw:name="Google Shape;555;p13:notes" presentation:style-name="pr16" draw:text-style-name="P10" draw:layer="layout" svg:width="15.238cm" svg:height="11.428cm" svg:x="1.905cm" svg:y="12.065cm" presentation:class="notes" presentation:placeholder="true" presentation:user-transformed="true">
            <draw:text-box/>
          </draw:frame>
        </presentation:notes>
      </draw:page>
      <draw:page draw:name="page14" draw:style-name="dp1" draw:master-page-name="BLANK">
        <draw:custom-shape draw:name="Google Shape;565;p106" draw:style-name="gr28" draw:text-style-name="P24" draw:layer="layout" svg:width="19.355cm" svg:height="2.497cm" svg:x="2.721cm" svg:y="1.346cm">
          <text:p text:style-name="P16"><text:span text:style-name="T32">What personal data is </text:span><text:span text:style-name="T3"><text:line-break/></text:span><text:span text:style-name="T32">considered sensitiv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6;p106" draw:style-name="gr14" draw:text-style-name="P8" draw:layer="layout" svg:width="22.498cm" svg:height="2.115cm" svg:x="1.906cm" svg:y="4.368cm">
          <text:list text:style-name="L7">
            <text:list-item>
              <text:p text:style-name="P15"><text:span text:style-name="T3">Personal data revealing racial or ethnic origin, political opinions, </text:span><text:span text:style-name="T3"><text:line-break/></text:span><text:span text:style-name="T3">religious, or philosophical belief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p106" draw:style-name="gr14" draw:text-style-name="P8" draw:layer="layout" svg:width="22.498cm" svg:height="1.596cm" svg:x="1.906cm" svg:y="6.485cm">
          <text:list text:style-name="L7">
            <text:list-item>
              <text:p text:style-name="P15"><text:span text:style-name="T3">Trade-union membership</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106" draw:style-name="gr14" draw:text-style-name="P8" draw:layer="layout" svg:width="22.498cm" svg:height="1.596cm" svg:x="1.906cm" svg:y="7.755cm">
          <text:list text:style-name="L7">
            <text:list-item>
              <text:p text:style-name="P15"><text:span text:style-name="T3">Genetic data, biometric data processed solely to identify a human be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9;p106" draw:style-name="gr14" draw:text-style-name="P8" draw:layer="layout" svg:width="22.498cm" svg:height="1.596cm" svg:x="1.984cm" svg:y="9.061cm">
          <text:list text:style-name="L7">
            <text:list-item>
              <text:p text:style-name="P15"><text:span text:style-name="T3">Health related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0;p106" draw:style-name="gr9" draw:text-style-name="P8" draw:layer="layout" svg:width="24.056cm" svg:height="1.48cm" svg:x="0.568cm" svg:y="12.06cm">
          <text:p text:style-name="P3"><text:span text:style-name="T33">Further reading - what personal data is considered sensitive?: </text:span><text:span text:style-name="T34"><text:a xlink:href="https://ec.europa.eu/info/law/law-topic/data-protection/reform/rules-business-and-organisations/legal-grounds-processing-data/sensitive-data/what-personal-data-considered-sensitive_en" xlink:type="simple">https://ec.europa.eu/info/law/law-topic/data-protection/reform/rules-business-and-organisations/legal-grounds-processing-data/sensitive-data/what-personal-data-considered-sensitive_e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561;p14: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62;p14:notes" draw:style-name="gr3" draw:layer="layout" svg:width="0.002cm" svg:height="0.002cm" svg:x="0cm" svg:y="1.931cm" draw:page-number="14" presentation:class="page"/>
          <draw:frame draw:name="Google Shape;563;p14:notes" presentation:style-name="pr17" draw:text-style-name="P10" draw:layer="layout" svg:width="15.238cm" svg:height="11.428cm" svg:x="1.905cm" svg:y="12.065cm" presentation:class="notes" presentation:placeholder="true" presentation:user-transformed="true">
            <draw:text-box/>
          </draw:frame>
        </presentation:notes>
      </draw:page>
      <draw:page draw:name="page15" draw:style-name="dp1" draw:master-page-name="BLANK">
        <draw:custom-shape draw:name="Google Shape;576;p107" draw:style-name="gr29" draw:text-style-name="P25" xml:id="id88" draw:id="id88" draw:layer="layout" svg:width="19.355cm" svg:height="2.115cm" svg:x="2.721cm" svg:y="1.346cm">
          <text:p text:style-name="P16"><text:span text:style-name="T35">What defines genetic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7;p107" draw:style-name="gr35" draw:text-style-name="P29" xml:id="id90" draw:id="id90" draw:layer="layout" svg:width="20.665cm" svg:height="4.344cm" svg:x="2.614cm" svg:y="4.41cm">
          <text:p text:style-name="P3"><text:span text:style-name="T36">Genetic data is defined as: “personal data relating to the inherited or acquired genetic characteristics of a natural person which give unique information about the physiology or the health of that natural person.” - GDPR article 4(13)</text:span></text:p>
          <text:p text:style-name="P28"><text:span text:style-name="T18"/></text:p>
          <text:p text:style-name="P28"><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8;p107" draw:style-name="gr14" draw:text-style-name="P8" xml:id="id92" draw:id="id92" draw:layer="layout" svg:width="20.665cm" svg:height="1.596cm" svg:x="2.614cm" svg:y="9.355cm">
          <text:p text:style-name="P3"><text:span text:style-name="T3">Always both: Personal identifier and sensitive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p107" draw:style-name="gr9" draw:text-style-name="P8" xml:id="id93" draw:id="id93" draw:layer="layout" svg:width="24.056cm" svg:height="1.48cm" svg:x="0.568cm" svg:y="12.06cm">
          <text:p text:style-name="P3"><text:span text:style-name="T33">Further reading - what personal data is considered sensitive?: </text:span><text:span text:style-name="T34"><text:a xlink:href="https://ec.europa.eu/info/law/law-topic/data-protection/reform/rules-business-and-organisations/legal-grounds-processing-data/sensitive-data/what-personal-data-considered-sensitive_en" xlink:type="simple">https://ec.europa.eu/info/law/law-topic/data-protection/reform/rules-business-and-organisations/legal-grounds-processing-data/sensitive-data/what-personal-data-considered-sensitive_e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0;p107" draw:style-name="gr19" draw:text-style-name="P9" xml:id="id89" draw:id="id89" draw:layer="layout" svg:width="1.177cm" svg:height="0.855cm" svg:x="0.98cm" svg:y="4.39cm">
          <draw:image xlink:href="Pictures/100000000000032000000215F33B6484BB0748B4.png" xlink:type="simple" xlink:show="embed" xlink:actuate="onLoad">
            <text:p/>
          </draw:image>
        </draw:frame>
        <draw:frame draw:name="Google Shape;581;p107" draw:style-name="gr36" draw:text-style-name="P9" xml:id="id91" draw:id="id91" draw:layer="layout" svg:width="1.338cm" svg:height="1.411cm" svg:x="1.062cm" svg:y="9.236cm">
          <draw:image xlink:href="Pictures/10000201000000A300000448EACA50CF4303650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8" smil:attributeName="visibility" smil:to="visible"/>
                  <anim:transitionFilter smil:dur="1s" smil:targetElement="id8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9" smil:attributeName="visibility" smil:to="visible"/>
                  <anim:transitionFilter smil:dur="1s" smil:targetElement="id89" smil:type="fade" smil:subtype="crossfade"/>
                </anim:par>
                <anim:par smil:begin="0s" smil:fill="hold" presentation:node-type="with-previous" presentation:preset-class="entrance" presentation:preset-id="ooo-entrance-fade-in">
                  <anim:set smil:begin="0s" smil:dur="0.001s" smil:fill="hold" smil:targetElement="id90" smil:attributeName="visibility" smil:to="visible"/>
                  <anim:transitionFilter smil:dur="1s" smil:targetElement="id9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1" smil:attributeName="visibility" smil:to="visible"/>
                  <anim:transitionFilter smil:dur="1s" smil:targetElement="id91" smil:type="fade" smil:subtype="crossfade"/>
                </anim:par>
                <anim:par smil:begin="0s" smil:fill="hold" presentation:node-type="with-previous" presentation:preset-class="entrance" presentation:preset-id="ooo-entrance-fade-in">
                  <anim:set smil:begin="0s" smil:dur="0.001s" smil:fill="hold" smil:targetElement="id92" smil:attributeName="visibility" smil:to="visible"/>
                  <anim:transitionFilter smil:dur="1s" smil:targetElement="id9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3" smil:attributeName="visibility" smil:to="visible"/>
                  <anim:transitionFilter smil:dur="1s" smil:targetElement="id93" smil:type="fade" smil:subtype="crossfade"/>
                </anim:par>
              </anim:par>
            </anim:par>
          </anim:seq>
        </anim:par>
        <presentation:notes draw:style-name="dp2">
          <draw:custom-shape draw:name="Google Shape;572;p15: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73;p15:notes" draw:style-name="gr3" draw:layer="layout" svg:width="0.002cm" svg:height="0.002cm" svg:x="0cm" svg:y="1.931cm" draw:page-number="15" presentation:class="page"/>
          <draw:frame draw:name="Google Shape;574;p15:notes" presentation:style-name="pr18" draw:text-style-name="P10" draw:layer="layout" svg:width="15.238cm" svg:height="11.428cm" svg:x="1.905cm" svg:y="12.065cm" presentation:class="notes" presentation:placeholder="true" presentation:user-transformed="true">
            <draw:text-box/>
          </draw:frame>
        </presentation:notes>
      </draw:page>
      <draw:page draw:name="page16" draw:style-name="dp1" draw:master-page-name="BLANK">
        <draw:custom-shape draw:name="Google Shape;587;p108" draw:style-name="gr37" draw:text-style-name="P14" xml:id="id94" draw:id="id94" draw:layer="layout" svg:width="19.355cm" svg:height="2.497cm" svg:x="2.721cm" svg:y="1.346cm">
          <text:p text:style-name="P16"><text:span text:style-name="T37">Data Psue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8;p108" draw:style-name="gr14" draw:text-style-name="P8" xml:id="id97" draw:id="id97" draw:layer="layout" svg:width="22.498cm" svg:height="1.596cm" svg:x="1.137cm" svg:y="9.272cm">
          <text:list text:style-name="L7">
            <text:list-item>
              <text:p text:style-name="P15"><text:span text:style-name="T3">De-identified and not back traceable for the researcher without the identifi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p108" draw:style-name="gr35" draw:text-style-name="P29" xml:id="id96" draw:id="id96" draw:layer="layout" svg:width="20.073cm" svg:height="4.344cm" svg:x="2.614cm" svg:y="4.41cm">
          <text:p text:style-name="P30"><text:span text:style-name="T10">“</text:span><text:span text:style-name="T10">The processing of personal data in such a manner that the personal data </text:span><text:span text:style-name="T3"><text:line-break/></text:span><text:span text:style-name="T10">can no longer be attributed to a specific data subject without the use of </text:span><text:span text:style-name="T3"><text:line-break/></text:span><text:span text:style-name="T10">additional information, provided that such additional information is kept </text:span><text:span text:style-name="T3"><text:line-break/></text:span><text:span text:style-name="T10">separately and is subject to technical and organisational measures to </text:span><text:span text:style-name="T3"><text:line-break/></text:span><text:span text:style-name="T10">ensure that the personal data are not attributed to an identified or </text:span><text:span text:style-name="T3"><text:line-break/></text:span><text:span text:style-name="T10">identifiable natural person” - GDPR article 4(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0;p108" draw:style-name="gr19" draw:text-style-name="P9" xml:id="id95" draw:id="id95" draw:layer="layout" svg:width="1.177cm" svg:height="0.855cm" svg:x="0.98cm" svg:y="4.39cm">
          <draw:image xlink:href="Pictures/100000000000032000000215F33B6484BB0748B4.png" xlink:type="simple" xlink:show="embed" xlink:actuate="onLoad">
            <text:p/>
          </draw:image>
        </draw:frame>
        <draw:custom-shape draw:name="Google Shape;591;p108" draw:style-name="gr14" draw:text-style-name="P8" xml:id="id99" draw:id="id99" draw:layer="layout" svg:width="20.665cm" svg:height="1.596cm" svg:x="2.402cm" svg:y="10.625cm">
          <text:p text:style-name="P3"><text:span text:style-name="T3">Pseudonymised data is still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2;p108" draw:style-name="gr36" draw:text-style-name="P9" xml:id="id98" draw:id="id98" draw:layer="layout" svg:width="1.338cm" svg:height="1.411cm" svg:x="0.85cm" svg:y="10.506cm">
          <draw:image xlink:href="Pictures/10000201000000A300000448EACA50CF4303650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4" smil:attributeName="visibility" smil:to="visible"/>
                  <anim:transitionFilter smil:dur="1s" smil:targetElement="id9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5" smil:attributeName="visibility" smil:to="visible"/>
                  <anim:transitionFilter smil:dur="1s" smil:targetElement="id95" smil:type="fade" smil:subtype="crossfade"/>
                </anim:par>
                <anim:par smil:begin="0s" smil:fill="hold" presentation:node-type="with-previous" presentation:preset-class="entrance" presentation:preset-id="ooo-entrance-fade-in">
                  <anim:set smil:begin="0s" smil:dur="0.001s" smil:fill="hold" smil:targetElement="id96" smil:attributeName="visibility" smil:to="visible"/>
                  <anim:transitionFilter smil:dur="1s" smil:targetElement="id9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7" smil:attributeName="visibility" smil:to="visible"/>
                  <anim:transitionFilter smil:dur="1s" smil:targetElement="id9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8" smil:attributeName="visibility" smil:to="visible"/>
                  <anim:transitionFilter smil:dur="1s" smil:targetElement="id98" smil:type="fade" smil:subtype="crossfade"/>
                </anim:par>
                <anim:par smil:begin="0s" smil:fill="hold" presentation:node-type="with-previous" presentation:preset-class="entrance" presentation:preset-id="ooo-entrance-fade-in">
                  <anim:set smil:begin="0s" smil:dur="0.001s" smil:fill="hold" smil:targetElement="id99" smil:attributeName="visibility" smil:to="visible"/>
                  <anim:transitionFilter smil:dur="1s" smil:targetElement="id99" smil:type="fade" smil:subtype="crossfade"/>
                </anim:par>
              </anim:par>
            </anim:par>
          </anim:seq>
        </anim:par>
        <presentation:notes draw:style-name="dp2">
          <draw:custom-shape draw:name="Google Shape;583;p16: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84;p16:notes" draw:style-name="gr3" draw:layer="layout" svg:width="0.002cm" svg:height="0.002cm" svg:x="0cm" svg:y="1.931cm" draw:page-number="16" presentation:class="page"/>
          <draw:frame draw:name="Google Shape;585;p16:notes" presentation:style-name="pr19" draw:text-style-name="P10" draw:layer="layout" svg:width="15.238cm" svg:height="11.428cm" svg:x="1.905cm" svg:y="12.065cm" presentation:class="notes" presentation:placeholder="true" presentation:user-transformed="true">
            <draw:text-box/>
          </draw:frame>
        </presentation:notes>
      </draw:page>
      <draw:page draw:name="page17" draw:style-name="dp1" draw:master-page-name="BLANK">
        <draw:custom-shape draw:name="Google Shape;598;p109" draw:style-name="gr38" draw:text-style-name="P26" xml:id="id100" draw:id="id100" draw:layer="layout" svg:width="19.355cm" svg:height="2.497cm" svg:x="2.721cm" svg:y="1.346cm">
          <text:p text:style-name="P16"><text:span text:style-name="T38">Anonymou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99;p109" draw:style-name="gr14" draw:text-style-name="P8" xml:id="id101" draw:id="id101" draw:layer="layout" svg:width="20.665cm" svg:height="3.944cm" svg:x="1.15cm" svg:y="5.22cm">
          <text:list text:style-name="L7">
            <text:list-item>
              <text:p text:style-name="P15"><text:span text:style-name="T3">Anonymous data cannot in any way be used to identify individuals in a data material, either:</text:span></text:p>
            </text:list-item>
          </text:list>
          <text:list text:style-name="L8">
            <text:list-item>
              <text:list>
                <text:list-item>
                  <text:p text:style-name="P15"><text:span text:style-name="T3">directly by name or personal identification number or </text:span></text:p>
                </text:list-item>
                <text:list-item>
                  <text:p text:style-name="P15"><text:span text:style-name="T3">indirectly by additional informat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0;p109" draw:style-name="gr14" draw:text-style-name="P8" xml:id="id103" draw:id="id103" draw:layer="layout" svg:width="20.665cm" svg:height="1.596cm" svg:x="2.402cm" svg:y="9.778cm">
          <text:p text:style-name="P3"><text:span text:style-name="T3">Not possible for many data types, such as genetic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1;p109" draw:style-name="gr36" draw:text-style-name="P9" xml:id="id102" draw:id="id102" draw:layer="layout" svg:width="1.338cm" svg:height="1.411cm" svg:x="0.85cm" svg:y="9.66cm">
          <draw:image xlink:href="Pictures/10000201000000A300000448EACA50CF4303650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0" smil:attributeName="visibility" smil:to="visible"/>
                  <anim:transitionFilter smil:dur="1s" smil:targetElement="id10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1" smil:attributeName="visibility" smil:to="visible"/>
                  <anim:transitionFilter smil:dur="1s" smil:targetElement="id10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2" smil:attributeName="visibility" smil:to="visible"/>
                  <anim:transitionFilter smil:dur="1s" smil:targetElement="id102" smil:type="fade" smil:subtype="crossfade"/>
                </anim:par>
                <anim:par smil:begin="0s" smil:fill="hold" presentation:node-type="with-previous" presentation:preset-class="entrance" presentation:preset-id="ooo-entrance-fade-in">
                  <anim:set smil:begin="0s" smil:dur="0.001s" smil:fill="hold" smil:targetElement="id103" smil:attributeName="visibility" smil:to="visible"/>
                  <anim:transitionFilter smil:dur="1s" smil:targetElement="id103" smil:type="fade" smil:subtype="crossfade"/>
                </anim:par>
              </anim:par>
            </anim:par>
          </anim:seq>
        </anim:par>
        <presentation:notes draw:style-name="dp2">
          <draw:custom-shape draw:name="Google Shape;594;p17: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95;p17:notes" draw:style-name="gr3" draw:layer="layout" svg:width="0.002cm" svg:height="0.002cm" svg:x="0cm" svg:y="1.931cm" draw:page-number="17" presentation:class="page"/>
          <draw:frame draw:name="Google Shape;596;p17:notes" presentation:style-name="pr20" draw:text-style-name="P10" draw:layer="layout" svg:width="15.238cm" svg:height="11.428cm" svg:x="1.905cm" svg:y="12.065cm" presentation:class="notes" presentation:placeholder="true" presentation:user-transformed="true">
            <draw:text-box/>
          </draw:frame>
        </presentation:notes>
      </draw:page>
      <draw:page draw:name="page18" draw:style-name="dp1" draw:master-page-name="BLANK">
        <draw:custom-shape draw:name="Google Shape;607;p110" draw:style-name="gr27" draw:text-style-name="P23" draw:layer="layout" svg:width="7.196cm" svg:height="1.122cm" svg:x="2.76cm" svg:y="3.422cm">
          <text:p text:style-name="P7"><text:span text:style-name="T10">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08;p110" draw:style-name="gr28" draw:text-style-name="P24" draw:layer="layout" svg:width="7.373cm" svg:height="1.122cm" svg:x="2.76cm" svg:y="4.97cm">
          <text:p text:style-name="P7"><text:span text:style-name="T10">Sensitive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09;p110" draw:style-name="gr29" draw:text-style-name="P25" draw:layer="layout" svg:width="7.196cm" svg:height="1.122cm" svg:x="2.76cm" svg:y="6.451cm">
          <text:p text:style-name="P7"><text:span text:style-name="T11">Genetic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10;p110" draw:style-name="gr39" draw:text-style-name="P31" draw:layer="layout" svg:width="6.417cm" svg:height="1.122cm" svg:x="2.76cm" svg:y="7.933cm">
          <text:p text:style-name="P7"><text:span text:style-name="T11">Pseu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11;p110" draw:style-name="gr30" draw:text-style-name="P26" draw:layer="layout" svg:width="6.417cm" svg:height="1.122cm" svg:x="2.76cm" svg:y="9.415cm">
          <text:p text:style-name="P7"><text:span text:style-name="T10">An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12;p110" draw:style-name="gr40" draw:text-style-name="P32" xml:id="id106" draw:id="id106" draw:layer="layout" svg:width="10.242cm" svg:height="1.708cm" svg:x="12.119cm" svg:y="5.115cm">
          <text:p text:style-name="P7"><text:span text:style-name="T11">Storage and processing of personal (sensitive) data: How &amp; Whe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13;p110" draw:style-name="gr41" draw:text-style-name="P8" xml:id="id107" draw:id="id107" draw:layer="layout" svg:width="10.242cm" svg:height="5.346cm" svg:x="12.542cm" svg:y="7.03cm">
          <text:list text:style-name="L9">
            <text:list-item>
              <text:p text:style-name="P33"><text:span text:style-name="T11">Fairness and Transparency</text:span></text:p>
            </text:list-item>
            <text:list-item>
              <text:p text:style-name="P33"><text:span text:style-name="T11">Data Minimisation</text:span></text:p>
            </text:list-item>
            <text:list-item>
              <text:p text:style-name="P33"><text:span text:style-name="T11">Data Accuracy</text:span></text:p>
            </text:list-item>
            <text:list-item>
              <text:p text:style-name="P33"><text:span text:style-name="T11">Storage Limitation</text:span></text:p>
            </text:list-item>
            <text:list-item>
              <text:p text:style-name="P33"><text:span text:style-name="T11">Integrity and Confidentiality</text:span></text:p>
            </text:list-item>
            <text:list-item>
              <text:p text:style-name="P33"><text:span text:style-name="T11">Accountability</text:span></text:p>
            </text:list-item>
          </text:list>
          <text:p text:style-name="P7"><text:span text:style-name="T1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14;p110" draw:style-name="gr42" draw:text-style-name="P9" draw:layer="layout" svg:width="1.829cm" svg:height="1.344cm" svg:x="0.718cm" svg:y="3.201cm">
          <draw:image xlink:href="Pictures/10000201000000ED00000449C8AB390A94284B94.png" xlink:type="simple" xlink:show="embed" xlink:actuate="onLoad">
            <text:p/>
          </draw:image>
        </draw:frame>
        <draw:frame draw:name="Google Shape;615;p110" draw:style-name="gr42" draw:text-style-name="P9" draw:layer="layout" svg:width="1.829cm" svg:height="1.344cm" svg:x="0.718cm" svg:y="4.682cm">
          <draw:image xlink:href="Pictures/10000201000000ED00000449C8AB390A94284B94.png" xlink:type="simple" xlink:show="embed" xlink:actuate="onLoad">
            <text:p/>
          </draw:image>
        </draw:frame>
        <draw:frame draw:name="Google Shape;616;p110" draw:style-name="gr42" draw:text-style-name="P9" draw:layer="layout" svg:width="1.829cm" svg:height="1.344cm" svg:x="0.718cm" svg:y="6.164cm">
          <draw:image xlink:href="Pictures/10000201000000ED00000449C8AB390A94284B94.png" xlink:type="simple" xlink:show="embed" xlink:actuate="onLoad">
            <text:p/>
          </draw:image>
        </draw:frame>
        <draw:frame draw:name="Google Shape;617;p110" draw:style-name="gr42" draw:text-style-name="P9" draw:layer="layout" svg:width="1.829cm" svg:height="1.344cm" svg:x="0.718cm" svg:y="7.646cm">
          <draw:image xlink:href="Pictures/10000201000000ED00000449C8AB390A94284B94.png" xlink:type="simple" xlink:show="embed" xlink:actuate="onLoad">
            <text:p/>
          </draw:image>
        </draw:frame>
        <draw:frame draw:name="Google Shape;618;p110" draw:style-name="gr42" draw:text-style-name="P9" draw:layer="layout" svg:width="1.829cm" svg:height="1.344cm" svg:x="0.718cm" svg:y="9.127cm">
          <draw:image xlink:href="Pictures/10000201000000ED00000449C8AB390A94284B94.png" xlink:type="simple" xlink:show="embed" xlink:actuate="onLoad">
            <text:p/>
          </draw:image>
        </draw:frame>
        <draw:custom-shape draw:name="Google Shape;619;p110" draw:style-name="gr43" draw:text-style-name="P34" xml:id="id105" draw:id="id105" draw:layer="layout" svg:width="10.094cm" svg:height="1.708cm" svg:x="12.119cm" svg:y="3.201cm">
          <text:p text:style-name="P7"><text:span text:style-name="T11">Data subjects, processing, controller, and processo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20;p110" draw:style-name="gr4" draw:text-style-name="P8" draw:layer="layout" svg:width="9.081cm" svg:height="2.382cm" svg:x="1.566cm" svg:y="0.257cm">
          <text:p text:style-name="P11"><text:span text:style-name="T39">What 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1;p110" draw:style-name="gr4" draw:text-style-name="P8" xml:id="id104" draw:id="id104" draw:layer="layout" svg:width="12.955cm" svg:height="2.382cm" svg:x="11.3cm" svg:y="0.393cm">
          <text:p text:style-name="P11"><text:span text:style-name="T40">What does GDPR say ab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4" smil:attributeName="visibility" smil:to="visible"/>
                  <anim:transitionFilter smil:dur="1s" smil:targetElement="id10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5" smil:attributeName="visibility" smil:to="visible"/>
                  <anim:transitionFilter smil:dur="1s" smil:targetElement="id105" smil:type="fade" smil:subtype="crossfade"/>
                </anim:par>
                <anim:par smil:begin="0s" smil:fill="hold" presentation:node-type="with-previous" presentation:preset-class="entrance" presentation:preset-id="ooo-entrance-fade-in">
                  <anim:set smil:begin="0s" smil:dur="0.001s" smil:fill="hold" smil:targetElement="id106" smil:attributeName="visibility" smil:to="visible"/>
                  <anim:transitionFilter smil:dur="0.4s" smil:targetElement="id10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7" smil:attributeName="visibility" smil:to="visible"/>
                  <anim:transitionFilter smil:dur="0.4s" smil:targetElement="id107" smil:type="fade" smil:subtype="crossfade"/>
                </anim:par>
              </anim:par>
            </anim:par>
          </anim:seq>
        </anim:par>
        <presentation:notes draw:style-name="dp2">
          <draw:custom-shape draw:name="Google Shape;603;p18: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04;p18:notes" draw:style-name="gr3" draw:layer="layout" svg:width="0.002cm" svg:height="0.002cm" svg:x="0cm" svg:y="1.931cm" draw:page-number="18" presentation:class="page"/>
          <draw:frame draw:name="Google Shape;605;p18:notes" presentation:style-name="pr21" draw:text-style-name="P10" draw:layer="layout" svg:width="15.238cm" svg:height="11.428cm" svg:x="1.905cm" svg:y="12.065cm" presentation:class="notes" presentation:placeholder="true" presentation:user-transformed="true">
            <draw:text-box/>
          </draw:frame>
        </presentation:notes>
      </draw:page>
      <draw:page draw:name="page19" draw:style-name="dp1" draw:master-page-name="BLANK">
        <draw:custom-shape draw:name="Google Shape;627;p111" draw:style-name="gr44" draw:text-style-name="P35" xml:id="id110" draw:id="id110" draw:layer="layout" svg:width="21.444cm" svg:height="1.596cm" svg:x="2.751cm" svg:y="2.292cm">
          <text:p text:style-name="P16"><text:span text:style-name="T31">Data subjects, processing, controller, and processo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28;p111" draw:style-name="gr14" draw:text-style-name="P8" xml:id="id111" draw:id="id111" draw:layer="layout" svg:width="23.398cm" svg:height="2.115cm" svg:x="1.006cm" svg:y="4.368cm">
          <text:list text:style-name="L11">
            <text:list-item>
              <text:p text:style-name="P15"><text:span text:style-name="T41">Data subject</text:span><text:span text:style-name="T19">: </text:span><text:span text:style-name="T3"><text:line-break/></text:span><text:span text:style-name="T19">“the natural person information relates to.”- GDPR article 4(1)</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9;p111" draw:style-name="gr14" draw:text-style-name="P8" xml:id="id112" draw:id="id112" draw:layer="layout" svg:width="23.398cm" svg:height="3.156cm" svg:x="1.006cm" svg:y="6.485cm">
          <text:list text:style-name="L11">
            <text:list-item>
              <text:p text:style-name="P15"><text:span text:style-name="T41">Data Processing:</text:span><text:span text:style-name="T19"> </text:span><text:span text:style-name="T3"><text:line-break/></text:span><text:span text:style-name="T19">“any operation or set of operations which is performed on personal data or on sets of personal data.” - GDPR article 4(2)</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p111" draw:style-name="gr14" draw:text-style-name="P8" xml:id="id113" draw:id="id113" draw:layer="layout" svg:width="23.692cm" svg:height="1.596cm" svg:x="1.006cm" svg:y="9.448cm">
          <text:list text:style-name="L11">
            <text:list-item>
              <text:p text:style-name="P15"><text:span text:style-name="T41">Data Controller: </text:span><text:span text:style-name="T19">determines the purposes and means of the processing of personal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p111" draw:style-name="gr14" draw:text-style-name="P8" xml:id="id114" draw:id="id114" draw:layer="layout" svg:width="22.498cm" svg:height="1.596cm" svg:x="1.006cm" svg:y="11.046cm">
          <text:list text:style-name="L11">
            <text:list-item>
              <text:p text:style-name="P15"><text:span text:style-name="T41">Data Processor: </text:span><text:span text:style-name="T19">processes personal data on behalf of the controll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2;p111" draw:style-name="gr9" draw:text-style-name="P8" xml:id="id115" draw:id="id115" draw:layer="layout" svg:width="24.056cm" svg:height="1.04cm" svg:x="0.78cm" svg:y="12.906cm">
          <text:p text:style-name="P3"><text:span text:style-name="T12">Further reading: </text:span><text:span text:style-name="T42"><text:a xlink:href="https://eur-lex.europa.eu/legal-content/EN/TXT/HTML/?uri=CELEX:32016R0679&amp;from=EN#d1e1489-1-1" xlink:type="simple">https://eur-lex.europa.eu/legal-content/EN/TXT/HTML/?uri=CELEX:32016R0679&amp;from=EN#d1e1489-1-1</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3;p111" draw:style-name="gr45" draw:text-style-name="P29" xml:id="id109" draw:id="id109" draw:layer="layout" svg:width="12.521cm" svg:height="1.288cm" svg:x="1.991cm" svg:y="0.578cm">
          <text:p text:style-name="P11"><text:span text:style-name="T43">What does GDPR say ab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4;p111" draw:style-name="gr19" draw:text-style-name="P9" xml:id="id108" draw:id="id108" draw:layer="layout" svg:width="1.177cm" svg:height="0.855cm" svg:x="0.6cm" svg:y="0.578cm">
          <draw:image xlink:href="Pictures/100000000000032000000215F33B6484BB0748B4.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8" smil:attributeName="visibility" smil:to="visible"/>
                  <anim:transitionFilter smil:dur="1s" smil:targetElement="id108" smil:type="fade" smil:subtype="crossfade"/>
                </anim:par>
                <anim:par smil:begin="0s" smil:fill="hold" presentation:node-type="with-previous" presentation:preset-class="entrance" presentation:preset-id="ooo-entrance-fade-in">
                  <anim:set smil:begin="0s" smil:dur="0.001s" smil:fill="hold" smil:targetElement="id109" smil:attributeName="visibility" smil:to="visible"/>
                  <anim:transitionFilter smil:dur="1s" smil:targetElement="id10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0" smil:attributeName="visibility" smil:to="visible"/>
                  <anim:transitionFilter smil:dur="0.4s" smil:targetElement="id110" smil:type="fade" smil:subtype="crossfade"/>
                </anim:par>
                <anim:par smil:begin="0s" smil:fill="hold" presentation:node-type="with-previous" presentation:preset-class="entrance" presentation:preset-id="ooo-entrance-fade-in">
                  <anim:set smil:begin="0s" smil:dur="0.001s" smil:fill="hold" smil:targetElement="id111" smil:attributeName="visibility" smil:to="visible"/>
                  <anim:transitionFilter smil:dur="1s" smil:targetElement="id1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2" smil:attributeName="visibility" smil:to="visible"/>
                  <anim:transitionFilter smil:dur="1s" smil:targetElement="id1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3" smil:attributeName="visibility" smil:to="visible"/>
                  <anim:transitionFilter smil:dur="1s" smil:targetElement="id1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4" smil:attributeName="visibility" smil:to="visible"/>
                  <anim:transitionFilter smil:dur="1s" smil:targetElement="id1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5" smil:attributeName="visibility" smil:to="visible"/>
                  <anim:transitionFilter smil:dur="1s" smil:targetElement="id115" smil:type="fade" smil:subtype="crossfade"/>
                </anim:par>
              </anim:par>
            </anim:par>
          </anim:seq>
        </anim:par>
        <presentation:notes draw:style-name="dp2">
          <draw:custom-shape draw:name="Google Shape;623;p19: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24;p19:notes" draw:style-name="gr3" draw:layer="layout" svg:width="0.002cm" svg:height="0.002cm" svg:x="0cm" svg:y="1.931cm" draw:page-number="19" presentation:class="page"/>
          <draw:frame draw:name="Google Shape;625;p19:notes" presentation:style-name="pr22" draw:text-style-name="P10" draw:layer="layout" svg:width="15.238cm" svg:height="11.428cm" svg:x="1.905cm" svg:y="12.065cm" presentation:class="notes" presentation:placeholder="true" presentation:user-transformed="true">
            <draw:text-box/>
          </draw:frame>
        </presentation:notes>
      </draw:page>
      <draw:page draw:name="page20" draw:style-name="dp1" draw:master-page-name="BLANK">
        <draw:custom-shape draw:name="Google Shape;640;p112" draw:style-name="gr46" draw:text-style-name="P32" xml:id="id116" draw:id="id116" draw:layer="layout" svg:width="21.444cm" svg:height="1.596cm" svg:x="2.751cm" svg:y="0.961cm">
          <text:p text:style-name="P16"><text:span text:style-name="T31">Conditions to store/process personal (sensitive)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41;p112" draw:style-name="gr14" draw:text-style-name="P8" xml:id="id117" draw:id="id117" draw:layer="layout" svg:width="23.398cm" svg:height="1.343cm" svg:x="0.794cm" svg:y="3.023cm">
          <text:list text:style-name="L12">
            <text:list-item>
              <text:p text:style-name="P15"><text:span text:style-name="T44">Lawful and transparent manner (‘</text:span><text:span text:style-name="T45">lawfulness, fairness and transparency</text:span><text:span text:style-name="T4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2;p112" draw:style-name="gr14" draw:text-style-name="P8" xml:id="id118" draw:id="id118" draw:layer="layout" svg:width="23.398cm" svg:height="1.136cm" svg:x="0.794cm" svg:y="4.368cm">
          <text:list text:style-name="L12">
            <text:list-item>
              <text:p text:style-name="P15"><text:span text:style-name="T44">Specific purposes (‘</text:span><text:span text:style-name="T45">purpose limitation</text:span><text:span text:style-name="T4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3;p112" draw:style-name="gr14" draw:text-style-name="P8" xml:id="id119" draw:id="id119" draw:layer="layout" svg:width="23.692cm" svg:height="0.981cm" svg:x="0.75cm" svg:y="5.506cm">
          <text:list text:style-name="L12">
            <text:list-item>
              <text:p text:style-name="P15"><text:span text:style-name="T44">Only the personal data that is necessary to fulfil that purpose (‘</text:span><text:span text:style-name="T45">data minimisation</text:span><text:span text:style-name="T4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4;p112" draw:style-name="gr14" draw:text-style-name="P8" xml:id="id120" draw:id="id120" draw:layer="layout" svg:width="22.498cm" svg:height="1.596cm" svg:x="0.75cm" svg:y="6.68cm">
          <text:list text:style-name="L12">
            <text:list-item>
              <text:p text:style-name="P15"><text:span text:style-name="T44">Stored for no longer than necessary (‘</text:span><text:span text:style-name="T45">storage limitation</text:span><text:span text:style-name="T4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5;p112" draw:style-name="gr9" draw:text-style-name="P8" xml:id="id124" draw:id="id124" draw:layer="layout" svg:width="24.056cm" svg:height="1.04cm" svg:x="0.78cm" svg:y="12.906cm">
          <text:p text:style-name="P3"><text:span text:style-name="T12">Further reading: </text:span><text:span text:style-name="T42"><text:a xlink:href="https://eur-lex.europa.eu/legal-content/EN/TXT/HTML/?uri=CELEX:32016R0679&amp;from=EN#d1e1807-1-1" xlink:type="simple">https://eur-lex.europa.eu/legal-content/EN/TXT/HTML/?uri=CELEX:32016R0679&amp;from=EN#d1e1807-1-1</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p112" draw:style-name="gr14" draw:text-style-name="P8" xml:id="id121" draw:id="id121" draw:layer="layout" svg:width="22.498cm" svg:height="1.596cm" svg:x="0.75cm" svg:y="7.95cm">
          <text:list text:style-name="L12">
            <text:list-item>
              <text:p text:style-name="P15"><text:span text:style-name="T45">Data Accurac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p112" draw:style-name="gr14" draw:text-style-name="P8" xml:id="id122" draw:id="id122" draw:layer="layout" svg:width="22.498cm" svg:height="2.426cm" svg:x="0.75cm" svg:y="9.008cm">
          <text:list text:style-name="L12">
            <text:list-item>
              <text:p text:style-name="P15"><text:span text:style-name="T44">Technical and organisational safeguards that ensure the security of the personal data, including protection against unauthorised or unlawful processing and against accidental loss, destruction or damage, using appropriate technology (‘</text:span><text:span text:style-name="T45">integrity and confidentiality</text:span><text:span text:style-name="T4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12" draw:style-name="gr14" draw:text-style-name="P8" xml:id="id123" draw:id="id123" draw:layer="layout" svg:width="22.498cm" svg:height="1.596cm" svg:x="0.75cm" svg:y="11.336cm">
          <text:list text:style-name="L12">
            <text:list-item>
              <text:p text:style-name="P15"><text:span text:style-name="T45">Accountability → </text:span><text:span text:style-name="T44">Immediate reporting of incide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6" smil:attributeName="visibility" smil:to="visible"/>
                  <anim:transitionFilter smil:dur="0.4s" smil:targetElement="id1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7" smil:attributeName="visibility" smil:to="visible"/>
                  <anim:transitionFilter smil:dur="1s" smil:targetElement="id1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8" smil:attributeName="visibility" smil:to="visible"/>
                  <anim:transitionFilter smil:dur="1s" smil:targetElement="id1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9" smil:attributeName="visibility" smil:to="visible"/>
                  <anim:transitionFilter smil:dur="1s" smil:targetElement="id1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0" smil:attributeName="visibility" smil:to="visible"/>
                  <anim:transitionFilter smil:dur="1s" smil:targetElement="id1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1" smil:attributeName="visibility" smil:to="visible"/>
                  <anim:transitionFilter smil:dur="1s" smil:targetElement="id1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2" smil:attributeName="visibility" smil:to="visible"/>
                  <anim:transitionFilter smil:dur="1s" smil:targetElement="id1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3" smil:attributeName="visibility" smil:to="visible"/>
                  <anim:transitionFilter smil:dur="1s" smil:targetElement="id1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4" smil:attributeName="visibility" smil:to="visible"/>
                  <anim:transitionFilter smil:dur="1s" smil:targetElement="id124" smil:type="fade" smil:subtype="crossfade"/>
                </anim:par>
              </anim:par>
            </anim:par>
          </anim:seq>
        </anim:par>
        <presentation:notes draw:style-name="dp2">
          <draw:custom-shape draw:name="Google Shape;636;p20: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37;p20:notes" draw:style-name="gr3" draw:layer="layout" svg:width="0.002cm" svg:height="0.002cm" svg:x="0cm" svg:y="1.931cm" draw:page-number="20" presentation:class="page"/>
          <draw:frame draw:name="Google Shape;638;p20:notes" presentation:style-name="pr23" draw:text-style-name="P10" draw:layer="layout" svg:width="15.238cm" svg:height="11.428cm" svg:x="1.905cm" svg:y="12.065cm" presentation:class="notes" presentation:placeholder="true" presentation:user-transformed="true">
            <draw:text-box/>
          </draw:frame>
        </presentation:notes>
      </draw:page>
      <draw:page draw:name="page21" draw:style-name="dp1" draw:master-page-name="BLANK">
        <draw:custom-shape draw:name="Google Shape;654;p113" draw:style-name="gr46" draw:text-style-name="P32" xml:id="id125" draw:id="id125" draw:layer="layout" svg:width="21.444cm" svg:height="1.596cm" svg:x="2.751cm" svg:y="0.961cm">
          <text:p text:style-name="P16"><text:span text:style-name="T31">Criteria to store/process personal (sensitive)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55;p113" draw:style-name="gr14" draw:text-style-name="P8" xml:id="id130" draw:id="id130" draw:layer="layout" svg:width="21.065cm" svg:height="1.922cm" svg:x="1.276cm" svg:y="5.292cm">
          <text:list text:style-name="L11">
            <text:list-item>
              <text:p text:style-name="P15"><text:span text:style-name="T19">The data is processed for </text:span><text:span text:style-name="T41">archiving, scientific or historical research</text:span><text:span text:style-name="T19"> purposes or statistical purposes on the basis of EU or national law.</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p113" draw:style-name="gr14" draw:text-style-name="P8" xml:id="id131" draw:id="id131" draw:layer="layout" svg:width="22.498cm" svg:height="1.596cm" svg:x="1.173cm" svg:y="7.437cm">
          <text:list text:style-name="L11">
            <text:list-item>
              <text:p text:style-name="P15"><text:span text:style-name="T19">“</text:span><text:span text:style-name="T19">Tasks carried out in the public interest” - Article 6, GDP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7;p113" draw:style-name="gr9" draw:text-style-name="P8" xml:id="id133" draw:id="id133" draw:layer="layout" svg:width="24.422cm" svg:height="1.822cm" svg:x="0.488cm" svg:y="11.57cm">
          <text:p text:style-name="P3"><text:span text:style-name="T46">Further readings:</text:span></text:p>
          <text:list text:style-name="L13">
            <text:list-item>
              <text:p text:style-name="P3"><text:span text:style-name="T47"><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3"><text:span text:style-name="T47"><text:a xlink:href="https://lovdata.no/dokument/NL/lov/2008-06-20-44/KAPITTEL_4#KAPITTEL_4" xlink:type="simple">https://lovdata.no/dokument/NL/lov/2008-06-20-44/KAPITTEL_4#KAPITTEL_4</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113" draw:style-name="gr14" draw:text-style-name="P8" xml:id="id126" draw:id="id126" draw:layer="layout" svg:width="22.498cm" svg:height="1.596cm" svg:x="1.694cm" svg:y="3.278cm">
          <text:p text:style-name="P17"><text:span text:style-name="T19">Explicit consent from particip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9;p113" draw:style-name="gr25" draw:text-style-name="P9" xml:id="id127" draw:id="id127" draw:layer="layout" svg:width="2.446cm" svg:height="1.922cm" svg:x="0.329cm" svg:y="2.977cm">
          <draw:image xlink:href="Pictures/10000201000000ED00000449C8AB390A94284B94.png" xlink:type="simple" xlink:show="embed" xlink:actuate="onLoad">
            <text:p/>
          </draw:image>
        </draw:frame>
        <draw:custom-shape draw:name="Google Shape;660;p113" draw:style-name="gr7" draw:text-style-name="P13" xml:id="id128" draw:id="id128" draw:layer="layout" svg:width="5.391cm" svg:height="0.981cm" svg:x="12.474cm" svg:y="3.377cm">
          <text:p text:style-name="P7"><text:span text:style-name="T48">Health Research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61;p113" draw:style-name="gr2" draw:text-style-name="P9" xml:id="id129" draw:id="id129" draw:layer="layout" svg:width="0.875cm" svg:height="0.635cm" svg:x="18.144cm" svg:y="3.563cm">
          <draw:image xlink:href="Pictures/100000000000020000000174C5E145BF6683B30C.png" xlink:type="simple" xlink:show="embed" xlink:actuate="onLoad">
            <text:p/>
          </draw:image>
        </draw:frame>
        <draw:custom-shape draw:name="Google Shape;662;p113" draw:style-name="gr14" draw:text-style-name="P8" xml:id="id132" draw:id="id132" draw:layer="layout" svg:width="23.395cm" svg:height="2.56cm" svg:x="0.006cm" svg:y="9.008cm">
          <text:list text:style-name="L14">
            <text:list-item>
              <text:p text:style-name="P36"><text:span text:style-name="T19">“</text:span><text:span text:style-name="T19">It is not always possible to fully identify the purpose of personal data processing for scientific research purposes at the time of data collection” - GDPR, Recital 33</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5" smil:attributeName="visibility" smil:to="visible"/>
                  <anim:transitionFilter smil:dur="0.4s" smil:targetElement="id1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6" smil:attributeName="visibility" smil:to="visible"/>
                  <anim:transitionFilter smil:dur="1s" smil:targetElement="id126" smil:type="fade" smil:subtype="crossfade"/>
                </anim:par>
                <anim:par smil:begin="0s" smil:fill="hold" presentation:node-type="with-previous" presentation:preset-class="entrance" presentation:preset-id="ooo-entrance-fade-in">
                  <anim:set smil:begin="0s" smil:dur="0.001s" smil:fill="hold" smil:targetElement="id127" smil:attributeName="visibility" smil:to="visible"/>
                  <anim:transitionFilter smil:dur="1s" smil:targetElement="id127" smil:type="fade" smil:subtype="crossfade"/>
                </anim:par>
                <anim:par smil:begin="0s" smil:fill="hold" presentation:node-type="with-previous" presentation:preset-class="entrance" presentation:preset-id="ooo-entrance-fade-in">
                  <anim:set smil:begin="0s" smil:dur="0.001s" smil:fill="hold" smil:targetElement="id128" smil:attributeName="visibility" smil:to="visible"/>
                  <anim:transitionFilter smil:dur="1s" smil:targetElement="id128" smil:type="fade" smil:subtype="crossfade"/>
                </anim:par>
                <anim:par smil:begin="0s" smil:fill="hold" presentation:node-type="with-previous" presentation:preset-class="entrance" presentation:preset-id="ooo-entrance-fade-in">
                  <anim:set smil:begin="0s" smil:dur="0.001s" smil:fill="hold" smil:targetElement="id129" smil:attributeName="visibility" smil:to="visible"/>
                  <anim:transitionFilter smil:dur="1s" smil:targetElement="id1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0" smil:attributeName="visibility" smil:to="visible"/>
                  <anim:transitionFilter smil:dur="1s" smil:targetElement="id1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1" smil:attributeName="visibility" smil:to="visible"/>
                  <anim:transitionFilter smil:dur="1s" smil:targetElement="id1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2" smil:attributeName="visibility" smil:to="visible"/>
                  <anim:transitionFilter smil:dur="1s" smil:targetElement="id1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3" smil:attributeName="visibility" smil:to="visible"/>
                  <anim:transitionFilter smil:dur="1s" smil:targetElement="id133" smil:type="fade" smil:subtype="crossfade"/>
                </anim:par>
              </anim:par>
            </anim:par>
          </anim:seq>
        </anim:par>
        <presentation:notes draw:style-name="dp2">
          <draw:custom-shape draw:name="Google Shape;650;p21: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51;p21:notes" draw:style-name="gr3" draw:layer="layout" svg:width="0.002cm" svg:height="0.002cm" svg:x="0cm" svg:y="1.931cm" draw:page-number="21" presentation:class="page"/>
          <draw:frame draw:name="Google Shape;652;p21:notes" presentation:style-name="pr24" draw:text-style-name="P10" draw:layer="layout" svg:width="15.238cm" svg:height="11.428cm" svg:x="1.905cm" svg:y="12.065cm" presentation:class="notes" presentation:placeholder="true" presentation:user-transformed="true">
            <draw:text-box/>
          </draw:frame>
        </presentation:notes>
      </draw:page>
      <draw:page draw:name="page22" draw:style-name="dp1" draw:master-page-name="BLANK">
        <draw:custom-shape draw:name="Google Shape;668;p114" draw:style-name="gr46" draw:text-style-name="P32" draw:layer="layout" svg:width="21.444cm" svg:height="1.596cm" svg:x="2.751cm" svg:y="0.961cm">
          <text:p text:style-name="P16"><text:span text:style-name="T31">Criteria to store/process personal (sensitive)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69;p114" draw:style-name="gr9" draw:text-style-name="P8" draw:layer="layout" svg:width="24.422cm" svg:height="1.822cm" svg:x="0.488cm" svg:y="11.57cm">
          <text:p text:style-name="P3"><text:span text:style-name="T46">Further readings:</text:span></text:p>
          <text:list text:style-name="L13">
            <text:list-item>
              <text:p text:style-name="P3"><text:span text:style-name="T47"><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3"><text:span text:style-name="T47"><text:a xlink:href="https://lovdata.no/dokument/NL/lov/2008-06-20-44/KAPITTEL_4#KAPITTEL_4" xlink:type="simple">https://lovdata.no/dokument/NL/lov/2008-06-20-44/KAPITTEL_4#KAPITTEL_4</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0;p114" draw:style-name="gr14" draw:text-style-name="P8" draw:layer="layout" svg:width="22.498cm" svg:height="1.596cm" svg:x="1.694cm" svg:y="3.278cm">
          <text:p text:style-name="P17"><text:span text:style-name="T19">Explicit consent from particip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1;p114" draw:style-name="gr25" draw:text-style-name="P9" draw:layer="layout" svg:width="2.446cm" svg:height="1.922cm" svg:x="0.329cm" svg:y="2.977cm">
          <draw:image xlink:href="Pictures/10000201000000ED00000449C8AB390A94284B94.png" xlink:type="simple" xlink:show="embed" xlink:actuate="onLoad">
            <text:p/>
          </draw:image>
        </draw:frame>
        <draw:custom-shape draw:name="Google Shape;672;p114" draw:style-name="gr7" draw:text-style-name="P13" draw:layer="layout" svg:width="5.391cm" svg:height="0.981cm" svg:x="12.474cm" svg:y="3.377cm">
          <text:p text:style-name="P7"><text:span text:style-name="T48">Health Research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73;p114" draw:style-name="gr2" draw:text-style-name="P9" draw:layer="layout" svg:width="0.875cm" svg:height="0.635cm" svg:x="18.144cm" svg:y="3.563cm">
          <draw:image xlink:href="Pictures/100000000000020000000174C5E145BF6683B30C.png" xlink:type="simple" xlink:show="embed" xlink:actuate="onLoad">
            <text:p/>
          </draw:image>
        </draw:frame>
        <draw:frame draw:name="Google Shape;674;p114" draw:style-name="gr36" draw:text-style-name="P9" draw:layer="layout" svg:width="1.63cm" svg:height="1.718cm" svg:x="0.882cm" svg:y="1.054cm">
          <draw:image xlink:href="Pictures/10000201000000A300000448EACA50CF4303650F.png" xlink:type="simple" xlink:show="embed" xlink:actuate="onLoad">
            <text:p/>
          </draw:image>
        </draw:frame>
        <draw:custom-shape draw:name="Google Shape;675;p114" draw:style-name="gr47" draw:text-style-name="P21" xml:id="id134" draw:id="id134" draw:layer="layout" svg:width="18.066cm" svg:height="4.174cm" svg:x="3.319cm" svg:y="5.179cm">
          <text:p text:style-name="P37"><text:span text:style-name="T26">If you are using consent as your legal basis:</text:span></text:p>
          <text:p text:style-name="P37"><text:span text:style-name="T3"/></text:p>
          <text:p text:style-name="P37"><text:span text:style-name="T26">Make sure your consent form (&amp; REK* approval) </text:span></text:p>
          <text:p text:style-name="P37"><text:span text:style-name="T26">allows controlled access deposition (e.g. to EGA**)</text:span></text:p>
          <text:p text:style-name="P37"><text:span text:style-name="T26">...before you 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6;p114" draw:style-name="gr14" draw:text-style-name="P8" xml:id="id135" draw:id="id135" draw:layer="layout" svg:width="22.498cm" svg:height="1.596cm" svg:x="0.74cm" svg:y="9.955cm">
          <text:p text:style-name="P17"><text:span text:style-name="T24">* REK: Regional Committees for Medical and Health Research Ethics</text:span><text:span text:style-name="T3"><text:line-break/></text:span><text:span text:style-name="T24">** EGA: European Genome Arch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4" smil:attributeName="visibility" smil:to="visible"/>
                  <anim:transitionFilter smil:dur="1s" smil:targetElement="id1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5" smil:attributeName="visibility" smil:to="visible"/>
                  <anim:transitionFilter smil:dur="1s" smil:targetElement="id135" smil:type="fade" smil:subtype="crossfade"/>
                </anim:par>
              </anim:par>
            </anim:par>
          </anim:seq>
        </anim:par>
        <presentation:notes draw:style-name="dp2">
          <draw:custom-shape draw:name="Google Shape;664;p22: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65;p22:notes" draw:style-name="gr3" draw:layer="layout" svg:width="0.002cm" svg:height="0.002cm" svg:x="0cm" svg:y="1.931cm" draw:page-number="22" presentation:class="page"/>
          <draw:frame draw:name="Google Shape;666;p22:notes" presentation:style-name="pr25" draw:text-style-name="P10" draw:layer="layout" svg:width="15.238cm" svg:height="11.428cm" svg:x="1.905cm" svg:y="12.065cm" presentation:class="notes" presentation:placeholder="true" presentation:user-transformed="true">
            <draw:text-box/>
          </draw:frame>
        </presentation:notes>
      </draw:page>
      <draw:page draw:name="page23" draw:style-name="dp1" draw:master-page-name="BLANK">
        <draw:custom-shape draw:name="Google Shape;682;p115" draw:style-name="gr27" draw:text-style-name="P23" draw:layer="layout" svg:width="7.196cm" svg:height="1.122cm" svg:x="2.76cm" svg:y="3.422cm">
          <text:p text:style-name="P7"><text:span text:style-name="T10">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3;p115" draw:style-name="gr28" draw:text-style-name="P24" draw:layer="layout" svg:width="7.373cm" svg:height="1.122cm" svg:x="2.76cm" svg:y="4.97cm">
          <text:p text:style-name="P7"><text:span text:style-name="T10">Sensitive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4;p115" draw:style-name="gr29" draw:text-style-name="P25" draw:layer="layout" svg:width="7.196cm" svg:height="1.122cm" svg:x="2.76cm" svg:y="6.451cm">
          <text:p text:style-name="P7"><text:span text:style-name="T11">Genetic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5;p115" draw:style-name="gr39" draw:text-style-name="P31" draw:layer="layout" svg:width="6.417cm" svg:height="1.122cm" svg:x="2.76cm" svg:y="7.933cm">
          <text:p text:style-name="P7"><text:span text:style-name="T11">Pseu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6;p115" draw:style-name="gr30" draw:text-style-name="P26" draw:layer="layout" svg:width="6.417cm" svg:height="1.122cm" svg:x="2.76cm" svg:y="9.415cm">
          <text:p text:style-name="P7"><text:span text:style-name="T10">An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7;p115" draw:style-name="gr40" draw:text-style-name="P32" draw:layer="layout" svg:width="10.242cm" svg:height="1.708cm" svg:x="12.119cm" svg:y="5.115cm">
          <text:p text:style-name="P7"><text:span text:style-name="T11">Storage and processing of personal (sensitive) data: How &amp; Whe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8;p115" draw:style-name="gr41" draw:text-style-name="P8" draw:layer="layout" svg:width="10.242cm" svg:height="5.346cm" svg:x="12.542cm" svg:y="7.03cm">
          <text:list text:style-name="L9">
            <text:list-item>
              <text:p text:style-name="P33"><text:span text:style-name="T11">Fairness and Transparency</text:span></text:p>
            </text:list-item>
            <text:list-item>
              <text:p text:style-name="P33"><text:span text:style-name="T11">Data Minimisation</text:span></text:p>
            </text:list-item>
            <text:list-item>
              <text:p text:style-name="P33"><text:span text:style-name="T11">Data Accuracy</text:span></text:p>
            </text:list-item>
            <text:list-item>
              <text:p text:style-name="P33"><text:span text:style-name="T11">Storage Limitation</text:span></text:p>
            </text:list-item>
            <text:list-item>
              <text:p text:style-name="P33"><text:span text:style-name="T11">Integrity and Confidentiality</text:span></text:p>
            </text:list-item>
            <text:list-item>
              <text:p text:style-name="P33"><text:span text:style-name="T11">Accountability</text:span></text:p>
            </text:list-item>
          </text:list>
          <text:p text:style-name="P7"><text:span text:style-name="T1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89;p115" draw:style-name="gr42" draw:text-style-name="P9" draw:layer="layout" svg:width="1.829cm" svg:height="1.344cm" svg:x="0.718cm" svg:y="3.201cm">
          <draw:image xlink:href="Pictures/10000201000000ED00000449C8AB390A94284B94.png" xlink:type="simple" xlink:show="embed" xlink:actuate="onLoad">
            <text:p/>
          </draw:image>
        </draw:frame>
        <draw:frame draw:name="Google Shape;690;p115" draw:style-name="gr42" draw:text-style-name="P9" draw:layer="layout" svg:width="1.829cm" svg:height="1.344cm" svg:x="0.718cm" svg:y="4.682cm">
          <draw:image xlink:href="Pictures/10000201000000ED00000449C8AB390A94284B94.png" xlink:type="simple" xlink:show="embed" xlink:actuate="onLoad">
            <text:p/>
          </draw:image>
        </draw:frame>
        <draw:frame draw:name="Google Shape;691;p115" draw:style-name="gr42" draw:text-style-name="P9" draw:layer="layout" svg:width="1.829cm" svg:height="1.344cm" svg:x="0.718cm" svg:y="6.164cm">
          <draw:image xlink:href="Pictures/10000201000000ED00000449C8AB390A94284B94.png" xlink:type="simple" xlink:show="embed" xlink:actuate="onLoad">
            <text:p/>
          </draw:image>
        </draw:frame>
        <draw:frame draw:name="Google Shape;692;p115" draw:style-name="gr42" draw:text-style-name="P9" draw:layer="layout" svg:width="1.829cm" svg:height="1.344cm" svg:x="0.718cm" svg:y="7.646cm">
          <draw:image xlink:href="Pictures/10000201000000ED00000449C8AB390A94284B94.png" xlink:type="simple" xlink:show="embed" xlink:actuate="onLoad">
            <text:p/>
          </draw:image>
        </draw:frame>
        <draw:frame draw:name="Google Shape;693;p115" draw:style-name="gr42" draw:text-style-name="P9" draw:layer="layout" svg:width="1.829cm" svg:height="1.344cm" svg:x="0.718cm" svg:y="9.127cm">
          <draw:image xlink:href="Pictures/10000201000000ED00000449C8AB390A94284B94.png" xlink:type="simple" xlink:show="embed" xlink:actuate="onLoad">
            <text:p/>
          </draw:image>
        </draw:frame>
        <draw:custom-shape draw:name="Google Shape;694;p115" draw:style-name="gr43" draw:text-style-name="P34" draw:layer="layout" svg:width="10.094cm" svg:height="1.708cm" svg:x="12.119cm" svg:y="3.201cm">
          <text:p text:style-name="P7"><text:span text:style-name="T11">Data subjects, processing, controller, and processo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95;p115" draw:style-name="gr4" draw:text-style-name="P8" draw:layer="layout" svg:width="9.081cm" svg:height="2.382cm" svg:x="1.566cm" svg:y="0.257cm">
          <text:p text:style-name="P11"><text:span text:style-name="T39">What 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6;p115" draw:style-name="gr4" draw:text-style-name="P8" draw:layer="layout" svg:width="12.955cm" svg:height="2.382cm" svg:x="11.3cm" svg:y="0.393cm">
          <text:p text:style-name="P11"><text:span text:style-name="T40">What does GDPR say ab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7;p115" draw:style-name="gr42" draw:text-style-name="P9" draw:layer="layout" svg:width="1.829cm" svg:height="1.344cm" svg:x="10.123cm" svg:y="3.383cm">
          <draw:image xlink:href="Pictures/10000201000000ED00000449C8AB390A94284B94.png" xlink:type="simple" xlink:show="embed" xlink:actuate="onLoad">
            <text:p/>
          </draw:image>
        </draw:frame>
        <presentation:notes draw:style-name="dp2">
          <draw:custom-shape draw:name="Google Shape;678;p23: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79;p23:notes" draw:style-name="gr3" draw:layer="layout" svg:width="0.002cm" svg:height="0.002cm" svg:x="0cm" svg:y="1.931cm" draw:page-number="23" presentation:class="page"/>
          <draw:frame draw:name="Google Shape;680;p23:notes" presentation:style-name="pr26" draw:text-style-name="P10" draw:layer="layout" svg:width="15.238cm" svg:height="11.428cm" svg:x="1.905cm" svg:y="12.065cm" presentation:class="notes" presentation:placeholder="true" presentation:user-transformed="true">
            <draw:text-box/>
          </draw:frame>
        </presentation:notes>
      </draw:page>
      <draw:page draw:name="page24" draw:style-name="dp1" draw:master-page-name="BLANK">
        <draw:custom-shape draw:name="Google Shape;703;p116" draw:style-name="gr18" draw:text-style-name="P21" draw:layer="layout" svg:width="19.355cm" svg:height="2.497cm" svg:x="2.721cm" svg:y="0.599cm">
          <text:p text:style-name="P16"><text:span text:style-name="T35">Fairness and Transparenc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04;p116" draw:style-name="gr14" draw:text-style-name="P8" draw:layer="layout" svg:width="22.498cm" svg:height="2.115cm" svg:x="1.906cm" svg:y="3.31cm">
          <text:list text:style-name="L7">
            <text:list-item>
              <text:p text:style-name="P15"><text:span text:style-name="T26">Fairness:</text:span><text:span text:style-name="T3"> We must not take advantage of our position as a research institution, we must not take advantage of our position in relation to the data subjec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5;p116" draw:style-name="gr14" draw:text-style-name="P8" draw:layer="layout" svg:width="22.498cm" svg:height="1.596cm" svg:x="1.906cm" svg:y="6.273cm">
          <text:list text:style-name="L7">
            <text:list-item>
              <text:p text:style-name="P15"><text:span text:style-name="T26">Transparency:</text:span><text:span text:style-name="T3"> The data subjects shall be informed of what we do with their personal data, and and of how to exercise their righ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6;p116" draw:style-name="gr14" draw:text-style-name="P8" draw:layer="layout" svg:width="22.498cm" svg:height="1.596cm" svg:x="1.694cm" svg:y="8.601cm">
          <text:list text:style-name="L7">
            <text:list-item>
              <text:p text:style-name="P15"><text:span text:style-name="T3">Provision of the required information in a clear and plain languag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7;p116" draw:style-name="gr9" draw:text-style-name="P8" draw:layer="layout" svg:width="24.422cm" svg:height="2.197cm" svg:x="0.488cm" svg:y="11.211cm">
          <text:p text:style-name="P3"><text:span text:style-name="T49">Further readings:</text:span></text:p>
          <text:list text:style-name="L5">
            <text:list-item>
              <text:p text:style-name="P20"><text:span text:style-name="T42"><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20"><text:span text:style-name="T42"><text:a xlink:href="https://eur-lex.europa.eu/legal-content/EN/TXT/HTML/?uri=CELEX:32016R0679&amp;from=EN#d1e1888-1-1" xlink:type="simple">https://eur-lex.europa.eu/legal-content/EN/TXT/HTML/?uri=CELEX:32016R0679&amp;from=EN#d1e1888-1-1</text:a></text:span></text:p>
            </text:list-item>
            <text:list-item>
              <text:p text:style-name="P20"><text:span text:style-name="T42"><text:a xlink:href="https://lovdata.no/dokument/NL/lov/2008-06-20-44/KAPITTEL_8#KAPITTEL_8" xlink:type="simple">https://lovdata.no/dokument/NL/lov/2008-06-20-44/KAPITTEL_8#KAPITTEL_8</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699;p24: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00;p24:notes" draw:style-name="gr3" draw:layer="layout" svg:width="0.002cm" svg:height="0.002cm" svg:x="0cm" svg:y="1.931cm" draw:page-number="24" presentation:class="page"/>
          <draw:frame draw:name="Google Shape;701;p24:notes" presentation:style-name="pr27" draw:text-style-name="P10" draw:layer="layout" svg:width="15.238cm" svg:height="11.428cm" svg:x="1.905cm" svg:y="12.065cm" presentation:class="notes" presentation:placeholder="true" presentation:user-transformed="true">
            <draw:text-box/>
          </draw:frame>
        </presentation:notes>
      </draw:page>
      <draw:page draw:name="page25" draw:style-name="dp1" draw:master-page-name="BLANK">
        <draw:custom-shape draw:name="Google Shape;713;p117" draw:style-name="gr18" draw:text-style-name="P21" draw:layer="layout" svg:width="19.355cm" svg:height="2.497cm" svg:x="2.721cm" svg:y="0.599cm">
          <text:p text:style-name="P16"><text:span text:style-name="T35">Data Mini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14;p117" draw:style-name="gr14" draw:text-style-name="P8" draw:layer="layout" svg:width="22.498cm" svg:height="2.115cm" svg:x="1.906cm" svg:y="3.31cm">
          <text:list text:style-name="L7">
            <text:list-item>
              <text:p text:style-name="P15"><text:span text:style-name="T3">The amount of personal data shall be limited to that necessary to achieve the purpose of data process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p117" draw:style-name="gr14" draw:text-style-name="P8" draw:layer="layout" svg:width="22.498cm" svg:height="1.596cm" svg:x="1.694cm" svg:y="6.273cm">
          <text:list text:style-name="L7">
            <text:list-item>
              <text:p text:style-name="P15"><text:span text:style-name="T3">Obligation to avoid collecting, storing or in any other way processing personal data that is not strictly necessary, even if it may be “nice to hav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6;p117" draw:style-name="gr9" draw:text-style-name="P8" draw:layer="layout" svg:width="24.422cm" svg:height="2.197cm" svg:x="0.488cm" svg:y="11.211cm">
          <text:p text:style-name="P3"><text:span text:style-name="T49">Further readings:</text:span></text:p>
          <text:list text:style-name="L5">
            <text:list-item>
              <text:p text:style-name="P20"><text:span text:style-name="T42"><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20"><text:span text:style-name="T42"><text:a xlink:href="https://eur-lex.europa.eu/legal-content/EN/TXT/HTML/?uri=CELEX:32016R0679&amp;from=EN#d1e1888-1-1" xlink:type="simple">https://eur-lex.europa.eu/legal-content/EN/TXT/HTML/?uri=CELEX:32016R0679&amp;from=EN#d1e1888-1-1</text:a></text:span></text:p>
            </text:list-item>
          </text:list>
          <text:p text:style-name="P20"><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709;p25: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10;p25:notes" draw:style-name="gr3" draw:layer="layout" svg:width="0.002cm" svg:height="0.002cm" svg:x="0cm" svg:y="1.931cm" draw:page-number="25" presentation:class="page"/>
          <draw:frame draw:name="Google Shape;711;p25:notes" presentation:style-name="pr28" draw:text-style-name="P10" draw:layer="layout" svg:width="15.238cm" svg:height="11.428cm" svg:x="1.905cm" svg:y="12.065cm" presentation:class="notes" presentation:placeholder="true" presentation:user-transformed="true">
            <draw:text-box/>
          </draw:frame>
        </presentation:notes>
      </draw:page>
      <draw:page draw:name="page26" draw:style-name="dp1" draw:master-page-name="BLANK">
        <draw:custom-shape draw:name="Google Shape;722;p118" draw:style-name="gr18" draw:text-style-name="P21" draw:layer="layout" svg:width="19.355cm" svg:height="2.497cm" svg:x="2.721cm" svg:y="0.599cm">
          <text:p text:style-name="P16"><text:span text:style-name="T35">Data Accurac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3;p118" draw:style-name="gr14" draw:text-style-name="P8" draw:layer="layout" svg:width="19.133cm" svg:height="2.115cm" svg:x="1.483cm" svg:y="3.733cm">
          <text:list text:style-name="L7">
            <text:list-item>
              <text:p text:style-name="P15"><text:span text:style-name="T3">Important not only in consideration of the data subjects </text:span><text:span text:style-name="T3"><text:line-break/></text:span><text:span text:style-name="T3">but also for your researc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4;p118" draw:style-name="gr14" draw:text-style-name="P8" draw:layer="layout" svg:width="22.498cm" svg:height="1.596cm" svg:x="1.694cm" svg:y="6.273cm">
          <text:list text:style-name="L7">
            <text:list-item>
              <text:p text:style-name="P15"><text:span text:style-name="T3">Obligation to rectify or delete inaccurate personal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5;p118" draw:style-name="gr9" draw:text-style-name="P8" draw:layer="layout" svg:width="24.422cm" svg:height="2.197cm" svg:x="0.488cm" svg:y="11.211cm">
          <text:p text:style-name="P3"><text:span text:style-name="T49">Further readings:</text:span></text:p>
          <text:list text:style-name="L5">
            <text:list-item>
              <text:p text:style-name="P20"><text:span text:style-name="T42"><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20"><text:span text:style-name="T42"><text:a xlink:href="https://eur-lex.europa.eu/legal-content/EN/TXT/HTML/?uri=CELEX:32016R0679&amp;from=EN#d1e1888-1-1" xlink:type="simple">https://eur-lex.europa.eu/legal-content/EN/TXT/HTML/?uri=CELEX:32016R0679&amp;from=EN#d1e1888-1-1</text:a></text:span></text:p>
            </text:list-item>
          </text:list>
          <text:p text:style-name="P20"><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6;p118" draw:style-name="gr14" draw:text-style-name="P8" draw:layer="layout" svg:width="22.498cm" svg:height="1.596cm" svg:x="1.694cm" svg:y="7.966cm">
          <text:list text:style-name="L7">
            <text:list-item>
              <text:p text:style-name="P15"><text:span text:style-name="T3">Your data subject can ask for deletion of the data at any tim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718;p26: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19;p26:notes" draw:style-name="gr3" draw:layer="layout" svg:width="0.002cm" svg:height="0.002cm" svg:x="0cm" svg:y="1.931cm" draw:page-number="26" presentation:class="page"/>
          <draw:frame draw:name="Google Shape;720;p26:notes" presentation:style-name="pr29" draw:text-style-name="P10" draw:layer="layout" svg:width="15.238cm" svg:height="11.428cm" svg:x="1.905cm" svg:y="12.065cm" presentation:class="notes" presentation:placeholder="true" presentation:user-transformed="true">
            <draw:text-box/>
          </draw:frame>
        </presentation:notes>
      </draw:page>
      <draw:page draw:name="page27" draw:style-name="dp1" draw:master-page-name="BLANK">
        <draw:custom-shape draw:name="Google Shape;732;p119" draw:style-name="gr18" draw:text-style-name="P21" draw:layer="layout" svg:width="19.355cm" svg:height="1.855cm" svg:x="2.721cm" svg:y="0.599cm">
          <text:p text:style-name="P16"><text:span text:style-name="T35">Storage Limit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33;p119" draw:style-name="gr14" draw:text-style-name="P8" draw:layer="layout" svg:width="23.431cm" svg:height="2.115cm" svg:x="0.848cm" svg:y="3.098cm">
          <text:list text:style-name="L12">
            <text:list-item>
              <text:p text:style-name="P15"><text:span text:style-name="T44">Personal data shall not be stored for longer than necessary to fulfil the purpo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4;p119" draw:style-name="gr14" draw:text-style-name="P8" draw:layer="layout" svg:width="23.88cm" svg:height="1.596cm" svg:x="0.759cm" svg:y="4.518cm">
          <text:list text:style-name="L12">
            <text:list-item>
              <text:p text:style-name="P15"><text:span text:style-name="T44">Once the purpose has been achieved, the data shall in principle be deleted or made anonymou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5;p119" draw:style-name="gr9" draw:text-style-name="P8" draw:layer="layout" svg:width="24.422cm" svg:height="2.197cm" svg:x="0.488cm" svg:y="11.211cm">
          <text:p text:style-name="P3"><text:span text:style-name="T49">Further readings:</text:span></text:p>
          <text:list text:style-name="L5">
            <text:list-item>
              <text:p text:style-name="P20"><text:span text:style-name="T42"><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20"><text:span text:style-name="T42"><text:a xlink:href="https://eur-lex.europa.eu/legal-content/EN/TXT/HTML/?uri=CELEX:32016R0679&amp;from=EN#d1e1888-1-1" xlink:type="simple">https://eur-lex.europa.eu/legal-content/EN/TXT/HTML/?uri=CELEX:32016R0679&amp;from=EN#d1e1888-1-1</text:a></text:span></text:p>
            </text:list-item>
          </text:list>
          <text:p text:style-name="P20"><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6;p119" draw:style-name="gr14" draw:text-style-name="P8" draw:layer="layout" svg:width="19.206cm" svg:height="2.115cm" svg:x="0.759cm" svg:y="5.98cm">
          <text:list text:style-name="L12">
            <text:list-item>
              <text:p text:style-name="P15"><text:span text:style-name="T44">REK usually sets requirements for storage beyond the project period for reasons of verifiability - </text:span><text:span text:style-name="T45">you may need to include this in your applic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7;p119" draw:style-name="gr14" draw:text-style-name="P8" draw:layer="layout" svg:width="19.206cm" svg:height="2.115cm" svg:x="0.759cm" svg:y="7.885cm">
          <text:list text:style-name="L12">
            <text:list-item>
              <text:p text:style-name="P15"><text:span text:style-name="T44">Processing personal data for the purpose of verifiability is legitima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8;p119" draw:style-name="gr14" draw:text-style-name="P8" draw:layer="layout" svg:width="22.312cm" svg:height="2.115cm" svg:x="0.759cm" svg:y="9.155cm">
          <text:list text:style-name="L12">
            <text:list-item>
              <text:p text:style-name="P15"><text:span text:style-name="T44">Personal data may be stored for longer periods so far as the personal data is processed solely for scientific, historical, and/or statistical research purpos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728;p27: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29;p27:notes" draw:style-name="gr3" draw:layer="layout" svg:width="0.002cm" svg:height="0.002cm" svg:x="0cm" svg:y="1.931cm" draw:page-number="27" presentation:class="page"/>
          <draw:frame draw:name="Google Shape;730;p27:notes" presentation:style-name="pr30" draw:text-style-name="P10" draw:layer="layout" svg:width="15.238cm" svg:height="11.428cm" svg:x="1.905cm" svg:y="12.065cm" presentation:class="notes" presentation:placeholder="true" presentation:user-transformed="true">
            <draw:text-box/>
          </draw:frame>
        </presentation:notes>
      </draw:page>
      <draw:page draw:name="page28" draw:style-name="dp1" draw:master-page-name="BLANK">
        <draw:custom-shape draw:name="Google Shape;744;p120" draw:style-name="gr18" draw:text-style-name="P21" xml:id="id136" draw:id="id136" draw:layer="layout" svg:width="19.355cm" svg:height="1.855cm" svg:x="3.568cm" svg:y="0.387cm">
          <text:p text:style-name="P16"><text:span text:style-name="T35">Integrity and Confidentialit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45;p120" draw:style-name="gr14" draw:text-style-name="P8" xml:id="id137" draw:id="id137" draw:layer="layout" svg:width="23.431cm" svg:height="3.958cm" svg:x="0.848cm" svg:y="2.675cm">
          <text:list text:style-name="L12">
            <text:list-item>
              <text:p text:style-name="P15"><text:span text:style-name="T44">Personal data must be processed in a manner that ensures:</text:span></text:p>
            </text:list-item>
          </text:list>
          <text:list text:style-name="L16">
            <text:list-item>
              <text:list>
                <text:list-item>
                  <text:p text:style-name="P15"><text:span text:style-name="T44">appropriate security of the personal data, </text:span></text:p>
                </text:list-item>
                <text:list-item>
                  <text:p text:style-name="P15"><text:span text:style-name="T44">protect personal data against unauthorised access, </text:span></text:p>
                </text:list-item>
                <text:list-item>
                  <text:p text:style-name="P15"><text:span text:style-name="T44">unlawful processing, </text:span></text:p>
                </text:list-item>
                <text:list-item>
                  <text:p text:style-name="P15"><text:span text:style-name="T44">accidental loss, distribution, amendment, or damag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6;p120" draw:style-name="gr14" draw:text-style-name="P8" xml:id="id139" draw:id="id139" draw:layer="layout" svg:width="17.983cm" svg:height="1.596cm" svg:x="2.272cm" svg:y="6.846cm">
          <text:p text:style-name="P3"><text:span text:style-name="T44">Follow institutional guid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7;p120" draw:style-name="gr9" draw:text-style-name="P8" xml:id="id142" draw:id="id142" draw:layer="layout" svg:width="24.422cm" svg:height="1.574cm" svg:x="0.488cm" svg:y="12.514cm">
          <text:p text:style-name="P3"><text:span text:style-name="T12">Image Source: </text:span><text:span text:style-name="T42"><text:a xlink:href="https://uio.no/english/for-employees/support/research/funding/units/hf/imv/data-ethics/colors.html" xlink:type="simple">https://uio.no/english/for-employees/support/research/funding/units/hf/imv/data-ethics/colors.html</text:a></text:span></text:p>
          <text:p text:style-name="P3"><text:span text:style-name="T12">More about Trusted Research Environments in Norway:</text:span><text:span text:style-name="T49"> </text:span><text:span text:style-name="T50">https://www.nortre.no/engli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8;p120" draw:style-name="gr14" draw:text-style-name="P8" xml:id="id141" draw:id="id141" draw:layer="layout" svg:width="19.206cm" svg:height="2.115cm" svg:x="0.759cm" svg:y="9.578cm">
          <text:list text:style-name="L12">
            <text:list-item>
              <text:p text:style-name="P15"><text:span text:style-name="T44">Pseudonymisation</text:span></text:p>
            </text:list-item>
          </text:list>
          <text:list text:style-name="L16">
            <text:list-item>
              <text:list>
                <text:list-item>
                  <text:p text:style-name="P15"><text:span text:style-name="T44">Dedicated data (secure) analysis platforms (‘TREs’/’SP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9;p120" draw:style-name="gr36" draw:text-style-name="P9" xml:id="id138" draw:id="id138" draw:layer="layout" svg:width="1.098cm" svg:height="1.157cm" svg:x="1.059cm" svg:y="6.846cm">
          <draw:image xlink:href="Pictures/10000201000000A300000448EACA50CF4303650F.png" xlink:type="simple" xlink:show="embed" xlink:actuate="onLoad">
            <text:p/>
          </draw:image>
        </draw:frame>
        <draw:frame draw:name="Google Shape;750;p120" draw:style-name="gr2" draw:text-style-name="P9" xml:id="id140" draw:id="id140" draw:layer="layout" svg:width="8.062cm" svg:height="2.518cm" svg:x="10.435cm" svg:y="6.635cm">
          <draw:image xlink:href="Pictures/1000020100000370000001130697892BF8D75BA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6" smil:attributeName="visibility" smil:to="visible"/>
                  <anim:transitionFilter smil:dur="1s" smil:targetElement="id1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7" smil:attributeName="visibility" smil:to="visible"/>
                  <anim:transitionFilter smil:dur="1s" smil:targetElement="id1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8" smil:attributeName="visibility" smil:to="visible"/>
                  <anim:transitionFilter smil:dur="1s" smil:targetElement="id138" smil:type="fade" smil:subtype="crossfade"/>
                </anim:par>
                <anim:par smil:begin="0s" smil:fill="hold" presentation:node-type="with-previous" presentation:preset-class="entrance" presentation:preset-id="ooo-entrance-fade-in">
                  <anim:set smil:begin="0s" smil:dur="0.001s" smil:fill="hold" smil:targetElement="id139" smil:attributeName="visibility" smil:to="visible"/>
                  <anim:transitionFilter smil:dur="1s" smil:targetElement="id1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0" smil:attributeName="visibility" smil:to="visible"/>
                  <anim:transitionFilter smil:dur="1s" smil:targetElement="id1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1" smil:attributeName="visibility" smil:to="visible"/>
                  <anim:transitionFilter smil:dur="1s" smil:targetElement="id1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2" smil:attributeName="visibility" smil:to="visible"/>
                  <anim:transitionFilter smil:dur="1s" smil:targetElement="id142" smil:type="fade" smil:subtype="crossfade"/>
                </anim:par>
              </anim:par>
            </anim:par>
          </anim:seq>
        </anim:par>
        <presentation:notes draw:style-name="dp2">
          <draw:custom-shape draw:name="Google Shape;740;p28: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41;p28:notes" draw:style-name="gr3" draw:layer="layout" svg:width="0.002cm" svg:height="0.002cm" svg:x="0cm" svg:y="1.931cm" draw:page-number="28" presentation:class="page"/>
          <draw:frame draw:name="Google Shape;742;p28:notes" presentation:style-name="pr31" draw:text-style-name="P10" draw:layer="layout" svg:width="15.238cm" svg:height="11.428cm" svg:x="1.905cm" svg:y="12.065cm" presentation:class="notes" presentation:placeholder="true" presentation:user-transformed="true">
            <draw:text-box/>
          </draw:frame>
        </presentation:notes>
      </draw:page>
      <draw:page draw:name="page29" draw:style-name="dp1" draw:master-page-name="BLANK">
        <draw:custom-shape draw:name="Google Shape;756;p121" draw:style-name="gr18" draw:text-style-name="P21" draw:layer="layout" svg:width="19.355cm" svg:height="1.855cm" svg:x="2.721cm" svg:y="0.599cm">
          <text:p text:style-name="P16"><text:span text:style-name="T35">Accountabilit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57;p121" draw:style-name="gr14" draw:text-style-name="P8" draw:layer="layout" svg:width="23.431cm" svg:height="2.115cm" svg:x="0.848cm" svg:y="3.098cm">
          <text:list text:style-name="L7">
            <text:list-item>
              <text:p text:style-name="P15"><text:span text:style-name="T3">Data controller shall be responsible for, and be able to demonstrate </text:span><text:span text:style-name="T26">compliance with the principl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p121" draw:style-name="gr14" draw:text-style-name="P8" draw:layer="layout" svg:width="23.88cm" svg:height="1.596cm" svg:x="0.759cm" svg:y="5.788cm">
          <text:list text:style-name="L7">
            <text:list-item>
              <text:p text:style-name="P15"><text:span text:style-name="T3">Obligation to </text:span><text:span text:style-name="T26">document</text:span><text:span text:style-name="T3"> the processing of personal (sensitive)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9;p121" draw:style-name="gr14" draw:text-style-name="P8" draw:layer="layout" svg:width="17.983cm" svg:height="1.596cm" svg:x="1.802cm" svg:y="7.693cm">
          <text:p text:style-name="P3"><text:span text:style-name="T3">Follow institutional guid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0;p121" draw:style-name="gr36" draw:text-style-name="P9" draw:layer="layout" svg:width="1.098cm" svg:height="1.157cm" svg:x="0.636cm" svg:y="7.693cm">
          <draw:image xlink:href="Pictures/10000201000000A300000448EACA50CF4303650F.png" xlink:type="simple" xlink:show="embed" xlink:actuate="onLoad">
            <text:p/>
          </draw:image>
        </draw:frame>
        <draw:custom-shape draw:name="Google Shape;761;p121" draw:style-name="gr9" draw:text-style-name="P8" draw:layer="layout" svg:width="24.422cm" svg:height="1.186cm" svg:x="0.488cm" svg:y="12.514cm">
          <text:p text:style-name="P3"><text:span text:style-name="T12">System for Risk and compliance. Processing of personal data in research and student projects at UiB: </text:span><text:span text:style-name="T51"><text:s/></text:span><text:span text:style-name="T52"><text:a xlink:href="https://rette.app.uib.no/" xlink:type="simple">https://rette.app.uib.n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752;p29: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53;p29:notes" draw:style-name="gr3" draw:layer="layout" svg:width="0.002cm" svg:height="0.002cm" svg:x="0cm" svg:y="1.931cm" draw:page-number="29" presentation:class="page"/>
          <draw:frame draw:name="Google Shape;754;p29:notes" presentation:style-name="pr32" draw:text-style-name="P10" draw:layer="layout" svg:width="15.238cm" svg:height="11.428cm" svg:x="1.905cm" svg:y="12.065cm" presentation:class="notes" presentation:placeholder="true" presentation:user-transformed="true">
            <draw:text-box/>
          </draw:frame>
        </presentation:notes>
      </draw:page>
      <draw:page draw:name="page30" draw:style-name="dp1" draw:master-page-name="BLANK">
        <draw:custom-shape draw:name="Google Shape;767;p122" draw:style-name="gr27" draw:text-style-name="P23" draw:layer="layout" svg:width="7.196cm" svg:height="1.122cm" svg:x="2.76cm" svg:y="3.422cm">
          <text:p text:style-name="P7"><text:span text:style-name="T10">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68;p122" draw:style-name="gr28" draw:text-style-name="P24" draw:layer="layout" svg:width="7.373cm" svg:height="1.122cm" svg:x="2.76cm" svg:y="4.97cm">
          <text:p text:style-name="P7"><text:span text:style-name="T10">Sensitive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69;p122" draw:style-name="gr29" draw:text-style-name="P25" draw:layer="layout" svg:width="7.196cm" svg:height="1.122cm" svg:x="2.76cm" svg:y="6.451cm">
          <text:p text:style-name="P7"><text:span text:style-name="T11">Genetic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70;p122" draw:style-name="gr39" draw:text-style-name="P31" draw:layer="layout" svg:width="6.417cm" svg:height="1.122cm" svg:x="2.76cm" svg:y="7.933cm">
          <text:p text:style-name="P7"><text:span text:style-name="T11">Pseu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71;p122" draw:style-name="gr30" draw:text-style-name="P26" draw:layer="layout" svg:width="6.417cm" svg:height="1.122cm" svg:x="2.76cm" svg:y="9.415cm">
          <text:p text:style-name="P7"><text:span text:style-name="T10">An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72;p122" draw:style-name="gr40" draw:text-style-name="P32" draw:layer="layout" svg:width="10.242cm" svg:height="1.708cm" svg:x="12.119cm" svg:y="5.115cm">
          <text:p text:style-name="P7"><text:span text:style-name="T11">Storage and processing of personal (sensitive) data: How &amp; Whe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73;p122" draw:style-name="gr41" draw:text-style-name="P8" draw:layer="layout" svg:width="10.242cm" svg:height="5.346cm" svg:x="12.542cm" svg:y="7.03cm">
          <text:list text:style-name="L9">
            <text:list-item>
              <text:p text:style-name="P33"><text:span text:style-name="T11">Fairness and Transparency</text:span></text:p>
            </text:list-item>
            <text:list-item>
              <text:p text:style-name="P33"><text:span text:style-name="T11">Data Minimisation</text:span></text:p>
            </text:list-item>
            <text:list-item>
              <text:p text:style-name="P33"><text:span text:style-name="T11">Data Accuracy</text:span></text:p>
            </text:list-item>
            <text:list-item>
              <text:p text:style-name="P33"><text:span text:style-name="T11">Storage Limitation</text:span></text:p>
            </text:list-item>
            <text:list-item>
              <text:p text:style-name="P33"><text:span text:style-name="T11">Integrity and Confidentiality</text:span></text:p>
            </text:list-item>
            <text:list-item>
              <text:p text:style-name="P33"><text:span text:style-name="T11">Accountability</text:span></text:p>
            </text:list-item>
          </text:list>
          <text:p text:style-name="P7"><text:span text:style-name="T1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74;p122" draw:style-name="gr42" draw:text-style-name="P9" draw:layer="layout" svg:width="1.829cm" svg:height="1.344cm" svg:x="0.718cm" svg:y="3.201cm">
          <draw:image xlink:href="Pictures/10000201000000ED00000449C8AB390A94284B94.png" xlink:type="simple" xlink:show="embed" xlink:actuate="onLoad">
            <text:p/>
          </draw:image>
        </draw:frame>
        <draw:frame draw:name="Google Shape;775;p122" draw:style-name="gr42" draw:text-style-name="P9" draw:layer="layout" svg:width="1.829cm" svg:height="1.344cm" svg:x="0.718cm" svg:y="4.682cm">
          <draw:image xlink:href="Pictures/10000201000000ED00000449C8AB390A94284B94.png" xlink:type="simple" xlink:show="embed" xlink:actuate="onLoad">
            <text:p/>
          </draw:image>
        </draw:frame>
        <draw:frame draw:name="Google Shape;776;p122" draw:style-name="gr42" draw:text-style-name="P9" draw:layer="layout" svg:width="1.829cm" svg:height="1.344cm" svg:x="0.718cm" svg:y="6.164cm">
          <draw:image xlink:href="Pictures/10000201000000ED00000449C8AB390A94284B94.png" xlink:type="simple" xlink:show="embed" xlink:actuate="onLoad">
            <text:p/>
          </draw:image>
        </draw:frame>
        <draw:frame draw:name="Google Shape;777;p122" draw:style-name="gr42" draw:text-style-name="P9" draw:layer="layout" svg:width="1.829cm" svg:height="1.344cm" svg:x="0.718cm" svg:y="7.646cm">
          <draw:image xlink:href="Pictures/10000201000000ED00000449C8AB390A94284B94.png" xlink:type="simple" xlink:show="embed" xlink:actuate="onLoad">
            <text:p/>
          </draw:image>
        </draw:frame>
        <draw:frame draw:name="Google Shape;778;p122" draw:style-name="gr42" draw:text-style-name="P9" draw:layer="layout" svg:width="1.829cm" svg:height="1.344cm" svg:x="0.718cm" svg:y="9.127cm">
          <draw:image xlink:href="Pictures/10000201000000ED00000449C8AB390A94284B94.png" xlink:type="simple" xlink:show="embed" xlink:actuate="onLoad">
            <text:p/>
          </draw:image>
        </draw:frame>
        <draw:custom-shape draw:name="Google Shape;779;p122" draw:style-name="gr43" draw:text-style-name="P34" draw:layer="layout" svg:width="10.094cm" svg:height="1.708cm" svg:x="12.119cm" svg:y="3.201cm">
          <text:p text:style-name="P7"><text:span text:style-name="T11">Data subjects, processing, controller, and processo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80;p122" draw:style-name="gr4" draw:text-style-name="P8" draw:layer="layout" svg:width="9.081cm" svg:height="2.382cm" svg:x="1.566cm" svg:y="0.257cm">
          <text:p text:style-name="P11"><text:span text:style-name="T39">What 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1;p122" draw:style-name="gr4" draw:text-style-name="P8" draw:layer="layout" svg:width="12.955cm" svg:height="2.382cm" svg:x="11.3cm" svg:y="0.393cm">
          <text:p text:style-name="P11"><text:span text:style-name="T40">What does GDPR say ab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2;p122" draw:style-name="gr42" draw:text-style-name="P9" draw:layer="layout" svg:width="1.829cm" svg:height="1.344cm" svg:x="10.123cm" svg:y="3.383cm">
          <draw:image xlink:href="Pictures/10000201000000ED00000449C8AB390A94284B94.png" xlink:type="simple" xlink:show="embed" xlink:actuate="onLoad">
            <text:p/>
          </draw:image>
        </draw:frame>
        <draw:frame draw:name="Google Shape;783;p122" draw:style-name="gr42" draw:text-style-name="P9" draw:layer="layout" svg:width="1.829cm" svg:height="1.344cm" svg:x="10.123cm" svg:y="5.076cm">
          <draw:image xlink:href="Pictures/10000201000000ED00000449C8AB390A94284B94.png" xlink:type="simple" xlink:show="embed" xlink:actuate="onLoad">
            <text:p/>
          </draw:image>
        </draw:frame>
        <presentation:notes draw:style-name="dp2">
          <draw:custom-shape draw:name="Google Shape;763;p30: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64;p30:notes" draw:style-name="gr3" draw:layer="layout" svg:width="0.002cm" svg:height="0.002cm" svg:x="0cm" svg:y="1.931cm" draw:page-number="30" presentation:class="page"/>
          <draw:frame draw:name="Google Shape;765;p30:notes" presentation:style-name="pr33" draw:text-style-name="P10" draw:layer="layout" svg:width="15.238cm" svg:height="11.428cm" svg:x="1.905cm" svg:y="12.065cm" presentation:class="notes" presentation:placeholder="true" presentation:user-transformed="true">
            <draw:text-box/>
          </draw:frame>
        </presentation:notes>
      </draw:page>
      <draw:page draw:name="page31" draw:style-name="dp1" draw:master-page-name="Default">
        <draw:custom-shape draw:name="Google Shape;789;p123" draw:style-name="gr48" draw:text-style-name="P8" draw:layer="layout" svg:width="10.917cm" svg:height="3.437cm" svg:x="0.237cm" svg:y="2.841cm">
          <text:p text:style-name="P7"><text:span text:style-name="T53">Research Data Protection and Ethical Compli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85;p31:notes" draw:style-name="gr3" draw:layer="layout" svg:width="15.238cm" svg:height="8.571cm" svg:x="1.905cm" svg:y="3.175cm" draw:page-number="31" presentation:class="page"/>
          <draw:frame draw:name="Google Shape;786;p31:notes" presentation:style-name="pr34" draw:text-style-name="P10" draw:layer="layout" svg:width="15.238cm" svg:height="10cm" svg:x="1.905cm" svg:y="12.224cm" presentation:class="notes" presentation:placeholder="true" presentation:user-transformed="true">
            <draw:text-box/>
          </draw:frame>
          <draw:custom-shape draw:name="Google Shape;787;p31:notes" draw:style-name="gr49" draw:text-style-name="P8" draw:layer="layout" svg:width="8.253cm" svg:height="1.272cm" svg:x="10.791cm" svg:y="24.126cm">
            <text:p text:style-name="P51"><text:span text:style-name="T4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2" draw:style-name="dp1" draw:master-page-name="BLANK">
        <draw:custom-shape draw:name="Google Shape;795;p124" draw:style-name="gr4" draw:text-style-name="P8" draw:layer="layout" svg:width="22.858cm" svg:height="2.382cm" svg:x="1.27cm" svg:y="0.293cm">
          <text:p text:style-name="P11"><text:span text:style-name="T9">Let’s learn about (the importance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6;p124" draw:style-name="gr50" draw:text-style-name="P38" draw:layer="layout" svg:width="14.117cm" svg:height="1.513cm" svg:x="5.724cm" svg:y="3.243cm">
          <text:p text:style-name="P7"><text:span text:style-name="T10">Data Protection Impact Assessment (DPI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97;p124" draw:style-name="gr51" draw:text-style-name="P39" draw:layer="layout" svg:width="10.838cm" svg:height="1.259cm" svg:x="7.205cm" svg:y="5.256cm">
          <text:p text:style-name="P7"><text:span text:style-name="T10">Derogations for scientific purpos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98;p124" draw:style-name="gr52" draw:text-style-name="P40" draw:layer="layout" svg:width="8.721cm" svg:height="1.122cm" svg:x="8.264cm" svg:y="7.086cm">
          <text:p text:style-name="P7"><text:span text:style-name="T10">International Data Transf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99;p124" draw:style-name="gr53" draw:text-style-name="P41" draw:layer="layout" svg:width="7.956cm" svg:height="1.122cm" svg:x="8.333cm" svg:y="8.779cm">
          <text:p text:style-name="P7"><text:span text:style-name="T11">Data Privacy Assessm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800;p124" draw:style-name="gr21" draw:text-style-name="P9" draw:layer="layout" svg:width="1.597cm" svg:height="1.513cm" svg:x="4.022cm" svg:y="3.243cm">
          <draw:image xlink:href="Pictures/10000201000000A300000448EACA50CF4303650F.png" xlink:type="simple" xlink:show="embed" xlink:actuate="onLoad">
            <text:p/>
          </draw:image>
        </draw:frame>
        <draw:frame draw:name="Google Shape;801;p124" draw:style-name="gr2" draw:text-style-name="P9" draw:layer="layout" svg:width="1.108cm" svg:height="0.805cm" svg:x="5.724cm" svg:y="5.357cm">
          <draw:image xlink:href="Pictures/100000000000020000000174C5E145BF6683B30C.png" xlink:type="simple" xlink:show="embed" xlink:actuate="onLoad">
            <text:p/>
          </draw:image>
        </draw:frame>
        <draw:frame draw:name="Google Shape;802;p124" draw:style-name="gr2" draw:text-style-name="P9" draw:layer="layout" svg:width="1.259cm" svg:height="1.259cm" svg:x="6.641cm" svg:y="6.974cm">
          <draw:image xlink:href="Pictures/1000020100000400000004001069E99D172314B3.png" xlink:type="simple" xlink:show="embed" xlink:actuate="onLoad">
            <text:p/>
          </draw:image>
        </draw:frame>
        <draw:custom-shape draw:name="Google Shape;803;p124" draw:style-name="gr54" draw:text-style-name="P42" draw:layer="layout" svg:width="6.54cm" svg:height="1.122cm" svg:x="8.544cm" svg:y="10.473cm">
          <text:p text:style-name="P7"><text:span text:style-name="T11">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804;p124" draw:style-name="gr2" draw:text-style-name="P9" draw:layer="layout" svg:width="0.939cm" svg:height="0.939cm" svg:x="6.834cm" svg:y="8.871cm">
          <draw:image xlink:href="Pictures/1000020100000300000003005C10A696FD01655D.png" xlink:type="simple" xlink:show="embed" xlink:actuate="onLoad">
            <text:p/>
          </draw:image>
        </draw:frame>
        <draw:frame draw:name="Google Shape;805;p124" draw:style-name="gr2" draw:text-style-name="P9" draw:layer="layout" svg:width="0.939cm" svg:height="0.939cm" svg:x="6.834cm" svg:y="10.448cm">
          <draw:image xlink:href="Pictures/100002010000040000000400056732C6DA6137D4.png" xlink:type="simple" xlink:show="embed" xlink:actuate="onLoad">
            <text:p/>
          </draw:image>
        </draw:frame>
        <presentation:notes draw:style-name="dp2">
          <draw:custom-shape draw:name="Google Shape;791;p32: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92;p32:notes" draw:style-name="gr3" draw:layer="layout" svg:width="0.002cm" svg:height="0.002cm" svg:x="0cm" svg:y="1.931cm" draw:page-number="32" presentation:class="page"/>
          <draw:frame draw:name="Google Shape;793;p32:notes" presentation:style-name="pr35" draw:text-style-name="P10" draw:layer="layout" svg:width="15.238cm" svg:height="11.428cm" svg:x="1.905cm" svg:y="12.065cm" presentation:class="notes" presentation:placeholder="true" presentation:user-transformed="true">
            <draw:text-box/>
          </draw:frame>
        </presentation:notes>
      </draw:page>
      <draw:page draw:name="page33" draw:style-name="dp1" draw:master-page-name="BLANK">
        <draw:custom-shape draw:name="Google Shape;811;p125" draw:style-name="gr14" draw:text-style-name="P8" xml:id="id145" draw:id="id145" draw:layer="layout" svg:width="22.498cm" svg:height="2.115cm" svg:x="1.271cm" svg:y="3.31cm">
          <text:list text:style-name="L11">
            <text:list-item>
              <text:p text:style-name="P15"><text:span text:style-name="T19">“</text:span><text:span text:style-name="T19">Where a type of processing ... is likely to result in a high risk to the rights and freedoms of natural pers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2;p125" draw:style-name="gr14" draw:text-style-name="P8" xml:id="id146" draw:id="id146" draw:layer="layout" svg:width="22.498cm" svg:height="2.303cm" svg:x="1.271cm" svg:y="5.003cm">
          <text:list text:style-name="L11">
            <text:list-item>
              <text:p text:style-name="P15"><text:span text:style-name="T19">Based on new technologies, the nature, scope, context and purposes of the process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3;p125" draw:style-name="gr14" draw:text-style-name="P8" xml:id="id148" draw:id="id148" draw:layer="layout" svg:width="22.498cm" svg:height="1.596cm" svg:x="1.059cm" svg:y="10.083cm">
          <text:list text:style-name="L11">
            <text:list-item>
              <text:p text:style-name="P15"><text:span text:style-name="T19">Identify risks and take measures to reduce the risk; DPIA helps ensure privacy of your data subjec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4;p125" draw:style-name="gr9" draw:text-style-name="P8" xml:id="id149" draw:id="id149" draw:layer="layout" svg:width="24.056cm" svg:height="1.574cm" svg:x="0.568cm" svg:y="12.483cm">
          <text:p text:style-name="P3"><text:span text:style-name="T49">Tool Resource</text:span><text:span text:style-name="T12">: </text:span><text:span text:style-name="T42"><text:a xlink:href="https://www.cnil.fr/en/open-source-pia-software-helps-carry-out-data-protection-impact-assesment" xlink:type="simple">https://www.cnil.fr/en/open-source-pia-software-helps-carry-out-data-protection-impact-assesment</text:a></text:span></text:p>
          <text:p text:style-name="P3"><text:span text:style-name="T49">Further reading:</text:span><text:span text:style-name="T12"> </text:span><text:span text:style-name="T42"><text:a xlink:href="https://gdpr-info.eu/art-35-gdpr/" xlink:type="simple">https://gdpr-info.eu/art-35-gdp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5;p125" draw:style-name="gr50" draw:text-style-name="P38" xml:id="id144" draw:id="id144" draw:layer="layout" svg:width="19.936cm" svg:height="2.115cm" svg:x="3.187cm" svg:y="0.601cm">
          <text:p text:style-name="P16"><text:span text:style-name="T54">Data Protection Impact Assessment (DPI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816;p125" draw:style-name="gr21" draw:text-style-name="P9" xml:id="id143" draw:id="id143" draw:layer="layout" svg:width="1.597cm" svg:height="1.513cm" svg:x="1.211cm" svg:y="0.948cm">
          <draw:image xlink:href="Pictures/10000201000000A300000448EACA50CF4303650F.png" xlink:type="simple" xlink:show="embed" xlink:actuate="onLoad">
            <text:p/>
          </draw:image>
        </draw:frame>
        <draw:custom-shape draw:name="Google Shape;817;p125" draw:style-name="gr14" draw:text-style-name="P8" xml:id="id147" draw:id="id147" draw:layer="layout" svg:width="22.498cm" svg:height="3.385cm" svg:x="1.271cm" svg:y="6.696cm">
          <text:list text:style-name="L11">
            <text:list-item>
              <text:p text:style-name="P15"><text:span text:style-name="T19">Your research work is based on: </text:span></text:p>
            </text:list-item>
          </text:list>
          <text:list text:style-name="L17">
            <text:list-item>
              <text:list>
                <text:list-item>
                  <text:p text:style-name="P15"><text:span text:style-name="T19">“</text:span><text:span text:style-name="T19">Processing of genetic data in conjunction with at least one other criterion” and </text:span></text:p>
                </text:list-item>
                <text:list-item>
                  <text:p text:style-name="P15"><text:span text:style-name="T19">“</text:span><text:span text:style-name="T19">Processing of personal data using innovative technology in conjunction with at least one other criter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43" smil:attributeName="visibility" smil:to="visible"/>
                  <anim:transitionFilter smil:dur="1s" smil:targetElement="id143" smil:type="fade" smil:subtype="crossfade"/>
                </anim:par>
                <anim:par smil:begin="0s" smil:fill="hold" presentation:node-type="with-previous" presentation:preset-class="entrance" presentation:preset-id="ooo-entrance-fade-in">
                  <anim:set smil:begin="0s" smil:dur="0.001s" smil:fill="hold" smil:targetElement="id144" smil:attributeName="visibility" smil:to="visible"/>
                  <anim:transitionFilter smil:dur="1s" smil:targetElement="id1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5" smil:attributeName="visibility" smil:to="visible"/>
                  <anim:transitionFilter smil:dur="1s" smil:targetElement="id14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6" smil:attributeName="visibility" smil:to="visible"/>
                  <anim:transitionFilter smil:dur="1s" smil:targetElement="id1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7" smil:attributeName="visibility" smil:to="visible"/>
                  <anim:transitionFilter smil:dur="1s" smil:targetElement="id1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8" smil:attributeName="visibility" smil:to="visible"/>
                  <anim:transitionFilter smil:dur="1s" smil:targetElement="id1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9" smil:attributeName="visibility" smil:to="visible"/>
                  <anim:transitionFilter smil:dur="1s" smil:targetElement="id149" smil:type="fade" smil:subtype="crossfade"/>
                </anim:par>
              </anim:par>
            </anim:par>
          </anim:seq>
        </anim:par>
        <presentation:notes draw:style-name="dp2">
          <draw:custom-shape draw:name="Google Shape;807;p33: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08;p33:notes" draw:style-name="gr3" draw:layer="layout" svg:width="0.002cm" svg:height="0.002cm" svg:x="0cm" svg:y="1.931cm" draw:page-number="33" presentation:class="page"/>
          <draw:frame draw:name="Google Shape;809;p33:notes" presentation:style-name="pr36" draw:text-style-name="P10" draw:layer="layout" svg:width="15.238cm" svg:height="11.428cm" svg:x="1.905cm" svg:y="12.065cm" presentation:class="notes" presentation:placeholder="true" presentation:user-transformed="true">
            <draw:text-box/>
          </draw:frame>
        </presentation:notes>
      </draw:page>
      <draw:page draw:name="page34" draw:style-name="dp1" draw:master-page-name="BLANK">
        <draw:custom-shape draw:name="Google Shape;823;p126" draw:style-name="gr14" draw:text-style-name="P8" xml:id="id152" draw:id="id152" draw:layer="layout" svg:width="22.498cm" svg:height="4.443cm" svg:x="1.271cm" svg:y="3.31cm">
          <text:list text:style-name="L11">
            <text:list-item>
              <text:p text:style-name="P15"><text:span text:style-name="T19">Further processing and storage limitation - Articles 5(1)(b) and (e), GDPR</text:span></text:p>
            </text:list-item>
            <text:list-item>
              <text:p text:style-name="P15"><text:span text:style-name="T19">Processing of special categories of data - Article 9(2)(j), GDPR</text:span></text:p>
            </text:list-item>
            <text:list-item>
              <text:p text:style-name="P15"><text:span text:style-name="T19">Information provided by third parties - Article 14(5)(b), GDPR)</text:span></text:p>
            </text:list-item>
            <text:list-item>
              <text:p text:style-name="P15"><text:span text:style-name="T19">Right to erasure - Article 17(3)(d), GDPR</text:span></text:p>
            </text:list-item>
            <text:list-item>
              <text:p text:style-name="P15"><text:span text:style-name="T19">Right to object - Article 21(6) GDP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4;p126" draw:style-name="gr9" draw:text-style-name="P8" xml:id="id154" draw:id="id154" draw:layer="layout" svg:width="19.239cm" svg:height="1.964cm" svg:x="0.568cm" svg:y="12.483cm">
          <text:p text:style-name="P3"><text:span text:style-name="T55">Further reading: </text:span><text:span text:style-name="T33">Chapter 5, The EU’s General Data Protection Regulation (GDPR) in a Research Context - Mondschein, C. F. &amp; Monda, C. Springer 2019 </text:span><text:span text:style-name="T34"><text:a xlink:href="https://www.ncbi.nlm.nih.gov/books/NBK543521/" xlink:type="simple">https://www.ncbi.nlm.nih.gov/books/NBK543521/</text:a></text:span></text:p>
          <text:p text:style-name="P3"><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5;p126" draw:style-name="gr51" draw:text-style-name="P39" xml:id="id151" draw:id="id151" draw:layer="layout" svg:width="16.239cm" svg:height="1.815cm" svg:x="4.703cm" svg:y="0.811cm">
          <text:p text:style-name="P16"><text:span text:style-name="T54">Derogations for scientific purpos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826;p126" draw:style-name="gr2" draw:text-style-name="P9" xml:id="id150" draw:id="id150" draw:layer="layout" svg:width="1.61cm" svg:height="1.17cm" svg:x="2.115cm" svg:y="1.233cm">
          <draw:image xlink:href="Pictures/100000000000020000000174C5E145BF6683B30C.png" xlink:type="simple" xlink:show="embed" xlink:actuate="onLoad">
            <text:p/>
          </draw:image>
        </draw:frame>
        <draw:custom-shape draw:name="Google Shape;827;p126" draw:style-name="gr14" draw:text-style-name="P8" xml:id="id153" draw:id="id153" draw:layer="layout" svg:width="22.498cm" svg:height="4.126cm" svg:x="1.271cm" svg:y="7.755cm">
          <text:p text:style-name="P3"><text:span text:style-name="T19">In addition, there are following derogations in the Norwegian Data protection act: </text:span></text:p>
          <text:list text:style-name="L18">
            <text:list-item>
              <text:p text:style-name="P28"><text:span text:style-name="T19">Right to access</text:span></text:p>
            </text:list-item>
            <text:list-item>
              <text:p text:style-name="P3"><text:span text:style-name="T19">Right to rectification</text:span></text:p>
            </text:list-item>
            <text:list-item>
              <text:p text:style-name="P3"><text:span text:style-name="T19">Right to restrict process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0" smil:attributeName="visibility" smil:to="visible"/>
                  <anim:transitionFilter smil:dur="1s" smil:targetElement="id150" smil:type="fade" smil:subtype="crossfade"/>
                </anim:par>
                <anim:par smil:begin="0s" smil:fill="hold" presentation:node-type="with-previous" presentation:preset-class="entrance" presentation:preset-id="ooo-entrance-fade-in">
                  <anim:set smil:begin="0s" smil:dur="0.001s" smil:fill="hold" smil:targetElement="id151" smil:attributeName="visibility" smil:to="visible"/>
                  <anim:transitionFilter smil:dur="1s" smil:targetElement="id15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2" smil:attributeName="visibility" smil:to="visible"/>
                  <anim:transitionFilter smil:dur="1s" smil:targetElement="id1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3" smil:attributeName="visibility" smil:to="visible"/>
                  <anim:transitionFilter smil:dur="1s" smil:targetElement="id15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4" smil:attributeName="visibility" smil:to="visible"/>
                  <anim:transitionFilter smil:dur="1s" smil:targetElement="id154" smil:type="fade" smil:subtype="crossfade"/>
                </anim:par>
              </anim:par>
            </anim:par>
          </anim:seq>
        </anim:par>
        <presentation:notes draw:style-name="dp2">
          <draw:custom-shape draw:name="Google Shape;819;p34: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20;p34:notes" draw:style-name="gr3" draw:layer="layout" svg:width="0.002cm" svg:height="0.002cm" svg:x="0cm" svg:y="1.931cm" draw:page-number="34" presentation:class="page"/>
          <draw:frame draw:name="Google Shape;821;p34:notes" presentation:style-name="pr37" draw:text-style-name="P10" draw:layer="layout" svg:width="15.238cm" svg:height="11.428cm" svg:x="1.905cm" svg:y="12.065cm" presentation:class="notes" presentation:placeholder="true" presentation:user-transformed="true">
            <draw:text-box/>
          </draw:frame>
        </presentation:notes>
      </draw:page>
      <draw:page draw:name="page35" draw:style-name="dp1" draw:master-page-name="BLANK">
        <draw:custom-shape draw:name="Google Shape;833;p127" draw:style-name="gr14" draw:text-style-name="P8" xml:id="id155" draw:id="id155" draw:layer="layout" svg:width="22.498cm" svg:height="6.33cm" svg:x="0.848cm" svg:y="3.31cm">
          <text:p text:style-name="P7"><text:span text:style-name="T19">Key relevance in scientific research</text:span></text:p>
          <text:p text:style-name="P43"><text:span text:style-name="T19">Countries outside the EU/EEA</text:span></text:p>
          <text:p text:style-name="P43"><text:span text:style-name="T19">Transfer mechanism pursuant to GDPR chapter 5</text:span></text:p>
          <text:p text:style-name="P43"><text:span text:style-name="T19">Previously: <text:s/>Standard Contractual Clauses (SCCs)</text:span></text:p>
          <text:p text:style-name="P43"><text:span text:style-name="T19">Adequacy Deci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4;p127" draw:style-name="gr14" draw:text-style-name="P8" xml:id="id157" draw:id="id157" draw:layer="layout" svg:width="22.498cm" svg:height="1.136cm" svg:x="0.848cm" svg:y="10.065cm">
          <text:p text:style-name="P3"><text:span text:style-name="T19">Additional safeguards - e.g. Pseudonym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5;p127" draw:style-name="gr52" draw:text-style-name="P40" draw:layer="layout" svg:width="13.96cm" svg:height="2.096cm" svg:x="6.846cm" svg:y="0.595cm">
          <text:p text:style-name="P16"><text:span text:style-name="T54">International Data Transf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836;p127" draw:style-name="gr2" draw:text-style-name="P9" draw:layer="layout" svg:width="1.613cm" svg:height="1.613cm" svg:x="4.446cm" svg:y="0.866cm">
          <draw:image xlink:href="Pictures/1000020100000400000004001069E99D172314B3.png" xlink:type="simple" xlink:show="embed" xlink:actuate="onLoad">
            <text:p/>
          </draw:image>
        </draw:frame>
        <draw:custom-shape draw:name="Google Shape;837;p127" draw:style-name="gr9" draw:text-style-name="P8" xml:id="id158" draw:id="id158" draw:layer="layout" svg:width="23.499cm" svg:height="1.62cm" svg:x="0.771cm" svg:y="11.882cm">
          <text:p text:style-name="P3"><text:span text:style-name="T56">Further reading:</text:span><text:span text:style-name="T57"> </text:span></text:p>
          <text:list text:style-name="L19">
            <text:list-item>
              <text:p text:style-name="P3"><text:span text:style-name="T58"><text:a xlink:href="https://eur-lex.europa.eu/legal-content/EN/TXT/HTML/?uri=CELEX:32016R0679&amp;from=EN#d1e4319-1-1" xlink:type="simple">eur-lex.europa.eu/legal-content/EN/TXT/HTML/?uri=CELEX:32016R0679&amp;from=EN#d1e4319-1-1</text:a></text:span></text:p>
            </text:list-item>
            <text:list-item>
              <text:p text:style-name="P3"><text:span text:style-name="T59">ec.europa.eu/info/law/law-topic/data-protection/reform/rules-business-and-organisations/obligations/what-rules-apply-if-my-organisation-transfers-data-outside-eu_en</text:span></text:p>
            </text:list-item>
            <text:list-item>
              <text:p text:style-name="P44"><text:span text:style-name="T59">gov.uk/government/news/eu-adopts-adequacy-decisions-allowing-data-to-continue-flowing-freely-to-the-u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8;p127" draw:style-name="gr55" draw:text-style-name="P8" xml:id="id156" draw:id="id156" draw:layer="layout" svg:width="9.259cm" svg:height="6.33cm" svg:x="15.646cm" svg:y="3.147cm">
          <text:p text:style-name="P37"><text:span text:style-name="T60">As of 2023, EU has granted adequacy decisions to:</text:span></text:p>
          <text:p text:style-name="P37"><text:span text:style-name="T60"/></text:p>
          <text:p text:style-name="P37"><text:span text:style-name="T60">Andorra, Argentina,</text:span></text:p>
          <text:p text:style-name="P37"><text:span text:style-name="T60">Canada, Faroe Islands,</text:span></text:p>
          <text:p text:style-name="P37"><text:span text:style-name="T60">Guernsey, Iceland, Isle of</text:span></text:p>
          <text:p text:style-name="P37"><text:span text:style-name="T60">Man, Japan, Jersey,</text:span></text:p>
          <text:p text:style-name="P37"><text:span text:style-name="T60"><text:s/></text:span><text:span text:style-name="T60">New Zealand, </text:span><text:span text:style-name="T14">Norway,</text:span><text:span text:style-name="T60"> Switzerland, Uruguay, and the UK</text:span></text:p>
          <text:p text:style-name="P44"><text:span text:style-name="T6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5" smil:attributeName="visibility" smil:to="visible"/>
                  <anim:transitionFilter smil:dur="1s" smil:targetElement="id15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6" smil:attributeName="visibility" smil:to="visible"/>
                  <anim:transitionFilter smil:dur="1s" smil:targetElement="id15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7" smil:attributeName="visibility" smil:to="visible"/>
                  <anim:transitionFilter smil:dur="1s" smil:targetElement="id1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8" smil:attributeName="visibility" smil:to="visible"/>
                  <anim:transitionFilter smil:dur="1s" smil:targetElement="id158" smil:type="fade" smil:subtype="crossfade"/>
                </anim:par>
              </anim:par>
            </anim:par>
          </anim:seq>
        </anim:par>
        <presentation:notes draw:style-name="dp2">
          <draw:custom-shape draw:name="Google Shape;829;p35: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30;p35:notes" draw:style-name="gr3" draw:layer="layout" svg:width="0.002cm" svg:height="0.002cm" svg:x="0cm" svg:y="1.931cm" draw:page-number="35" presentation:class="page"/>
          <draw:frame draw:name="Google Shape;831;p35:notes" presentation:style-name="pr38" draw:text-style-name="P10" draw:layer="layout" svg:width="15.238cm" svg:height="11.428cm" svg:x="1.905cm" svg:y="12.065cm" presentation:class="notes" presentation:placeholder="true" presentation:user-transformed="true">
            <draw:text-box/>
          </draw:frame>
        </presentation:notes>
      </draw:page>
      <draw:page draw:name="page36" draw:style-name="dp1" draw:master-page-name="BLANK">
        <draw:custom-shape draw:name="Google Shape;844;p128" draw:style-name="gr14" draw:text-style-name="P8" draw:layer="layout" svg:width="22.498cm" svg:height="1.136cm" svg:x="0.848cm" svg:y="9.43cm">
          <text:p text:style-name="P3"><text:span text:style-name="T19">Additional safeguards - e.g. Pseudonym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5;p128" draw:style-name="gr52" draw:text-style-name="P40" draw:layer="layout" svg:width="13.96cm" svg:height="1.726cm" svg:x="6.846cm" svg:y="0.595cm">
          <text:p text:style-name="P16"><text:span text:style-name="T54">International Data Transf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846;p128" draw:style-name="gr2" draw:text-style-name="P9" draw:layer="layout" svg:width="1.613cm" svg:height="1.613cm" svg:x="4.446cm" svg:y="0.866cm">
          <draw:image xlink:href="Pictures/1000020100000400000004001069E99D172314B3.png" xlink:type="simple" xlink:show="embed" xlink:actuate="onLoad">
            <text:p/>
          </draw:image>
        </draw:frame>
        <draw:custom-shape draw:name="Google Shape;847;p128" draw:style-name="gr9" draw:text-style-name="P8" draw:layer="layout" svg:width="23.499cm" svg:height="1.803cm" svg:x="0.848cm" svg:y="12.438cm">
          <text:p text:style-name="P3"><text:span text:style-name="T61">Further reading:</text:span><text:span text:style-name="T62"> </text:span></text:p>
          <text:list text:style-name="L20">
            <text:list-item>
              <text:p text:style-name="P3"><text:span text:style-name="T63"><text:a xlink:href="https://eur-lex.europa.eu/legal-content/EN/TXT/HTML/?uri=CELEX:32016R0679&amp;from=EN#d1e4319-1-1" xlink:type="simple">eur-lex.europa.eu/legal-content/EN/TXT/HTML/?uri=CELEX:32016R0679&amp;from=EN#d1e4319-1-1</text:a></text:span></text:p>
            </text:list-item>
            <text:list-item>
              <text:p text:style-name="P3"><text:span text:style-name="T64">ec.europa.eu/info/law/law-topic/data-protection/reform/rules-business-and-organisations/obligations/what-rules-apply-if-my-organisation-transfers-data-outside-eu_en</text:span></text:p>
            </text:list-item>
            <text:list-item>
              <text:p text:style-name="P44"><text:span text:style-name="T64">gov.uk/government/news/eu-adopts-adequacy-decisions-allowing-data-to-continue-flowing-freely-to-the-u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8;p128" draw:style-name="gr14" draw:text-style-name="P8" xml:id="id160" draw:id="id160" draw:layer="layout" svg:width="19.253cm" svg:height="1.816cm" svg:x="3.599cm" svg:y="10.7cm">
          <text:p text:style-name="P3"><text:span text:style-name="T19">Exchange <text:s/>of personal data &amp; biological material (for research) in any direction requires special and careful additional conside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9;p128" draw:style-name="gr55" draw:text-style-name="P8" draw:layer="layout" svg:width="7.397cm" svg:height="7.419cm" svg:x="17.507cm" svg:y="3.147cm">
          <text:p text:style-name="P37"><text:span text:style-name="T60">As of 2023, EU has granted adequacy decisions to:</text:span></text:p>
          <text:p text:style-name="P37"><text:span text:style-name="T60"/></text:p>
          <text:p text:style-name="P37"><text:span text:style-name="T60">Andorra, Argentina,</text:span></text:p>
          <text:p text:style-name="P37"><text:span text:style-name="T60">Canada, Faroe Islands,</text:span></text:p>
          <text:p text:style-name="P37"><text:span text:style-name="T60">Guernsey, Iceland, Isle of</text:span></text:p>
          <text:p text:style-name="P37"><text:span text:style-name="T60">Man, Japan, Jersey,</text:span></text:p>
          <text:p text:style-name="P37"><text:span text:style-name="T60"><text:s/></text:span><text:span text:style-name="T60">New Zealand, </text:span><text:span text:style-name="T14">Norway,</text:span><text:span text:style-name="T60"> Switzerland, Uruguay, and the UK</text:span></text:p>
          <text:p text:style-name="P44"><text:span text:style-name="T6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0;p128" draw:style-name="gr36" draw:text-style-name="P9" xml:id="id159" draw:id="id159" draw:layer="layout" svg:width="1.531cm" svg:height="1.613cm" svg:x="1.605cm" svg:y="10.963cm">
          <draw:image xlink:href="Pictures/10000201000000A300000448EACA50CF4303650F.png" xlink:type="simple" xlink:show="embed" xlink:actuate="onLoad">
            <text:p/>
          </draw:image>
        </draw:frame>
        <draw:custom-shape draw:name="Google Shape;851;p128" draw:style-name="gr14" draw:text-style-name="P8" draw:layer="layout" svg:width="22.498cm" svg:height="6.33cm" svg:x="0.848cm" svg:y="3.31cm">
          <text:p text:style-name="P7"><text:span text:style-name="T19">Key relevance in scientific research</text:span></text:p>
          <text:p text:style-name="P43"><text:span text:style-name="T19">Countries outside the EU/EEA</text:span></text:p>
          <text:p text:style-name="P43"><text:span text:style-name="T19">Transfer mechanism pursuant to GDPR chapter 5</text:span></text:p>
          <text:p text:style-name="P43"><text:span text:style-name="T19">Previously: <text:s/>Standard Contractual Clauses (SCCs)</text:span></text:p>
          <text:p text:style-name="P43"><text:span text:style-name="T19">Adequacy Deci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9" smil:attributeName="visibility" smil:to="visible"/>
                  <anim:transitionFilter smil:dur="1s" smil:targetElement="id159" smil:type="fade" smil:subtype="crossfade"/>
                </anim:par>
                <anim:par smil:begin="0s" smil:fill="hold" presentation:node-type="with-previous" presentation:preset-class="entrance" presentation:preset-id="ooo-entrance-fade-in">
                  <anim:set smil:begin="0s" smil:dur="0.001s" smil:fill="hold" smil:targetElement="id160" smil:attributeName="visibility" smil:to="visible"/>
                  <anim:transitionFilter smil:dur="1s" smil:targetElement="id160" smil:type="fade" smil:subtype="crossfade"/>
                </anim:par>
              </anim:par>
            </anim:par>
          </anim:seq>
        </anim:par>
        <presentation:notes draw:style-name="dp2">
          <draw:custom-shape draw:name="Google Shape;840;p36: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41;p36:notes" draw:style-name="gr3" draw:layer="layout" svg:width="0.002cm" svg:height="0.002cm" svg:x="0cm" svg:y="1.931cm" draw:page-number="36" presentation:class="page"/>
          <draw:frame draw:name="Google Shape;842;p36:notes" presentation:style-name="pr39" draw:text-style-name="P10" draw:layer="layout" svg:width="15.238cm" svg:height="11.428cm" svg:x="1.905cm" svg:y="12.065cm" presentation:class="notes" presentation:placeholder="true" presentation:user-transformed="true">
            <draw:text-box/>
          </draw:frame>
        </presentation:notes>
      </draw:page>
      <draw:page draw:name="page37" draw:style-name="dp1" draw:master-page-name="TITLE_5f_AND_5f_BODY" presentation:presentation-page-layout-name="AL1T1">
        <draw:custom-shape draw:name="Google Shape;856;p129" draw:style-name="gr56" draw:text-style-name="P8" draw:layer="layout" svg:width="23.253cm" svg:height="10.102cm" svg:x="0.685cm" svg:y="2.889cm">
          <text:p text:style-name="P11"><text:span text:style-name="T3"/></text:p>
          <text:p text:style-name="P11"><text:span text:style-name="T3"/></text:p>
          <text:p text:style-name="P20"><text:span text:style-name="T65">Sikt carries out privacy assessments on behalf of many (not all) Norwegian universities.</text:span></text:p>
          <text:p text:style-name="P20"><text:span text:style-name="T65"/></text:p>
          <text:p text:style-name="P45"><text:span text:style-name="T66">Processing personal data in project → Consult with Sikt personal data service</text:span></text:p>
          <text:p text:style-name="P11"><text:span text:style-name="T67"/></text:p>
          <text:p text:style-name="P11"><text:span text:style-name="T68">Minimum 30 days </text:span><text:span text:style-name="T69">before data collection starts</text:span></text:p>
          <text:p text:style-name="P11"><text:span text:style-name="T70"/></text:p>
          <text:p text:style-name="P11"><text:span text:style-name="T70"/></text:p>
          <text:p text:style-name="P44"><text:span text:style-name="T7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7;p129" draw:style-name="gr53" draw:text-style-name="P41" draw:layer="layout" svg:width="15.434cm" svg:height="2.276cm" svg:x="5.313cm" svg:y="1.061cm">
          <text:p text:style-name="P16"><text:span text:style-name="T71">Data Privacy Assessm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858;p129" draw:style-name="gr2" draw:text-style-name="P9" draw:layer="layout" svg:width="1.659cm" svg:height="1.659cm" svg:x="2.772cm" svg:y="1.37cm">
          <draw:image xlink:href="Pictures/1000020100000300000003005C10A696FD01655D.png" xlink:type="simple" xlink:show="embed" xlink:actuate="onLoad">
            <text:p/>
          </draw:image>
        </draw:frame>
        <draw:custom-shape draw:name="Google Shape;859;p129" draw:style-name="gr9" draw:text-style-name="P8" draw:layer="layout" svg:width="20.585cm" svg:height="1.283cm" svg:x="1.185cm" svg:y="12.891cm">
          <text:p text:style-name="P3"><text:span text:style-name="T20"><text:a xlink:href="https://sikt.no/en/data-protection-services" xlink:type="simple">https://sikt.no/en/data-protection-servic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0;p129" draw:style-name="gr2" draw:text-style-name="P9" draw:layer="layout" svg:width="10.895cm" svg:height="2.904cm" svg:x="6.323cm" svg:y="9.707cm">
          <draw:image xlink:href="Pictures/10000000000001B3000000747D76F1BD4040118B.png" xlink:type="simple" xlink:show="embed" xlink:actuate="onLoad">
            <text:p/>
          </draw:image>
        </draw:frame>
        <presentation:notes draw:style-name="dp2">
          <draw:frame draw:name="Google Shape;853;p37:notes" presentation:style-name="pr40" draw:text-style-name="P10" draw:layer="layout" svg:width="16.798cm" svg:height="13.363cm" svg:x="2.1cm" svg:y="14.107cm" presentation:class="notes" presentation:placeholder="true" presentation:user-transformed="true">
            <draw:text-box/>
          </draw:frame>
          <draw:page-thumbnail draw:name="Google Shape;854;p37:notes" draw:style-name="gr3" draw:layer="layout" svg:width="19.797cm" svg:height="11.135cm" svg:x="0.6cm" svg:y="2.257cm" draw:page-number="37" presentation:class="page"/>
        </presentation:notes>
      </draw:page>
      <draw:page draw:name="page38" draw:style-name="dp1" draw:master-page-name="TITLE_5f_AND_5f_BODY" presentation:presentation-page-layout-name="AL1T1">
        <draw:custom-shape draw:name="Google Shape;865;p130" draw:style-name="gr56" draw:text-style-name="P8" draw:layer="layout" svg:width="23.443cm" svg:height="8.421cm" svg:x="0.685cm" svg:y="3.524cm">
          <text:p text:style-name="P11"><text:span text:style-name="T3"/></text:p>
          <text:p text:style-name="P11"><text:span text:style-name="T3"/></text:p>
          <text:p text:style-name="P20"><text:span text:style-name="T65">Sikt carries out privacy assessments on behalf of many (not all) Norwegian universities.</text:span></text:p>
          <text:p text:style-name="P20"><text:span text:style-name="T65"/></text:p>
          <text:p text:style-name="P45"><text:span text:style-name="T66">Processing personal data in project → Consult with Sikt personal data service</text:span></text:p>
          <text:p text:style-name="P11"><text:span text:style-name="T67"/></text:p>
          <text:p text:style-name="P11"><text:span text:style-name="T68">Minimum 0 days </text:span><text:span text:style-name="T69">before data collection start</text:span></text:p>
          <text:p text:style-name="P45"><text:span text:style-name="T70"/></text:p>
          <text:p text:style-name="P45"><text:span text:style-name="T72">Medical and health</text:span><text:span text:style-name="T73"> </text:span><text:span text:style-name="T72">research</text:span><text:span text:style-name="T73"> projects</text:span><text:span text:style-name="T72"> → Apply in parallel to REK</text:span><text:span text:style-name="T73"> (depends on faculty and instit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6;p130" draw:style-name="gr2" draw:text-style-name="P9" draw:layer="layout" svg:width="10.238cm" svg:height="2.187cm" svg:x="11.135cm" svg:y="11.62cm">
          <draw:image xlink:href="Pictures/100002010000021A00000073B3ADA33C6E567737.png" xlink:type="simple" xlink:show="embed" xlink:actuate="onLoad">
            <text:p/>
          </draw:image>
        </draw:frame>
        <draw:custom-shape draw:name="Google Shape;867;p130" draw:style-name="gr53" draw:text-style-name="P41" draw:layer="layout" svg:width="15.434cm" svg:height="2.276cm" svg:x="5.313cm" svg:y="0.85cm">
          <text:p text:style-name="P16"><text:span text:style-name="T71">Data Privacy Assessm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868;p130" draw:style-name="gr2" draw:text-style-name="P9" draw:layer="layout" svg:width="1.659cm" svg:height="1.659cm" svg:x="2.772cm" svg:y="1.158cm">
          <draw:image xlink:href="Pictures/1000020100000300000003005C10A696FD01655D.png" xlink:type="simple" xlink:show="embed" xlink:actuate="onLoad">
            <text:p/>
          </draw:image>
        </draw:frame>
        <draw:frame draw:name="Google Shape;869;p130" draw:style-name="gr2" draw:text-style-name="P9" draw:layer="layout" svg:width="6.558cm" svg:height="1.747cm" svg:x="17.23cm" svg:y="8.503cm">
          <draw:image xlink:href="Pictures/10000000000001B3000000747D76F1BD4040118B.png" xlink:type="simple" xlink:show="embed" xlink:actuate="onLoad">
            <text:p/>
          </draw:image>
        </draw:frame>
        <presentation:notes draw:style-name="dp2">
          <draw:frame draw:name="Google Shape;862;p38:notes" presentation:style-name="pr41" draw:text-style-name="P10" draw:layer="layout" svg:width="16.798cm" svg:height="13.363cm" svg:x="2.1cm" svg:y="14.107cm" presentation:class="notes" presentation:placeholder="true" presentation:user-transformed="true">
            <draw:text-box/>
          </draw:frame>
          <draw:page-thumbnail draw:name="Google Shape;863;p38:notes" draw:style-name="gr3" draw:layer="layout" svg:width="19.797cm" svg:height="11.135cm" svg:x="0.6cm" svg:y="2.257cm" draw:page-number="38" presentation:class="page"/>
        </presentation:notes>
      </draw:page>
      <draw:page draw:name="page39" draw:style-name="dp1" draw:master-page-name="BLANK">
        <draw:custom-shape draw:name="Google Shape;875;p131" draw:style-name="gr4" draw:text-style-name="P8" draw:layer="layout" svg:width="22.858cm" svg:height="2.382cm" svg:x="1.27cm" svg:y="0.569cm">
          <text:p text:style-name="P11"><text:span text:style-name="T74">Responsible Authorities</text:span><text:span text:style-name="T7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6;p131" draw:style-name="gr2" draw:text-style-name="P9" draw:layer="layout" svg:width="7.468cm" svg:height="1.718cm" svg:x="16.273cm" svg:y="8.546cm">
          <draw:image xlink:href="Pictures/10000201000001230000004369D9F581B7E7DD98.png" xlink:type="simple" xlink:show="embed" xlink:actuate="onLoad">
            <text:p/>
          </draw:image>
        </draw:frame>
        <draw:frame draw:name="Google Shape;877;p131" draw:style-name="gr2" draw:text-style-name="P9" draw:layer="layout" svg:width="12.255cm" svg:height="2.618cm" svg:x="2.249cm" svg:y="8.26cm">
          <draw:image xlink:href="Pictures/100002010000021A00000073B3ADA33C6E567737.png" xlink:type="simple" xlink:show="embed" xlink:actuate="onLoad">
            <text:p/>
          </draw:image>
        </draw:frame>
        <draw:frame draw:name="Google Shape;878;p131" draw:style-name="gr2" draw:text-style-name="P9" draw:layer="layout" svg:width="6.092cm" svg:height="1.506cm" svg:x="16.904cm" svg:y="3.75cm">
          <draw:image xlink:href="Pictures/10000201000000CA000000327771BA3BABF58435.png" xlink:type="simple" xlink:show="embed" xlink:actuate="onLoad">
            <text:p/>
          </draw:image>
        </draw:frame>
        <draw:frame draw:name="Google Shape;879;p131" draw:style-name="gr2" draw:text-style-name="P9" draw:layer="layout" svg:width="5.967cm" svg:height="0.841cm" svg:x="15.448cm" svg:y="6.75cm">
          <draw:image xlink:href="Pictures/100002010000011300000027C9C4B16A08A534FA.png" xlink:type="simple" xlink:show="embed" xlink:actuate="onLoad">
            <text:p/>
          </draw:image>
        </draw:frame>
        <draw:frame draw:name="Google Shape;880;p131" draw:style-name="gr2" draw:text-style-name="P9" draw:layer="layout" svg:width="7.31cm" svg:height="1.506cm" svg:x="16.351cm" svg:y="11.304cm">
          <draw:image xlink:href="Pictures/1000020100000144000000436534AE613C0E33F2.png" xlink:type="simple" xlink:show="embed" xlink:actuate="onLoad">
            <text:p/>
          </draw:image>
        </draw:frame>
        <draw:frame draw:name="Google Shape;881;p131" draw:style-name="gr2" draw:text-style-name="P9" draw:layer="layout" svg:width="9.823cm" svg:height="2.618cm" svg:x="2.67cm" svg:y="3.917cm">
          <draw:image xlink:href="Pictures/10000000000001B3000000747D76F1BD4040118B.png" xlink:type="simple" xlink:show="embed" xlink:actuate="onLoad">
            <text:p/>
          </draw:image>
        </draw:frame>
        <presentation:notes draw:style-name="dp2">
          <draw:custom-shape draw:name="Google Shape;871;p39: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72;p39:notes" draw:style-name="gr3" draw:layer="layout" svg:width="16.931cm" svg:height="9.523cm" svg:x="1.058cm" svg:y="1.931cm" draw:page-number="39" presentation:class="page"/>
          <draw:frame draw:name="Google Shape;873;p39:notes" presentation:style-name="pr42" draw:text-style-name="P10" draw:layer="layout" svg:width="15.238cm" svg:height="11.428cm" svg:x="1.905cm" svg:y="12.065cm" presentation:class="notes" presentation:placeholder="true" presentation:user-transformed="true">
            <draw:text-box/>
          </draw:frame>
        </presentation:notes>
      </draw:page>
      <draw:page draw:name="page40" draw:style-name="dp1" draw:master-page-name="BLANK">
        <draw:frame draw:name="Google Shape;887;p132" draw:style-name="standard" draw:layer="layout" svg:width="24.418cm" svg:height="10.726cm" svg:x="0.781cm" svg:y="3.072cm">
          <table:table>
            <table:table-column table:style-name="co1"/>
            <table:table-column table:style-name="co2"/>
            <table:table-column table:style-name="co3"/>
            <table:table-row table:style-name="ro1" table:default-cell-style-name="ce1">
              <table:table-cell>
                <text:p text:style-name="P20"><text:span text:style-name="T76">Type of project</text:span></text:p>
              </table:table-cell>
              <table:table-cell>
                <text:p text:style-name="P20"><text:span text:style-name="T76">Approving authority</text:span></text:p>
              </table:table-cell>
              <table:table-cell>
                <text:p text:style-name="P20"><text:span text:style-name="T76">Advisory authority</text:span></text:p>
              </table:table-cell>
            </table:table-row>
            <table:table-row table:style-name="ro2" table:default-cell-style-name="ce1">
              <table:table-cell>
                <text:p text:style-name="P20"><text:span text:style-name="T77">Research on personal data which are not health-related</text:span></text:p>
              </table:table-cell>
              <table:table-cell>
                <text:p text:style-name="P20"><text:span text:style-name="T77">Privacy protection officer</text:span></text:p>
              </table:table-cell>
              <table:table-cell>
                <text:p text:style-name="P20"><text:span text:style-name="T77">Datatilsynet/Privacy Protection ombud</text:span></text:p>
              </table:table-cell>
            </table:table-row>
            <table:table-row table:style-name="ro1" table:default-cell-style-name="ce1">
              <table:table-cell>
                <text:p text:style-name="P20"><text:span text:style-name="T77">Human biological material?</text:span></text:p>
              </table:table-cell>
              <table:table-cell>
                <text:p text:style-name="P20"><text:span text:style-name="T77">REK + Sikt</text:span></text:p>
              </table:table-cell>
              <table:table-cell>
                <text:p text:style-name="P20"><text:span text:style-name="T77">REK</text:span></text:p>
              </table:table-cell>
            </table:table-row>
            <table:table-row table:style-name="ro1" table:default-cell-style-name="ce1">
              <table:table-cell>
                <text:p text:style-name="P20"><text:span text:style-name="T77">Health data?</text:span></text:p>
              </table:table-cell>
              <table:table-cell>
                <text:p text:style-name="P20"><text:span text:style-name="T77">REK + Sikt</text:span></text:p>
              </table:table-cell>
              <table:table-cell>
                <text:p text:style-name="P20"><text:span text:style-name="T77">Datatilsynet + REK</text:span></text:p>
              </table:table-cell>
            </table:table-row>
            <table:table-row table:style-name="ro1" table:default-cell-style-name="ce1">
              <table:table-cell>
                <text:p text:style-name="P20"><text:span text:style-name="T77">Involving test persons?</text:span></text:p>
              </table:table-cell>
              <table:table-cell>
                <text:p text:style-name="P20"><text:span text:style-name="T77">REK + Sikt</text:span></text:p>
              </table:table-cell>
              <table:table-cell>
                <text:p text:style-name="P20"><text:span text:style-name="T77">REK</text:span></text:p>
              </table:table-cell>
            </table:table-row>
            <table:table-row table:style-name="ro3" table:default-cell-style-name="ce1">
              <table:table-cell>
                <text:p text:style-name="P20"><text:span text:style-name="T77">Medicines, dietary supplements, natural substances or other substances?</text:span></text:p>
              </table:table-cell>
              <table:table-cell>
                <text:p text:style-name="P20"><text:span text:style-name="T77">Norwegian Medicines Agency + REK +Sikt</text:span></text:p>
              </table:table-cell>
              <table:table-cell>
                <text:p text:style-name="P20"><text:span text:style-name="T77">Norwegian Medicines Agency + REK</text:span></text:p>
              </table:table-cell>
            </table:table-row>
            <table:table-row table:style-name="ro2" table:default-cell-style-name="ce1">
              <table:table-cell>
                <text:p text:style-name="P20"><text:span text:style-name="T77">Medical equipment is used on humans?</text:span></text:p>
              </table:table-cell>
              <table:table-cell>
                <text:p text:style-name="P20"><text:span text:style-name="T77">The Norwegian Directorate of Health + REK + Sikt</text:span></text:p>
              </table:table-cell>
              <table:table-cell>
                <text:p text:style-name="P20"><text:span text:style-name="T77">The Norwegian Directorate of Health</text:span></text:p>
              </table:table-cell>
            </table:table-row>
            <table:table-row table:style-name="ro4" table:default-cell-style-name="ce1">
              <table:table-cell>
                <text:p text:style-name="P20"><text:span text:style-name="T77">Radiation on humans?</text:span></text:p>
              </table:table-cell>
              <table:table-cell>
                <text:p text:style-name="P20"><text:span text:style-name="T77">REK + Sikt</text:span></text:p>
              </table:table-cell>
              <table:table-cell>
                <text:p text:style-name="P20"><text:span text:style-name="T77">REK</text:span></text:p>
              </table:table-cell>
            </table:table-row>
          </table:table>
          <draw:image xlink:href="Pictures/TablePreview1.svm" xlink:type="simple" xlink:show="embed" xlink:actuate="onLoad"/>
        </draw:frame>
        <draw:custom-shape draw:name="Google Shape;888;p132" draw:style-name="gr57" draw:text-style-name="P21" draw:layer="layout" svg:width="24.899cm" svg:height="8.736cm" svg:x="0.119cm" svg:y="5.55cm">
          <text:p text:style-name="P7"><text:span text:style-name="T4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9;p132" draw:style-name="gr54" draw:text-style-name="P42" draw:layer="layout" svg:width="11.593cm" svg:height="1.802cm" svg:x="7.194cm" svg:y="0.78cm">
          <text:p text:style-name="P16"><text:span text:style-name="T37">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890;p132" draw:style-name="gr2" draw:text-style-name="P9" draw:layer="layout" svg:width="1.649cm" svg:height="1.649cm" svg:x="4.99cm" svg:y="0.78cm">
          <draw:image xlink:href="Pictures/100002010000040000000400056732C6DA6137D4.png" xlink:type="simple" xlink:show="embed" xlink:actuate="onLoad">
            <text:p/>
          </draw:image>
        </draw:frame>
        <draw:custom-shape draw:name="Google Shape;891;p132" draw:style-name="gr58" draw:text-style-name="P8" draw:layer="layout" svg:width="22.102cm" svg:height="0.89cm" svg:x="1.025cm" svg:y="13.562cm">
          <text:p text:style-name="P7"><text:span text:style-name="T78"><text:a xlink:href="https://www.uio.no/english/for-employees/support/research/quality-system-for-health-research/approvals-and-authorizations/" xlink:type="simple">https://www.uio.no/english/for-employees/support/research/quality-system-for-health-research/approvals-and-authorizations/</text:a></text:span><text:span text:style-name="T7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883;p40: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84;p40:notes" draw:style-name="gr3" draw:layer="layout" svg:width="0.002cm" svg:height="0.002cm" svg:x="0cm" svg:y="1.931cm" draw:page-number="40" presentation:class="page"/>
          <draw:frame draw:name="Google Shape;885;p40:notes" presentation:style-name="pr43" draw:text-style-name="P10" draw:layer="layout" svg:width="15.238cm" svg:height="11.428cm" svg:x="1.905cm" svg:y="12.065cm" presentation:class="notes" presentation:placeholder="true" presentation:user-transformed="true">
            <draw:text-box/>
          </draw:frame>
        </presentation:notes>
      </draw:page>
      <draw:page draw:name="page41" draw:style-name="dp1" draw:master-page-name="BLANK">
        <draw:frame draw:name="Google Shape;897;p133" draw:style-name="standard" draw:layer="layout" svg:width="24.418cm" svg:height="10.726cm" svg:x="0.781cm" svg:y="3.072cm">
          <table:table>
            <table:table-column table:style-name="co1"/>
            <table:table-column table:style-name="co2"/>
            <table:table-column table:style-name="co3"/>
            <table:table-row table:style-name="ro1" table:default-cell-style-name="ce1">
              <table:table-cell>
                <text:p text:style-name="P20"><text:span text:style-name="T76">Type of project</text:span></text:p>
              </table:table-cell>
              <table:table-cell>
                <text:p text:style-name="P20"><text:span text:style-name="T76">Approving authority</text:span></text:p>
              </table:table-cell>
              <table:table-cell>
                <text:p text:style-name="P20"><text:span text:style-name="T76">Advisory authority</text:span></text:p>
              </table:table-cell>
            </table:table-row>
            <table:table-row table:style-name="ro2" table:default-cell-style-name="ce1">
              <table:table-cell>
                <text:p text:style-name="P20"><text:span text:style-name="T77">Research on personal data which are not health-related</text:span></text:p>
              </table:table-cell>
              <table:table-cell>
                <text:p text:style-name="P20"><text:span text:style-name="T77">Privacy protection officer</text:span></text:p>
              </table:table-cell>
              <table:table-cell>
                <text:p text:style-name="P20"><text:span text:style-name="T77">Datatilsynet/Privacy Protection ombud</text:span></text:p>
              </table:table-cell>
            </table:table-row>
            <table:table-row table:style-name="ro1" table:default-cell-style-name="ce1">
              <table:table-cell>
                <text:p text:style-name="P20"><text:span text:style-name="T77">Human biological material</text:span></text:p>
              </table:table-cell>
              <table:table-cell>
                <text:p text:style-name="P20"><text:span text:style-name="T77">REK </text:span></text:p>
              </table:table-cell>
              <table:table-cell>
                <text:p text:style-name="P20"><text:span text:style-name="T77">REK</text:span></text:p>
              </table:table-cell>
            </table:table-row>
            <table:table-row table:style-name="ro1" table:default-cell-style-name="ce1">
              <table:table-cell>
                <text:p text:style-name="P20"><text:span text:style-name="T77">Health data?</text:span></text:p>
              </table:table-cell>
              <table:table-cell>
                <text:p text:style-name="P20"><text:span text:style-name="T77">REK + Sikt</text:span></text:p>
              </table:table-cell>
              <table:table-cell>
                <text:p text:style-name="P20"><text:span text:style-name="T77">Datatilsynet + REK</text:span></text:p>
              </table:table-cell>
            </table:table-row>
            <table:table-row table:style-name="ro1" table:default-cell-style-name="ce1">
              <table:table-cell>
                <text:p text:style-name="P20"><text:span text:style-name="T77">Involving test persons?</text:span></text:p>
              </table:table-cell>
              <table:table-cell>
                <text:p text:style-name="P20"><text:span text:style-name="T77">REK + Sikt</text:span></text:p>
              </table:table-cell>
              <table:table-cell>
                <text:p text:style-name="P20"><text:span text:style-name="T77">REK</text:span></text:p>
              </table:table-cell>
            </table:table-row>
            <table:table-row table:style-name="ro3" table:default-cell-style-name="ce1">
              <table:table-cell>
                <text:p text:style-name="P20"><text:span text:style-name="T77">Medicines, dietary supplements, natural substances or other substances?</text:span></text:p>
              </table:table-cell>
              <table:table-cell>
                <text:p text:style-name="P20"><text:span text:style-name="T77">Norwegian Medicines Agency + REK +Sikt</text:span></text:p>
              </table:table-cell>
              <table:table-cell>
                <text:p text:style-name="P20"><text:span text:style-name="T77">Norwegian Medicines Agency + REK</text:span></text:p>
              </table:table-cell>
            </table:table-row>
            <table:table-row table:style-name="ro2" table:default-cell-style-name="ce1">
              <table:table-cell>
                <text:p text:style-name="P20"><text:span text:style-name="T77">Medical equipment is used on humans?</text:span></text:p>
              </table:table-cell>
              <table:table-cell>
                <text:p text:style-name="P20"><text:span text:style-name="T77">The Norwegian Directorate of Health + REK + Sikt</text:span></text:p>
              </table:table-cell>
              <table:table-cell>
                <text:p text:style-name="P20"><text:span text:style-name="T77">The Norwegian Directorate of Health</text:span></text:p>
              </table:table-cell>
            </table:table-row>
            <table:table-row table:style-name="ro4" table:default-cell-style-name="ce1">
              <table:table-cell>
                <text:p text:style-name="P20"><text:span text:style-name="T77">Radiation on humans?</text:span></text:p>
              </table:table-cell>
              <table:table-cell>
                <text:p text:style-name="P20"><text:span text:style-name="T77">REK + Sikt</text:span></text:p>
              </table:table-cell>
              <table:table-cell>
                <text:p text:style-name="P20"><text:span text:style-name="T77">REK</text:span></text:p>
              </table:table-cell>
            </table:table-row>
          </table:table>
          <draw:image xlink:href="Pictures/TablePreview2.svm" xlink:type="simple" xlink:show="embed" xlink:actuate="onLoad"/>
        </draw:frame>
        <draw:custom-shape draw:name="Google Shape;898;p133" draw:style-name="gr57" draw:text-style-name="P21" draw:layer="layout" svg:width="24.899cm" svg:height="7.536cm" svg:x="0.119cm" svg:y="6.75cm">
          <text:p text:style-name="P7"><text:span text:style-name="T4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9;p133" draw:style-name="gr54" draw:text-style-name="P42" draw:layer="layout" svg:width="11.593cm" svg:height="1.802cm" svg:x="7.194cm" svg:y="0.78cm">
          <text:p text:style-name="P16"><text:span text:style-name="T37">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00;p133" draw:style-name="gr58" draw:text-style-name="P8" draw:layer="layout" svg:width="22.102cm" svg:height="0.89cm" svg:x="1.025cm" svg:y="13.562cm">
          <text:p text:style-name="P7"><text:span text:style-name="T78"><text:a xlink:href="https://www.uio.no/english/for-employees/support/research/quality-system-for-health-research/approvals-and-authorizations/" xlink:type="simple">https://www.uio.no/english/for-employees/support/research/quality-system-for-health-research/approvals-and-authorizations/</text:a></text:span><text:span text:style-name="T7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893;p41: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94;p41:notes" draw:style-name="gr3" draw:layer="layout" svg:width="0.002cm" svg:height="0.002cm" svg:x="0cm" svg:y="1.931cm" draw:page-number="41" presentation:class="page"/>
          <draw:frame draw:name="Google Shape;895;p41:notes" presentation:style-name="pr44" draw:text-style-name="P10" draw:layer="layout" svg:width="15.238cm" svg:height="11.428cm" svg:x="1.905cm" svg:y="12.065cm" presentation:class="notes" presentation:placeholder="true" presentation:user-transformed="true">
            <draw:text-box/>
          </draw:frame>
        </presentation:notes>
      </draw:page>
      <draw:page draw:name="page42" draw:style-name="dp1" draw:master-page-name="BLANK">
        <draw:frame draw:name="Google Shape;906;p134" draw:style-name="standard" draw:layer="layout" svg:width="24.418cm" svg:height="10.726cm" svg:x="0.781cm" svg:y="3.072cm">
          <table:table>
            <table:table-column table:style-name="co1"/>
            <table:table-column table:style-name="co2"/>
            <table:table-column table:style-name="co3"/>
            <table:table-row table:style-name="ro1" table:default-cell-style-name="ce1">
              <table:table-cell>
                <text:p text:style-name="P20"><text:span text:style-name="T76">Type of project</text:span></text:p>
              </table:table-cell>
              <table:table-cell>
                <text:p text:style-name="P20"><text:span text:style-name="T76">Approving authority</text:span></text:p>
              </table:table-cell>
              <table:table-cell>
                <text:p text:style-name="P20"><text:span text:style-name="T76">Advisory authority</text:span></text:p>
              </table:table-cell>
            </table:table-row>
            <table:table-row table:style-name="ro2" table:default-cell-style-name="ce1">
              <table:table-cell>
                <text:p text:style-name="P20"><text:span text:style-name="T77">Research on personal data which are not health-related</text:span></text:p>
              </table:table-cell>
              <table:table-cell>
                <text:p text:style-name="P20"><text:span text:style-name="T77">Privacy protection officer</text:span></text:p>
              </table:table-cell>
              <table:table-cell>
                <text:p text:style-name="P20"><text:span text:style-name="T77">Datatilsynet/Privacy Protection ombud</text:span></text:p>
              </table:table-cell>
            </table:table-row>
            <table:table-row table:style-name="ro1" table:default-cell-style-name="ce1">
              <table:table-cell>
                <text:p text:style-name="P20"><text:span text:style-name="T77">Human biological material</text:span></text:p>
              </table:table-cell>
              <table:table-cell>
                <text:p text:style-name="P20"><text:span text:style-name="T77">REK</text:span></text:p>
              </table:table-cell>
              <table:table-cell>
                <text:p text:style-name="P20"><text:span text:style-name="T77">REK</text:span></text:p>
              </table:table-cell>
            </table:table-row>
            <table:table-row table:style-name="ro1" table:default-cell-style-name="ce1">
              <table:table-cell>
                <text:p text:style-name="P20"><text:span text:style-name="T77">Health data</text:span></text:p>
              </table:table-cell>
              <table:table-cell>
                <text:p text:style-name="P20"><text:span text:style-name="T77">REK</text:span></text:p>
              </table:table-cell>
              <table:table-cell>
                <text:p text:style-name="P20"><text:span text:style-name="T77">Datatilsynet + REK</text:span></text:p>
              </table:table-cell>
            </table:table-row>
            <table:table-row table:style-name="ro1" table:default-cell-style-name="ce1">
              <table:table-cell>
                <text:p text:style-name="P20"><text:span text:style-name="T77">Involving test persons?</text:span></text:p>
              </table:table-cell>
              <table:table-cell>
                <text:p text:style-name="P20"><text:span text:style-name="T77">REK + Sikt</text:span></text:p>
              </table:table-cell>
              <table:table-cell>
                <text:p text:style-name="P20"><text:span text:style-name="T77">REK</text:span></text:p>
              </table:table-cell>
            </table:table-row>
            <table:table-row table:style-name="ro3" table:default-cell-style-name="ce1">
              <table:table-cell>
                <text:p text:style-name="P20"><text:span text:style-name="T77">Medicines, dietary supplements, natural substances or other substances?</text:span></text:p>
              </table:table-cell>
              <table:table-cell>
                <text:p text:style-name="P20"><text:span text:style-name="T77">Norwegian Medicines Agency + REK +Sikt</text:span></text:p>
              </table:table-cell>
              <table:table-cell>
                <text:p text:style-name="P20"><text:span text:style-name="T77">Norwegian Medicines Agency + REK</text:span></text:p>
              </table:table-cell>
            </table:table-row>
            <table:table-row table:style-name="ro2" table:default-cell-style-name="ce1">
              <table:table-cell>
                <text:p text:style-name="P20"><text:span text:style-name="T77">Medical equipment is used on humans?</text:span></text:p>
              </table:table-cell>
              <table:table-cell>
                <text:p text:style-name="P20"><text:span text:style-name="T77">The Norwegian Directorate of Health + REK + Sikt</text:span></text:p>
              </table:table-cell>
              <table:table-cell>
                <text:p text:style-name="P20"><text:span text:style-name="T77">The Norwegian Directorate of Health</text:span></text:p>
              </table:table-cell>
            </table:table-row>
            <table:table-row table:style-name="ro4" table:default-cell-style-name="ce1">
              <table:table-cell>
                <text:p text:style-name="P20"><text:span text:style-name="T77">Radiation on humans?</text:span></text:p>
              </table:table-cell>
              <table:table-cell>
                <text:p text:style-name="P20"><text:span text:style-name="T77">REK + Sikt</text:span></text:p>
              </table:table-cell>
              <table:table-cell>
                <text:p text:style-name="P20"><text:span text:style-name="T77">REK</text:span></text:p>
              </table:table-cell>
            </table:table-row>
          </table:table>
          <draw:image xlink:href="Pictures/TablePreview3.svm" xlink:type="simple" xlink:show="embed" xlink:actuate="onLoad"/>
        </draw:frame>
        <draw:custom-shape draw:name="Google Shape;907;p134" draw:style-name="gr57" draw:text-style-name="P21" draw:layer="layout" svg:width="24.899cm" svg:height="6.636cm" svg:x="0.119cm" svg:y="7.65cm">
          <text:p text:style-name="P7"><text:span text:style-name="T4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8;p134" draw:style-name="gr54" draw:text-style-name="P42" draw:layer="layout" svg:width="11.593cm" svg:height="1.802cm" svg:x="7.194cm" svg:y="0.569cm">
          <text:p text:style-name="P16"><text:span text:style-name="T37">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09;p134" draw:style-name="gr58" draw:text-style-name="P8" draw:layer="layout" svg:width="22.102cm" svg:height="0.89cm" svg:x="1.025cm" svg:y="13.562cm">
          <text:p text:style-name="P7"><text:span text:style-name="T78"><text:a xlink:href="https://www.uio.no/english/for-employees/support/research/quality-system-for-health-research/approvals-and-authorizations/" xlink:type="simple">https://www.uio.no/english/for-employees/support/research/quality-system-for-health-research/approvals-and-authorizations/</text:a></text:span><text:span text:style-name="T7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902;p42: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903;p42:notes" draw:style-name="gr3" draw:layer="layout" svg:width="0.002cm" svg:height="0.002cm" svg:x="0cm" svg:y="1.931cm" draw:page-number="42" presentation:class="page"/>
          <draw:frame draw:name="Google Shape;904;p42:notes" presentation:style-name="pr45" draw:text-style-name="P10" draw:layer="layout" svg:width="15.238cm" svg:height="11.428cm" svg:x="1.905cm" svg:y="12.065cm" presentation:class="notes" presentation:placeholder="true" presentation:user-transformed="true">
            <draw:text-box/>
          </draw:frame>
        </presentation:notes>
      </draw:page>
      <draw:page draw:name="page43" draw:style-name="dp1" draw:master-page-name="BLANK">
        <draw:frame draw:name="Google Shape;915;p135" draw:style-name="standard" draw:layer="layout" svg:width="24.418cm" svg:height="10.726cm" svg:x="0.781cm" svg:y="3.072cm">
          <table:table>
            <table:table-column table:style-name="co1"/>
            <table:table-column table:style-name="co2"/>
            <table:table-column table:style-name="co3"/>
            <table:table-row table:style-name="ro1" table:default-cell-style-name="ce1">
              <table:table-cell>
                <text:p text:style-name="P20"><text:span text:style-name="T76">Type of project</text:span></text:p>
              </table:table-cell>
              <table:table-cell>
                <text:p text:style-name="P20"><text:span text:style-name="T76">Approving authority</text:span></text:p>
              </table:table-cell>
              <table:table-cell>
                <text:p text:style-name="P20"><text:span text:style-name="T76">Advisory authority</text:span></text:p>
              </table:table-cell>
            </table:table-row>
            <table:table-row table:style-name="ro2" table:default-cell-style-name="ce1">
              <table:table-cell>
                <text:p text:style-name="P20"><text:span text:style-name="T77">Research on personal data which are not health-related</text:span></text:p>
              </table:table-cell>
              <table:table-cell>
                <text:p text:style-name="P20"><text:span text:style-name="T77">Privacy protection officer</text:span></text:p>
              </table:table-cell>
              <table:table-cell>
                <text:p text:style-name="P20"><text:span text:style-name="T77">Datatilsynet/Privacy Protection ombud</text:span></text:p>
              </table:table-cell>
            </table:table-row>
            <table:table-row table:style-name="ro1" table:default-cell-style-name="ce1">
              <table:table-cell>
                <text:p text:style-name="P20"><text:span text:style-name="T77">Human biological material</text:span></text:p>
              </table:table-cell>
              <table:table-cell>
                <text:p text:style-name="P20"><text:span text:style-name="T77">REK</text:span></text:p>
              </table:table-cell>
              <table:table-cell>
                <text:p text:style-name="P20"><text:span text:style-name="T77">REK</text:span></text:p>
              </table:table-cell>
            </table:table-row>
            <table:table-row table:style-name="ro1" table:default-cell-style-name="ce1">
              <table:table-cell>
                <text:p text:style-name="P20"><text:span text:style-name="T77">Health data</text:span></text:p>
              </table:table-cell>
              <table:table-cell>
                <text:p text:style-name="P20"><text:span text:style-name="T77">REK </text:span></text:p>
              </table:table-cell>
              <table:table-cell>
                <text:p text:style-name="P20"><text:span text:style-name="T77">Datatilsynet + REK</text:span></text:p>
              </table:table-cell>
            </table:table-row>
            <table:table-row table:style-name="ro1" table:default-cell-style-name="ce1">
              <table:table-cell>
                <text:p text:style-name="P20"><text:span text:style-name="T77">Involving test persons</text:span></text:p>
              </table:table-cell>
              <table:table-cell>
                <text:p text:style-name="P20"><text:span text:style-name="T77">REK</text:span></text:p>
              </table:table-cell>
              <table:table-cell>
                <text:p text:style-name="P20"><text:span text:style-name="T77">REK</text:span></text:p>
              </table:table-cell>
            </table:table-row>
            <table:table-row table:style-name="ro3" table:default-cell-style-name="ce1">
              <table:table-cell>
                <text:p text:style-name="P20"><text:span text:style-name="T77">Medicines, dietary supplements, natural substances or other substances?</text:span></text:p>
              </table:table-cell>
              <table:table-cell>
                <text:p text:style-name="P20"><text:span text:style-name="T77">Norwegian Medicines Agency + REK +Sikt</text:span></text:p>
              </table:table-cell>
              <table:table-cell>
                <text:p text:style-name="P20"><text:span text:style-name="T77">Norwegian Medicines Agency + REK</text:span></text:p>
              </table:table-cell>
            </table:table-row>
            <table:table-row table:style-name="ro2" table:default-cell-style-name="ce1">
              <table:table-cell>
                <text:p text:style-name="P20"><text:span text:style-name="T77">Medical equipment is used on humans?</text:span></text:p>
              </table:table-cell>
              <table:table-cell>
                <text:p text:style-name="P20"><text:span text:style-name="T77">The Norwegian Directorate of Health + REK + Sikt</text:span></text:p>
              </table:table-cell>
              <table:table-cell>
                <text:p text:style-name="P20"><text:span text:style-name="T77">The Norwegian Directorate of Health</text:span></text:p>
              </table:table-cell>
            </table:table-row>
            <table:table-row table:style-name="ro4" table:default-cell-style-name="ce1">
              <table:table-cell>
                <text:p text:style-name="P20"><text:span text:style-name="T77">Radiation on humans?</text:span></text:p>
              </table:table-cell>
              <table:table-cell>
                <text:p text:style-name="P20"><text:span text:style-name="T77">REK + Sikt</text:span></text:p>
              </table:table-cell>
              <table:table-cell>
                <text:p text:style-name="P20"><text:span text:style-name="T77">REK</text:span></text:p>
              </table:table-cell>
            </table:table-row>
          </table:table>
          <draw:image xlink:href="Pictures/TablePreview4.svm" xlink:type="simple" xlink:show="embed" xlink:actuate="onLoad"/>
        </draw:frame>
        <draw:custom-shape draw:name="Google Shape;916;p135" draw:style-name="gr57" draw:text-style-name="P21" draw:layer="layout" svg:width="24.899cm" svg:height="5.585cm" svg:x="0.119cm" svg:y="8.701cm">
          <text:p text:style-name="P7"><text:span text:style-name="T4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7;p135" draw:style-name="gr54" draw:text-style-name="P42" draw:layer="layout" svg:width="11.593cm" svg:height="1.802cm" svg:x="7.194cm" svg:y="0.569cm">
          <text:p text:style-name="P16"><text:span text:style-name="T37">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18;p135" draw:style-name="gr58" draw:text-style-name="P8" draw:layer="layout" svg:width="22.102cm" svg:height="0.89cm" svg:x="1.025cm" svg:y="13.562cm">
          <text:p text:style-name="P7"><text:span text:style-name="T78"><text:a xlink:href="https://www.uio.no/english/for-employees/support/research/quality-system-for-health-research/approvals-and-authorizations/" xlink:type="simple">https://www.uio.no/english/for-employees/support/research/quality-system-for-health-research/approvals-and-authorizations/</text:a></text:span><text:span text:style-name="T7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911;p43: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912;p43:notes" draw:style-name="gr3" draw:layer="layout" svg:width="0.002cm" svg:height="0.002cm" svg:x="0cm" svg:y="1.931cm" draw:page-number="43" presentation:class="page"/>
          <draw:frame draw:name="Google Shape;913;p43:notes" presentation:style-name="pr46" draw:text-style-name="P10" draw:layer="layout" svg:width="15.238cm" svg:height="11.428cm" svg:x="1.905cm" svg:y="12.065cm" presentation:class="notes" presentation:placeholder="true" presentation:user-transformed="true">
            <draw:text-box/>
          </draw:frame>
        </presentation:notes>
      </draw:page>
      <draw:page draw:name="page44" draw:style-name="dp1" draw:master-page-name="BLANK">
        <draw:frame draw:name="Google Shape;924;p136" draw:style-name="standard" draw:layer="layout" svg:width="24.418cm" svg:height="6.608cm" svg:x="0.781cm" svg:y="3.072cm">
          <table:table>
            <table:table-column table:style-name="co1"/>
            <table:table-column table:style-name="co2"/>
            <table:table-column table:style-name="co3"/>
            <table:table-row table:style-name="ro1" table:default-cell-style-name="ce1">
              <table:table-cell>
                <text:p text:style-name="P20"><text:span text:style-name="T76">Type of project</text:span></text:p>
              </table:table-cell>
              <table:table-cell>
                <text:p text:style-name="P20"><text:span text:style-name="T76">Approving authority</text:span></text:p>
              </table:table-cell>
              <table:table-cell>
                <text:p text:style-name="P20"><text:span text:style-name="T76">Advisory authority</text:span></text:p>
              </table:table-cell>
            </table:table-row>
            <table:table-row table:style-name="ro2" table:default-cell-style-name="ce1">
              <table:table-cell>
                <text:p text:style-name="P20"><text:span text:style-name="T77">Research on personal data which are not health-related</text:span></text:p>
              </table:table-cell>
              <table:table-cell>
                <text:p text:style-name="P20"><text:span text:style-name="T77">Privacy protection officer </text:span></text:p>
              </table:table-cell>
              <table:table-cell>
                <text:p text:style-name="P20"><text:span text:style-name="T77">Datatilsynet/Privacy Protection ombud</text:span></text:p>
              </table:table-cell>
            </table:table-row>
            <table:table-row table:style-name="ro1" table:default-cell-style-name="ce1">
              <table:table-cell>
                <text:p text:style-name="P20"><text:span text:style-name="T77">Human biological material</text:span></text:p>
              </table:table-cell>
              <table:table-cell>
                <text:p text:style-name="P20"><text:span text:style-name="T77">REK </text:span></text:p>
              </table:table-cell>
              <table:table-cell>
                <text:p text:style-name="P20"><text:span text:style-name="T77">REK</text:span></text:p>
              </table:table-cell>
            </table:table-row>
            <table:table-row table:style-name="ro1" table:default-cell-style-name="ce1">
              <table:table-cell>
                <text:p text:style-name="P20"><text:span text:style-name="T77">Health data</text:span></text:p>
              </table:table-cell>
              <table:table-cell>
                <text:p text:style-name="P20"><text:span text:style-name="T77">REK</text:span></text:p>
              </table:table-cell>
              <table:table-cell>
                <text:p text:style-name="P20"><text:span text:style-name="T77">Datatilsynet + REK</text:span></text:p>
              </table:table-cell>
            </table:table-row>
            <table:table-row table:style-name="ro1" table:default-cell-style-name="ce1">
              <table:table-cell>
                <text:p text:style-name="P20"><text:span text:style-name="T77">Involving test persons</text:span></text:p>
              </table:table-cell>
              <table:table-cell>
                <text:p text:style-name="P20"><text:span text:style-name="T77">REK </text:span></text:p>
              </table:table-cell>
              <table:table-cell>
                <text:p text:style-name="P20"><text:span text:style-name="T77">REK</text:span></text:p>
              </table:table-cell>
            </table:table-row>
            <table:table-row table:style-name="ro1" table:default-cell-style-name="ce1">
              <table:table-cell>
                <text:p text:style-name="P20"><text:span text:style-name="T77">Radiation on humans</text:span></text:p>
              </table:table-cell>
              <table:table-cell>
                <text:p text:style-name="P20"><text:span text:style-name="T77">REK</text:span></text:p>
              </table:table-cell>
              <table:table-cell>
                <text:p text:style-name="P20"><text:span text:style-name="T77">REK</text:span></text:p>
              </table:table-cell>
            </table:table-row>
          </table:table>
          <draw:image xlink:href="Pictures/TablePreview5.svm" xlink:type="simple" xlink:show="embed" xlink:actuate="onLoad"/>
        </draw:frame>
        <draw:custom-shape draw:name="Google Shape;925;p136" draw:style-name="gr54" draw:text-style-name="P42" draw:layer="layout" svg:width="11.593cm" svg:height="1.802cm" svg:x="7.194cm" svg:y="0.78cm">
          <text:p text:style-name="P16"><text:span text:style-name="T37">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26;p136" draw:style-name="gr58" draw:text-style-name="P8" draw:layer="layout" svg:width="22.102cm" svg:height="0.89cm" svg:x="1.025cm" svg:y="13.562cm">
          <text:p text:style-name="P7"><text:span text:style-name="T78"><text:a xlink:href="https://www.uio.no/english/for-employees/support/research/quality-system-for-health-research/approvals-and-authorizations/" xlink:type="simple">https://www.uio.no/english/for-employees/support/research/quality-system-for-health-research/approvals-and-authorizations/</text:a></text:span><text:span text:style-name="T7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920;p44: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921;p44:notes" draw:style-name="gr3" draw:layer="layout" svg:width="0.002cm" svg:height="0.002cm" svg:x="0cm" svg:y="1.931cm" draw:page-number="44" presentation:class="page"/>
          <draw:frame draw:name="Google Shape;922;p44:notes" presentation:style-name="pr47" draw:text-style-name="P10" draw:layer="layout" svg:width="15.238cm" svg:height="11.428cm" svg:x="1.905cm" svg:y="12.065cm" presentation:class="notes" presentation:placeholder="true" presentation:user-transformed="true">
            <draw:text-box/>
          </draw:frame>
        </presentation:notes>
      </draw:page>
      <draw:page draw:name="page45" draw:style-name="dp1" draw:master-page-name="BLANK">
        <draw:frame draw:name="Google Shape;932;p137" draw:style-name="standard" draw:layer="layout" svg:width="24.418cm" svg:height="9.027cm" svg:x="0.781cm" svg:y="3.072cm">
          <table:table>
            <table:table-column table:style-name="co1"/>
            <table:table-column table:style-name="co2"/>
            <table:table-column table:style-name="co3"/>
            <table:table-row table:style-name="ro1" table:default-cell-style-name="ce1">
              <table:table-cell>
                <text:p text:style-name="P20"><text:span text:style-name="T76">Type of project</text:span></text:p>
              </table:table-cell>
              <table:table-cell>
                <text:p text:style-name="P20"><text:span text:style-name="T76">Approving authority</text:span></text:p>
              </table:table-cell>
              <table:table-cell>
                <text:p text:style-name="P20"><text:span text:style-name="T76">Advisory authority</text:span></text:p>
              </table:table-cell>
            </table:table-row>
            <table:table-row table:style-name="ro2" table:default-cell-style-name="ce1">
              <table:table-cell>
                <text:p text:style-name="P20"><text:span text:style-name="T77">Research on personal data which are not health-related</text:span></text:p>
              </table:table-cell>
              <table:table-cell>
                <text:p text:style-name="P20"><text:span text:style-name="T77">Privacy protection officer </text:span></text:p>
              </table:table-cell>
              <table:table-cell>
                <text:p text:style-name="P20"><text:span text:style-name="T77">Datatilsynet/Privacy Protection ombud</text:span></text:p>
              </table:table-cell>
            </table:table-row>
            <table:table-row table:style-name="ro1" table:default-cell-style-name="ce1">
              <table:table-cell>
                <text:p text:style-name="P20"><text:span text:style-name="T77">Human biological material</text:span></text:p>
              </table:table-cell>
              <table:table-cell>
                <text:p text:style-name="P20"><text:span text:style-name="T77">REK </text:span></text:p>
              </table:table-cell>
              <table:table-cell>
                <text:p text:style-name="P20"><text:span text:style-name="T77">REK</text:span></text:p>
              </table:table-cell>
            </table:table-row>
            <table:table-row table:style-name="ro1" table:default-cell-style-name="ce1">
              <table:table-cell>
                <text:p text:style-name="P20"><text:span text:style-name="T77">Health data</text:span></text:p>
              </table:table-cell>
              <table:table-cell>
                <text:p text:style-name="P20"><text:span text:style-name="T77">REK </text:span></text:p>
              </table:table-cell>
              <table:table-cell>
                <text:p text:style-name="P20"><text:span text:style-name="T77">Datatilsynet + REK</text:span></text:p>
              </table:table-cell>
            </table:table-row>
            <table:table-row table:style-name="ro1" table:default-cell-style-name="ce1">
              <table:table-cell>
                <text:p text:style-name="P20"><text:span text:style-name="T77">Involving test persons</text:span></text:p>
              </table:table-cell>
              <table:table-cell>
                <text:p text:style-name="P20"><text:span text:style-name="T77">REK </text:span></text:p>
              </table:table-cell>
              <table:table-cell>
                <text:p text:style-name="P20"><text:span text:style-name="T77">REK</text:span></text:p>
              </table:table-cell>
            </table:table-row>
            <table:table-row table:style-name="ro1" table:default-cell-style-name="ce1">
              <table:table-cell>
                <text:p text:style-name="P20"><text:span text:style-name="T77">Radiation on humans</text:span></text:p>
              </table:table-cell>
              <table:table-cell>
                <text:p text:style-name="P20"><text:span text:style-name="T77">REK </text:span></text:p>
              </table:table-cell>
              <table:table-cell>
                <text:p text:style-name="P20"><text:span text:style-name="T77">REK</text:span></text:p>
              </table:table-cell>
            </table:table-row>
            <table:table-row table:style-name="ro5" table:default-cell-style-name="ce1">
              <table:table-cell>
                <text:p text:style-name="P20"><text:span text:style-name="T77">Medicines, dietary supplements, natural substances or other substances</text:span></text:p>
              </table:table-cell>
              <table:table-cell>
                <text:p text:style-name="P20"><text:span text:style-name="T77">Norwegian Medicines Agency + REK </text:span></text:p>
              </table:table-cell>
              <table:table-cell>
                <text:p text:style-name="P20"><text:span text:style-name="T77">Norwegian Medicines Agency + REK</text:span></text:p>
              </table:table-cell>
            </table:table-row>
          </table:table>
          <draw:image xlink:href="Pictures/TablePreview6.svm" xlink:type="simple" xlink:show="embed" xlink:actuate="onLoad"/>
        </draw:frame>
        <draw:custom-shape draw:name="Google Shape;933;p137" draw:style-name="gr54" draw:text-style-name="P42" draw:layer="layout" svg:width="11.593cm" svg:height="1.802cm" svg:x="7.194cm" svg:y="0.78cm">
          <text:p text:style-name="P16"><text:span text:style-name="T37">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34;p137" draw:style-name="gr58" draw:text-style-name="P8" draw:layer="layout" svg:width="22.102cm" svg:height="0.89cm" svg:x="1.025cm" svg:y="13.562cm">
          <text:p text:style-name="P7"><text:span text:style-name="T78"><text:a xlink:href="https://www.uio.no/english/for-employees/support/research/quality-system-for-health-research/approvals-and-authorizations/" xlink:type="simple">https://www.uio.no/english/for-employees/support/research/quality-system-for-health-research/approvals-and-authorizations/</text:a></text:span><text:span text:style-name="T7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928;p45: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929;p45:notes" draw:style-name="gr3" draw:layer="layout" svg:width="0.002cm" svg:height="0.002cm" svg:x="0cm" svg:y="1.931cm" draw:page-number="45" presentation:class="page"/>
          <draw:frame draw:name="Google Shape;930;p45:notes" presentation:style-name="pr48" draw:text-style-name="P10" draw:layer="layout" svg:width="15.238cm" svg:height="11.428cm" svg:x="1.905cm" svg:y="12.065cm" presentation:class="notes" presentation:placeholder="true" presentation:user-transformed="true">
            <draw:text-box/>
          </draw:frame>
        </presentation:notes>
      </draw:page>
      <draw:page draw:name="page46" draw:style-name="dp1" draw:master-page-name="BLANK">
        <draw:frame draw:name="Google Shape;940;p138" draw:style-name="standard" draw:layer="layout" svg:width="24.418cm" svg:height="11.126cm" svg:x="0.781cm" svg:y="3.072cm">
          <table:table>
            <table:table-column table:style-name="co1"/>
            <table:table-column table:style-name="co2"/>
            <table:table-column table:style-name="co3"/>
            <table:table-row table:style-name="ro1" table:default-cell-style-name="ce1">
              <table:table-cell>
                <text:p text:style-name="P20"><text:span text:style-name="T76">Type of project</text:span></text:p>
              </table:table-cell>
              <table:table-cell>
                <text:p text:style-name="P20"><text:span text:style-name="T76">Approving authority</text:span></text:p>
              </table:table-cell>
              <table:table-cell>
                <text:p text:style-name="P20"><text:span text:style-name="T76">Advisory authority</text:span></text:p>
              </table:table-cell>
            </table:table-row>
            <table:table-row table:style-name="ro2" table:default-cell-style-name="ce1">
              <table:table-cell>
                <text:p text:style-name="P20"><text:span text:style-name="T77">Research on personal data which are not health-related</text:span></text:p>
              </table:table-cell>
              <table:table-cell>
                <text:p text:style-name="P20"><text:span text:style-name="T77">Privacy protection officer </text:span></text:p>
              </table:table-cell>
              <table:table-cell>
                <text:p text:style-name="P20"><text:span text:style-name="T77">Datatilsynet/Privacy Protection ombud</text:span></text:p>
              </table:table-cell>
            </table:table-row>
            <table:table-row table:style-name="ro1" table:default-cell-style-name="ce1">
              <table:table-cell>
                <text:p text:style-name="P20"><text:span text:style-name="T77">Human biological material</text:span></text:p>
              </table:table-cell>
              <table:table-cell>
                <text:p text:style-name="P20"><text:span text:style-name="T77">REK </text:span></text:p>
              </table:table-cell>
              <table:table-cell>
                <text:p text:style-name="P20"><text:span text:style-name="T77">REK</text:span></text:p>
              </table:table-cell>
            </table:table-row>
            <table:table-row table:style-name="ro1" table:default-cell-style-name="ce1">
              <table:table-cell>
                <text:p text:style-name="P20"><text:span text:style-name="T77">Health data</text:span></text:p>
              </table:table-cell>
              <table:table-cell>
                <text:p text:style-name="P20"><text:span text:style-name="T77">REK </text:span></text:p>
              </table:table-cell>
              <table:table-cell>
                <text:p text:style-name="P20"><text:span text:style-name="T77">Datatilsynet + REK</text:span></text:p>
              </table:table-cell>
            </table:table-row>
            <table:table-row table:style-name="ro1" table:default-cell-style-name="ce1">
              <table:table-cell>
                <text:p text:style-name="P20"><text:span text:style-name="T77">Involving test persons</text:span></text:p>
              </table:table-cell>
              <table:table-cell>
                <text:p text:style-name="P20"><text:span text:style-name="T77">REK </text:span></text:p>
              </table:table-cell>
              <table:table-cell>
                <text:p text:style-name="P20"><text:span text:style-name="T77">REK</text:span></text:p>
              </table:table-cell>
            </table:table-row>
            <table:table-row table:style-name="ro1" table:default-cell-style-name="ce1">
              <table:table-cell>
                <text:p text:style-name="P20"><text:span text:style-name="T77">Radiation on humans</text:span></text:p>
              </table:table-cell>
              <table:table-cell>
                <text:p text:style-name="P20"><text:span text:style-name="T77">REK </text:span></text:p>
              </table:table-cell>
              <table:table-cell>
                <text:p text:style-name="P20"><text:span text:style-name="T77">REK</text:span></text:p>
              </table:table-cell>
            </table:table-row>
            <table:table-row table:style-name="ro6" table:default-cell-style-name="ce1">
              <table:table-cell>
                <text:p text:style-name="P20"><text:span text:style-name="T77">Medicines, dietary supplements, natural substances or other substances</text:span></text:p>
              </table:table-cell>
              <table:table-cell>
                <text:p text:style-name="P20"><text:span text:style-name="T77">Norwegian Medicines Agency + REK </text:span></text:p>
              </table:table-cell>
              <table:table-cell>
                <text:p text:style-name="P20"><text:span text:style-name="T77">Norwegian Medicines Agency + REK</text:span></text:p>
              </table:table-cell>
            </table:table-row>
            <table:table-row table:style-name="ro7" table:default-cell-style-name="ce1">
              <table:table-cell>
                <text:p text:style-name="P20"><text:span text:style-name="T77">Medical equipment is used on humans</text:span></text:p>
              </table:table-cell>
              <table:table-cell>
                <text:p text:style-name="P20"><text:span text:style-name="T77">The Norwegian Directorate of Health + REK </text:span></text:p>
              </table:table-cell>
              <table:table-cell>
                <text:p text:style-name="P20"><text:span text:style-name="T77">The Norwegian Directorate of Health</text:span></text:p>
              </table:table-cell>
            </table:table-row>
          </table:table>
          <draw:image xlink:href="Pictures/TablePreview7.svm" xlink:type="simple" xlink:show="embed" xlink:actuate="onLoad"/>
        </draw:frame>
        <draw:custom-shape draw:name="Google Shape;941;p138" draw:style-name="gr54" draw:text-style-name="P42" draw:layer="layout" svg:width="11.593cm" svg:height="1.802cm" svg:x="7.194cm" svg:y="0.78cm">
          <text:p text:style-name="P16"><text:span text:style-name="T37">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42;p138" draw:style-name="gr58" draw:text-style-name="P8" draw:layer="layout" svg:width="22.102cm" svg:height="0.89cm" svg:x="1.025cm" svg:y="13.562cm">
          <text:p text:style-name="P7"><text:span text:style-name="T78"><text:a xlink:href="https://www.uio.no/english/for-employees/support/research/quality-system-for-health-research/approvals-and-authorizations/" xlink:type="simple">https://www.uio.no/english/for-employees/support/research/quality-system-for-health-research/approvals-and-authorizations/</text:a></text:span><text:span text:style-name="T7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936;p46: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937;p46:notes" draw:style-name="gr3" draw:layer="layout" svg:width="0.002cm" svg:height="0.002cm" svg:x="0cm" svg:y="1.931cm" draw:page-number="46" presentation:class="page"/>
          <draw:frame draw:name="Google Shape;938;p46:notes" presentation:style-name="pr49" draw:text-style-name="P10" draw:layer="layout" svg:width="15.238cm" svg:height="11.428cm" svg:x="1.905cm" svg:y="12.065cm" presentation:class="notes" presentation:placeholder="true" presentation:user-transformed="true">
            <draw:text-box/>
          </draw:frame>
        </presentation:notes>
      </draw:page>
      <draw:page draw:name="page47" draw:style-name="dp1" draw:master-page-name="BLANK">
        <draw:custom-shape draw:name="Google Shape;948;p139" draw:style-name="gr4" draw:text-style-name="P8" draw:layer="layout" svg:width="22.858cm" svg:height="2.151cm" svg:x="1.27cm" svg:y="0.245cm">
          <text:p text:style-name="P11"><text:span text:style-name="T75">Contact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9;p139" draw:style-name="gr59" draw:text-style-name="P8" draw:layer="layout" svg:width="13.485cm" svg:height="11.462cm" svg:x="0.736cm" svg:y="2.094cm">
          <text:p text:style-name="P3"><text:span text:style-name="T45">Data Protection Officers</text:span></text:p>
          <text:p text:style-name="P46"><text:span text:style-name="T44"/></text:p>
          <text:p text:style-name="P47"><text:span text:style-name="T45">UiB</text:span><text:span text:style-name="T44">: Janecke.Veim@uib.no</text:span></text:p>
          <text:p text:style-name="P47"><text:span text:style-name="T45">NTNU</text:span><text:span text:style-name="T44">: thomas.helgesen@ntnu.no</text:span></text:p>
          <text:p text:style-name="P47"><text:span text:style-name="T45">UiT</text:span><text:span text:style-name="T44">: personvernombud@uit.no</text:span></text:p>
          <text:p text:style-name="P47"><text:span text:style-name="T45">NMBU</text:span><text:span text:style-name="T44">: </text:span><text:span text:style-name="T80"><text:a xlink:href="mailto:personvernombud@nmbu.no" xlink:type="simple">personvernombud@nmbu.no</text:a></text:span></text:p>
          <text:p text:style-name="P47"><text:span text:style-name="T45">UiO</text:span><text:span text:style-name="T44">: personvernombudet@uio.no</text:span></text:p>
          <text:p text:style-name="P3"><text:span text:style-name="T44"/></text:p>
          <text:p text:style-name="P3"><text:span text:style-name="T44"/></text:p>
          <text:p text:style-name="P3"><text:span text:style-name="T45">REK</text:span></text:p>
          <text:p text:style-name="P3"><text:span text:style-name="T44"/></text:p>
          <text:p text:style-name="P17"><text:span text:style-name="T44">rek-vest@uib.no</text:span></text:p>
          <text:p text:style-name="P17"><text:span text:style-name="T44">rek-midt@mh.ntnu.no</text:span></text:p>
          <text:p text:style-name="P17"><text:span text:style-name="T44">rek-nord@asp.uit.no</text:span></text:p>
          <text:p text:style-name="P17"><text:span text:style-name="T80"><text:a xlink:href="mailto:rek-sorost@medisin.uio.no" xlink:type="simple">rek-sorost@medisin.uio.no</text:a></text:span></text:p>
          <text:p text:style-name="P3"><text:span text:style-name="T44"/></text:p>
          <text:p text:style-name="P3"><text:span text:style-name="T45">Sikt</text:span><text:span text:style-name="T44"> - sikt.no</text:span></text:p>
          <text:p text:style-name="P3"><text:span text:style-name="T44"/></text:p>
          <text:p text:style-name="P3"><text:span text:style-name="T44"/></text:p>
          <text:p text:style-name="P3"><text:span text:style-name="T44"/></text:p>
          <text:p text:style-name="P3"><text:span text:style-name="T4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0;p139" draw:style-name="gr60" draw:text-style-name="P8" draw:layer="layout" svg:width="5.825cm" svg:height="0.84cm" svg:x="18.886cm" svg:y="8.935cm">
          <text:p text:style-name="P20"><text:span text:style-name="T81"><text:a xlink:href="https://rekportalen.no/#home/REK" xlink:type="simple">rekportalen.no</text:a></text:span></text:p>
          <text:p text:style-name="P20"><text:span text:style-name="T11"/></text:p>
          <text:p text:style-name="P4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51;p139" draw:style-name="gr2" draw:text-style-name="P9" draw:layer="layout" svg:width="7.832cm" svg:height="9.893cm" svg:x="10.731cm" svg:y="2.27cm">
          <draw:image xlink:href="Pictures/100002010000022B000002BD0E32064FAEB92C37.png" xlink:type="simple" xlink:show="embed" xlink:actuate="onLoad">
            <text:p/>
          </draw:image>
        </draw:frame>
        <draw:frame draw:name="Google Shape;952;p139" draw:style-name="gr2" draw:text-style-name="P9" draw:layer="layout" svg:width="10.072cm" svg:height="2.151cm" svg:x="14.999cm" svg:y="6.661cm">
          <draw:image xlink:href="Pictures/100002010000021A00000073B3ADA33C6E567737.png" xlink:type="simple" xlink:show="embed" xlink:actuate="onLoad">
            <text:p/>
          </draw:image>
        </draw:frame>
        <presentation:notes draw:style-name="dp2">
          <draw:custom-shape draw:name="Google Shape;944;p47:notes" draw:style-name="gr6" draw:text-style-name="P8" draw:layer="layout" svg:width="8.257cm" svg:height="1.264cm" svg:x="10.782cm" svg:y="24.13cm">
            <text:p text:style-name="P7"><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945;p47:notes" draw:style-name="gr3" draw:layer="layout" svg:width="16.931cm" svg:height="9.523cm" svg:x="1.058cm" svg:y="1.931cm" draw:page-number="47" presentation:class="page"/>
          <draw:frame draw:name="Google Shape;946;p47:notes" presentation:style-name="pr50" draw:text-style-name="P10" draw:layer="layout" svg:width="15.238cm" svg:height="11.428cm" svg:x="1.905cm" svg:y="12.065cm" presentation:class="notes" presentation:placeholder="true" presentation:user-transformed="true">
            <draw:text-box/>
          </draw:frame>
        </presentation:notes>
      </draw:page>
      <draw:page draw:name="page48" draw:style-name="dp1" draw:master-page-name="Default_20_1" presentation:presentation-page-layout-name="AL1T1">
        <draw:frame draw:name="Google Shape;957;p140" draw:style-name="gr61" draw:text-style-name="P9" draw:layer="layout" svg:width="13.714cm" svg:height="11.718cm" svg:x="0.496cm" svg:y="1.148cm">
          <draw:image xlink:href="Pictures/100002010000044F000003A3D50AD686DBC0D52F.png" xlink:type="simple" xlink:show="embed" xlink:actuate="onLoad">
            <text:p/>
          </draw:image>
        </draw:frame>
        <draw:custom-shape draw:name="Google Shape;958;p140" draw:style-name="gr62" draw:text-style-name="P8" draw:layer="layout" svg:width="11.005cm" svg:height="2.851cm" svg:x="14.212cm" svg:y="5.991cm">
          <text:p text:style-name="P48"><text:span text:style-name="T82">Best practices and guidelines to help you </text:span><text:span text:style-name="T3"><text:line-break/></text:span><text:span text:style-name="T82">make your data FAIR (</text:span><text:span text:style-name="T83">F</text:span><text:span text:style-name="T82">indable, </text:span><text:span text:style-name="T83">A</text:span><text:span text:style-name="T82">ccessible, </text:span><text:span text:style-name="T83">I</text:span><text:span text:style-name="T82">nteroperable and </text:span><text:span text:style-name="T83">R</text:span><text:span text:style-name="T82">eus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9;p140" draw:style-name="gr63" draw:text-style-name="P49" draw:layer="layout" svg:width="0.997cm" svg:height="0.997cm" svg:x="16.752cm" svg:y="8.979cm">
          <text:p text:style-name="P16"><text:span text:style-name="T84">F</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60;p140" draw:style-name="gr63" draw:text-style-name="P49" draw:layer="layout" svg:width="0.997cm" svg:height="0.997cm" svg:x="18.394cm" svg:y="8.979cm">
          <text:p text:style-name="P16"><text:span text:style-name="T84">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61;p140" draw:style-name="gr63" draw:text-style-name="P49" draw:layer="layout" svg:width="0.997cm" svg:height="0.997cm" svg:x="20.036cm" svg:y="8.979cm">
          <text:p text:style-name="P16"><text:span text:style-name="T84">I</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62;p140" draw:style-name="gr63" draw:text-style-name="P49" draw:layer="layout" svg:width="0.997cm" svg:height="0.997cm" svg:x="21.678cm" svg:y="8.979cm">
          <text:p text:style-name="P16"><text:span text:style-name="T84">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63;p140" draw:style-name="gr64" draw:text-style-name="P8" draw:layer="layout" svg:width="9.041cm" svg:height="1.216cm" svg:x="15.539cm" svg:y="10.637cm">
          <text:p text:style-name="P7"><text:a xlink:href="https://rdmkit.elixir-europe.org/index.html" xlink:type="simple">rdmkit.elixir-europe.org</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4;p140" draw:style-name="gr65" draw:text-style-name="P8" draw:layer="layout" svg:width="5.546cm" svg:height="4.056cm" svg:x="16.752cm" svg:y="1.51cm">
          <text:p text:style-name="P7"><text:span text:style-name="T85">R</text:span><text:span text:style-name="T86">esearch</text:span></text:p>
          <text:p text:style-name="P7"><text:span text:style-name="T85">D</text:span><text:span text:style-name="T86">ata</text:span><text:span text:style-name="T85"> </text:span></text:p>
          <text:p text:style-name="P7"><text:span text:style-name="T85">M</text:span><text:span text:style-name="T86">anagement</text:span><text:span text:style-name="T85"> k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5;p140" draw:style-name="gr66" draw:text-style-name="P8" draw:layer="layout" svg:width="4.44cm" svg:height="2.363cm" svg:x="0.496cm" svg:y="8.154cm">
          <text:p text:style-name="P7"><text:span text:style-name="T4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54;p48:notes" presentation:style-name="pr51" draw:text-style-name="P10" draw:layer="layout" svg:width="16.798cm" svg:height="13.363cm" svg:x="2.1cm" svg:y="14.107cm" presentation:class="notes" presentation:placeholder="true" presentation:user-transformed="true">
            <draw:text-box/>
          </draw:frame>
          <draw:page-thumbnail draw:name="Google Shape;955;p48:notes" draw:style-name="gr3" draw:layer="layout" svg:width="19.797cm" svg:height="11.135cm" svg:x="0.6cm" svg:y="2.257cm" draw:page-number="48" presentation:class="page"/>
        </presentation:notes>
      </draw:page>
      <draw:page draw:name="page49" draw:style-name="dp1" draw:master-page-name="TWO_5f_OBJECTS" presentation:presentation-page-layout-name="AL2T3">
        <draw:frame draw:name="Google Shape;970;p141" draw:style-name="gr67" draw:text-style-name="P9" draw:layer="layout" svg:width="4.345cm" svg:height="14.02cm" svg:x="4.04cm" svg:y="0cm">
          <draw:image xlink:href="Pictures/100002010000051600000432C5304727C0ECF49D.png" xlink:type="simple" xlink:show="embed" xlink:actuate="onLoad">
            <text:p/>
          </draw:image>
        </draw:frame>
        <draw:frame draw:name="Google Shape;971;p141" draw:style-name="gr68" draw:text-style-name="P9" draw:layer="layout" svg:width="15.153cm" svg:height="10.772cm" svg:x="8.884cm" svg:y="1.956cm">
          <draw:image xlink:href="Pictures/100002010000051600000432C5304727C0ECF49D.png" xlink:type="simple" xlink:show="embed" xlink:actuate="onLoad">
            <text:p/>
          </draw:image>
        </draw:frame>
        <draw:custom-shape draw:name="Google Shape;972;p141" draw:style-name="gr66" draw:text-style-name="P8" draw:layer="layout" svg:width="3.231cm" svg:height="0.561cm" svg:x="4.292cm" svg:y="12.729cm">
          <text:p text:style-name="P7"><text:span text:style-name="T4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3;p141" draw:style-name="gr66" draw:text-style-name="P8" draw:layer="layout" svg:width="3.231cm" svg:height="0.404cm" svg:x="4.292cm" svg:y="6.357cm">
          <text:p text:style-name="P7"><text:span text:style-name="T4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67;p49:notes" presentation:style-name="pr52" draw:text-style-name="P10" draw:layer="layout" svg:width="16.798cm" svg:height="13.363cm" svg:x="2.1cm" svg:y="14.107cm" presentation:class="notes" presentation:placeholder="true" presentation:user-transformed="true">
            <draw:text-box/>
          </draw:frame>
          <draw:page-thumbnail draw:name="Google Shape;968;p49:notes" draw:style-name="gr3" draw:layer="layout" svg:width="19.797cm" svg:height="11.135cm" svg:x="0.6cm" svg:y="2.257cm" draw:page-number="49" presentation:class="page"/>
        </presentation:notes>
      </draw:page>
      <draw:page draw:name="page50" draw:style-name="dp1" draw:master-page-name="Default_20_1" presentation:presentation-page-layout-name="AL1T1">
        <draw:frame draw:name="Google Shape;978;p142" draw:style-name="gr61" draw:text-style-name="P9" draw:layer="layout" svg:width="13.714cm" svg:height="11.718cm" svg:x="0.496cm" svg:y="1.148cm">
          <draw:image xlink:href="Pictures/100002010000044F000003A3D50AD686DBC0D52F.png" xlink:type="simple" xlink:show="embed" xlink:actuate="onLoad">
            <text:p/>
          </draw:image>
        </draw:frame>
        <draw:custom-shape draw:name="Google Shape;979;p142" draw:style-name="gr62" draw:text-style-name="P8" draw:layer="layout" svg:width="11.005cm" svg:height="2.851cm" svg:x="14.212cm" svg:y="5.991cm">
          <text:p text:style-name="P48"><text:span text:style-name="T82">Best practices and guidelines to help you </text:span><text:span text:style-name="T3"><text:line-break/></text:span><text:span text:style-name="T82">make your data FAIR (</text:span><text:span text:style-name="T83">F</text:span><text:span text:style-name="T82">indable, </text:span><text:span text:style-name="T83">A</text:span><text:span text:style-name="T82">ccessible, </text:span><text:span text:style-name="T83">I</text:span><text:span text:style-name="T82">nteroperable and </text:span><text:span text:style-name="T83">R</text:span><text:span text:style-name="T82">eus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0;p142" draw:style-name="gr63" draw:text-style-name="P49" draw:layer="layout" svg:width="0.997cm" svg:height="0.997cm" svg:x="16.752cm" svg:y="8.979cm">
          <text:p text:style-name="P16"><text:span text:style-name="T84">F</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1;p142" draw:style-name="gr63" draw:text-style-name="P49" draw:layer="layout" svg:width="0.997cm" svg:height="0.997cm" svg:x="18.394cm" svg:y="8.979cm">
          <text:p text:style-name="P16"><text:span text:style-name="T84">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2;p142" draw:style-name="gr63" draw:text-style-name="P49" draw:layer="layout" svg:width="0.997cm" svg:height="0.997cm" svg:x="20.036cm" svg:y="8.979cm">
          <text:p text:style-name="P16"><text:span text:style-name="T84">I</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3;p142" draw:style-name="gr63" draw:text-style-name="P49" draw:layer="layout" svg:width="0.997cm" svg:height="0.997cm" svg:x="21.678cm" svg:y="8.979cm">
          <text:p text:style-name="P16"><text:span text:style-name="T84">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4;p142" draw:style-name="gr65" draw:text-style-name="P8" draw:layer="layout" svg:width="5.546cm" svg:height="4.056cm" svg:x="16.752cm" svg:y="1.51cm">
          <text:p text:style-name="P7"><text:span text:style-name="T85">R</text:span><text:span text:style-name="T86">esearch</text:span></text:p>
          <text:p text:style-name="P7"><text:span text:style-name="T85">D</text:span><text:span text:style-name="T86">ata</text:span><text:span text:style-name="T85"> </text:span></text:p>
          <text:p text:style-name="P7"><text:span text:style-name="T85">M</text:span><text:span text:style-name="T86">anagement</text:span><text:span text:style-name="T85"> k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5;p142" draw:style-name="gr66" draw:text-style-name="P8" draw:layer="layout" svg:width="4.44cm" svg:height="2.363cm" svg:x="9.77cm" svg:y="8.154cm">
          <text:p text:style-name="P7"><text:span text:style-name="T4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6;p142" draw:style-name="gr64" draw:text-style-name="P8" draw:layer="layout" svg:width="17.576cm" svg:height="1.216cm" svg:x="0.927cm" svg:y="12.983cm">
          <text:p text:style-name="P7"><text:span text:style-name="T87"><text:a xlink:href="https://rdmkit.elixir-europe.org/index.html" xlink:type="simple">https://rdmkit.elixir-europe.org</text:a></text:span><text:span text:style-name="T88">/national_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75;p50:notes" presentation:style-name="pr53" draw:text-style-name="P10" draw:layer="layout" svg:width="16.798cm" svg:height="13.363cm" svg:x="2.1cm" svg:y="14.107cm" presentation:class="notes" presentation:placeholder="true" presentation:user-transformed="true">
            <draw:text-box/>
          </draw:frame>
          <draw:page-thumbnail draw:name="Google Shape;976;p50:notes" draw:style-name="gr3" draw:layer="layout" svg:width="19.797cm" svg:height="11.135cm" svg:x="0.6cm" svg:y="2.257cm" draw:page-number="50" presentation:class="page"/>
        </presentation:notes>
      </draw:page>
      <draw:page draw:name="page51" draw:style-name="dp1" draw:master-page-name="TWO_5f_OBJECTS" presentation:presentation-page-layout-name="AL2T3">
        <draw:custom-shape draw:name="Google Shape;991;p143" draw:style-name="gr69" draw:text-style-name="P8" draw:layer="layout" svg:width="21.089cm" svg:height="2.05cm" svg:x="2.676cm" svg:y="-0.764cm">
          <text:p text:style-name="P7"><text:span text:style-name="T3"><text:line-break/></text:span><text:span text:style-name="T3"><text:line-break/></text:span><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2;p143" draw:style-name="gr64" draw:text-style-name="P8" draw:layer="layout" svg:width="17.576cm" svg:height="1.216cm" svg:x="2.832cm" svg:y="12.771cm">
          <text:p text:style-name="P7"><text:span text:style-name="T89"><text:a xlink:href="https://rdmkit.elixir-europe.org/index.html" xlink:type="simple">https://rdmkit.elixir-europe.org</text:a></text:span><text:span text:style-name="T90">/no_resourc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3;p143" draw:style-name="gr9" draw:text-style-name="P8" draw:layer="layout" svg:width="23.666cm" svg:height="1.589cm" svg:x="1.118cm" svg:y="0.429cm">
          <text:p text:style-name="P50"><text:span text:style-name="T91">RDMkit: National resources in Nor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94;p143" draw:style-name="gr2" draw:text-style-name="P9" draw:layer="layout" svg:width="1.61cm" svg:height="1.17cm" svg:x="23.098cm" svg:y="0.638cm">
          <draw:image xlink:href="Pictures/100000000000020000000174C5E145BF6683B30C.png" xlink:type="simple" xlink:show="embed" xlink:actuate="onLoad">
            <text:p/>
          </draw:image>
        </draw:frame>
        <draw:frame draw:name="Google Shape;995;p143" draw:style-name="gr70" draw:text-style-name="P9" draw:layer="layout" svg:width="21.453cm" svg:height="9.325cm" svg:x="1.643cm" svg:y="2.732cm">
          <draw:image xlink:href="Pictures/1000020100000800000002C52A8C77E23918652F.png" xlink:type="simple" xlink:show="embed" xlink:actuate="onLoad">
            <text:p/>
          </draw:image>
        </draw:frame>
        <presentation:notes draw:style-name="dp2">
          <draw:frame draw:name="Google Shape;988;p51:notes" presentation:style-name="pr54" draw:text-style-name="P10" draw:layer="layout" svg:width="16.798cm" svg:height="13.363cm" svg:x="2.1cm" svg:y="14.107cm" presentation:class="notes" presentation:placeholder="true" presentation:user-transformed="true">
            <draw:text-box/>
          </draw:frame>
          <draw:page-thumbnail draw:name="Google Shape;989;p51:notes" draw:style-name="gr3" draw:layer="layout" svg:width="19.797cm" svg:height="11.135cm" svg:x="0.6cm" svg:y="2.257cm" draw:page-number="51" presentation:class="page"/>
        </presentation:notes>
      </draw:page>
      <draw:page draw:name="page52" draw:style-name="dp1" draw:master-page-name="Default_20_2">
        <draw:custom-shape draw:name="Google Shape;1001;p144" draw:style-name="gr62" draw:text-style-name="P8" draw:layer="layout" svg:width="7.186cm" svg:height="1.761cm" svg:x="16.16cm" svg:y="4.673cm">
          <text:p text:style-name="P51"><text:span text:style-name="T2">Thank you</text:span><text:span text:style-name="T92"><text:line-break/></text:span><text:span text:style-name="T9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2;p144" draw:style-name="gr65" draw:text-style-name="P8" draw:layer="layout" svg:width="5.993cm" svg:height="1.116cm" svg:x="18.37cm" svg:y="11.013cm">
          <text:p text:style-name="P7"><text:span text:style-name="T93">LinkedIn: ELIXIR Norway </text:span><text:span text:style-name="T44"><text:line-break/></text:span><text:span text:style-name="T44"/></text:p>
          <text:p text:style-name="P7"><text:span text:style-name="T4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3;p144" draw:style-name="gr62" draw:text-style-name="P8" draw:layer="layout" svg:width="7.186cm" svg:height="1.761cm" svg:x="15.283cm" svg:y="12.916cm">
          <text:p text:style-name="P51"><text:span text:style-name="T94">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4;p144" draw:style-name="gr71" draw:text-style-name="P8" draw:layer="layout" svg:width="10.566cm" svg:height="1.937cm" svg:x="14.47cm" svg:y="8.173cm">
          <text:p text:style-name="P52"><text:span text:style-name="T95">Except where otherwise noted, this work is licensed under a</text:span></text:p>
          <text:p text:style-name="P52"><text:span text:style-name="T96"><text:a xlink:href="http://creativecommons.org/licenses/by-nc/4.0/" xlink:type="simple">Creative Commons Attribution 4.0 International License</text:a></text:span></text:p>
          <text:p text:style-name="P52"><text:span text:style-name="T96"><text:a xlink:href="https://creativecommons.org/licenses/by/4.0/" xlink:type="simple">https://creativecommons.org/licenses/by/4.0/</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05;p144" draw:style-name="gr2" draw:text-style-name="P9" draw:layer="layout" svg:width="2.722cm" svg:height="1.198cm" svg:x="18.626cm" svg:y="6.834cm">
          <draw:image xlink:href="Pictures/10000201000002C4000001389E17077FD2C9D029.png" xlink:type="simple" xlink:show="embed" xlink:actuate="onLoad">
            <text:p/>
          </draw:image>
        </draw:frame>
        <draw:custom-shape draw:name="Google Shape;1006;p144" draw:style-name="gr72" draw:text-style-name="P53" draw:layer="layout" svg:width="0.594cm" svg:height="0.536cm" svg:x="18.873cm" svg:y="13.032cm">
          <text:p/>
          <draw:enhanced-geometry draw:mirror-horizontal="false" draw:mirror-vertical="false" drawooo:sub-view-size="8014 6384" draw:text-areas="0 0 ?f0 ?f1" svg:viewBox="0 0 0 0" draw:type="ooxml-non-primitive" draw:enhanced-path="M 7432 5656 L 7432 2174 7286 2329 7131 2474 6840 2697 6568 2911 6297 3124 6064 3328 5821 3503 5608 3677 5414 3842 5230 4007 5113 4094 5026 4172 4939 4250 4861 4308 4774 4356 4686 4415 4589 4473 4463 4521 4347 4580 4240 4618 4114 4638 4007 4647 4007 4647 4007 4647 3900 4638 3774 4618 3668 4580 3551 4521 3435 4473 3328 4415 3241 4356 3153 4308 3086 4250 2989 4172 2901 4094 2785 4007 2610 3842 2406 3677 2193 3503 1960 3328 1718 3124 1446 2911 1174 2697 883 2474 728 2329 583 2174 583 5656 592 5705 612 5763 660 5792 718 5802 7296 5802 7354 5792 7403 5763 7432 5705 Z M 7432 883 L 7432 864 7432 845 7432 806 7432 777 7432 747 7432 718 7432 680 7432 660 7412 641 7403 621 7383 602 7364 583 7325 573 7296 573 718 573 660 583 612 621 592 670 583 718 592 903 612 1087 670 1262 748 1427 835 1582 951 1727 1087 1873 1233 2009 1669 2348 2115 2707 2571 3076 3027 3444 3047 3464 3076 3493 3115 3522 3183 3580 3250 3639 3299 3677 3347 3716 3386 3755 3435 3784 3474 3823 3590 3891 3706 3968 3813 4017 3920 4046 4007 4056 4007 4056 4007 4056 4104 4046 4201 4017 4308 3968 4434 3891 4492 3852 4541 3823 4589 3784 4628 3755 4667 3716 4725 3677 4774 3639 4832 3580 4900 3522 4939 3493 4968 3464 4987 3444 5443 3076 5909 2707 6345 2348 6782 2009 6908 1902 7015 1786 7121 1640 7238 1485 7325 1330 7393 1174 7432 1019 Z M 8014 718 L 8014 5656 8004 5724 7994 5802 7985 5870 7956 5938 7936 6006 7897 6054 7849 6112 7800 6171 7752 6219 7694 6258 7626 6297 7577 6335 7509 6345 7432 6365 7374 6374 7296 6384 718 6384 641 6374 583 6365 505 6345 447 6335 389 6297 321 6258 272 6219 214 6171 165 6112 117 6054 88 6006 59 5938 30 5870 20 5802 10 5724 1 5656 1 718 10 650 20 573 30 515 59 447 88 379 117 321 165 262 214 204 272 156 321 117 389 78 447 39 505 20 583 10 641 0 718 0 7296 0 7374 0 7432 10 7509 20 7577 39 7626 78 7694 117 7752 156 7800 204 7849 262 7897 321 7936 379 7956 447 7985 515 7994 573 8004 650 Z N">
            <draw:equation draw:name="f0" draw:formula="logwidth"/>
            <draw:equation draw:name="f1" draw:formula="logheight"/>
          </draw:enhanced-geometry>
        </draw:custom-shape>
        <presentation:notes draw:style-name="dp2">
          <draw:page-thumbnail draw:name="Google Shape;997;p52:notes" draw:style-name="gr3" draw:layer="layout" svg:width="15.238cm" svg:height="8.571cm" svg:x="1.905cm" svg:y="3.175cm" draw:page-number="52" presentation:class="page"/>
          <draw:frame draw:name="Google Shape;998;p52:notes" presentation:style-name="pr55" draw:text-style-name="P10" draw:layer="layout" svg:width="15.238cm" svg:height="10cm" svg:x="1.905cm" svg:y="12.224cm" presentation:class="notes" presentation:placeholder="true" presentation:user-transformed="true">
            <draw:text-box/>
          </draw:frame>
          <draw:custom-shape draw:name="Google Shape;999;p52:notes" draw:style-name="gr49" draw:text-style-name="P8" draw:layer="layout" svg:width="8.253cm" svg:height="1.272cm" svg:x="10.791cm" svg:y="24.126cm">
            <text:p text:style-name="P51"><text:span text:style-name="T4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ce style:name="Exo 2" svg:font-family="'Exo 2'"/>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_20_ELIXIR-background" style:display-name="Title slide ELIXIR-background" style:family="presentation">
      <style:graphic-properties draw:stroke="none" draw:fill="solid" draw:fill-color="#fafafa"/>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shrink-to-fit"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_20_ELIXIR-outline2" style:display-name="Title slide ELIXIR-outline2" style:family="presentation" style:parent-style-name="Title_20_slide_20_ELIXI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3" style:display-name="Title slide ELIXIR-outline3" style:family="presentation" style:parent-style-name="Title_20_slide_20_ELIXI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4" style:display-name="Title slide ELIXIR-outline4" style:family="presentation" style:parent-style-name="Title_20_slide_20_ELIXI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02345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shrink-to-fit" style:shrink-to-fit="true">
        <text:list-style style:name="TWO_5f_OBJECTS-outline1" style:display-name="TWO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3" style:display-name="TWO_OBJECTS-outline3" style:family="presentation" style:parent-style-name="TWO_5f_OBJECT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4" style:display-name="TWO_OBJECTS-outline4" style:family="presentation" style:parent-style-name="TWO_5f_OBJECT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text:list-style style:name="TWO_5f_OBJECTS-title" style:display-name="TWO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afafa"/>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023452"/>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2.161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068cm" fo:padding-bottom="0.068cm" fo:padding-left="0.136cm" fo:padding-right="0.136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2.164cm, 0cm, 0cm)" draw:image-opacity="100%" style:mirror="none"/>
    </style:style>
    <style:style style:name="Mgr7" style:family="graphic" style:parent-style-name="standard">
      <style:graphic-properties draw:stroke="none" svg:stroke-width="0cm" draw:fill="solid" draw:fill-color="#fafafa"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1.151cm, 0cm)" draw:image-opacity="100%" style:mirror="none"/>
    </style:style>
    <style:style style:name="Mpr1" style:family="presentation" style:parent-style-name="Title_20_slide_20_ELIXIR-backgroundobjects">
      <style:graphic-properties draw:stroke="none" draw:fill="none" draw:fill-color="#ffffff" draw:auto-grow-height="false" fo:min-height="1.485cm"/>
    </style:style>
    <style:style style:name="Mpr2" style:family="presentation" style:parent-style-name="Title_20_slide_20_ELIXIR-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27cm"/>
    </style:style>
    <style:style style:name="Mpr4" style:family="presentation" style:parent-style-name="BLANK-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Default_20_1-backgroundobjects">
      <style:graphic-properties draw:stroke="none" draw:fill="none" draw:fill-color="#ffffff" draw:auto-grow-height="false" fo:min-height="1.27cm"/>
    </style:style>
    <style:style style:name="Mpr10" style:family="presentation" style:parent-style-name="Default_20_1-backgroundobjects">
      <style:graphic-properties draw:stroke="none" draw:fill="none" draw:fill-color="#ffffff" draw:textarea-vertical-align="bottom" draw:auto-grow-height="false" fo:min-height="1.27cm"/>
    </style:style>
    <style:style style:name="Mpr11" style:family="presentation" style:parent-style-name="TWO_5f_OBJECTS-backgroundobjects">
      <style:graphic-properties draw:stroke="none" draw:fill="none" draw:fill-color="#ffffff" draw:auto-grow-height="false" fo:min-height="1.27cm"/>
    </style:style>
    <style:style style:name="Mpr12" style:family="presentation" style:parent-style-name="TWO_5f_OBJECTS-backgroundobjects">
      <style:graphic-properties draw:stroke="none" draw:fill="none" draw:fill-color="#ffffff" draw:textarea-vertical-align="bottom" draw:auto-grow-height="false" fo:min-height="1.27cm"/>
    </style:style>
    <style:style style:name="Mpr13" style:family="presentation" style:parent-style-name="Default_20_2-backgroundobjects">
      <style:graphic-properties draw:stroke="none" draw:fill="none" draw:fill-color="#ffffff" draw:auto-grow-height="false" fo:min-height="1.27cm"/>
    </style:style>
    <style:style style:name="Mpr14" style:family="presentation" style:parent-style-name="Default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P8" style:family="paragraph">
      <loext:graphic-properties draw:fill="solid" draw:fill-color="#fafafa"/>
      <style:paragraph-properties fo:text-align="start" style:font-independent-line-spacing="true"/>
      <style:text-properties fo:font-size="14pt"/>
    </style:style>
    <style:style style:name="MT1" style:family="text">
      <style:text-properties fo:font-variant="normal" fo:text-transform="none" fo:color="#003f41" style:text-line-through-style="none" style:text-line-through-type="none" style:text-position="0% 100%" style:font-name="Corbel" fo:font-size="18pt" fo:letter-spacing="normal" fo:font-style="italic" style:text-underline-style="none" fo:font-weight="normal" style:font-name-asian="Corbel" style:font-size-asian="18pt" style:font-style-asian="italic" style:font-weight-asian="normal" style:font-name-complex="Corbel" style:font-size-complex="18pt" style:font-style-complex="italic" style:font-weight-complex="normal"/>
    </style:style>
    <style:style style:name="MT2" style:family="text">
      <style:text-properties fo:font-variant="normal" fo:text-transform="none" fo:color="#023452" style:text-line-through-style="none" style:text-line-through-type="none" style:text-position="0% 100%" style:font-name="Open Sans" fo:font-size="18pt" fo:letter-spacing="normal" fo:font-style="italic" style:text-underline-style="none" fo:font-weight="normal" style:font-name-asian="Open Sans" style:font-size-asian="18pt" style:font-style-asian="italic" style:font-weight-asian="normal" style:font-name-complex="Open Sans" style:font-size-complex="18pt" style:font-style-complex="italic" style:font-weight-complex="normal"/>
    </style:style>
    <style:style style:name="MT3" style:family="text">
      <style:text-properties fo:font-variant="normal" fo:text-transform="none" fo:color="#4d4848" style:text-line-through-style="none" style:text-line-through-type="none" style:text-position="0% 100%" style:font-name="Open Sans" fo:font-size="18pt" fo:letter-spacing="normal" fo:font-style="italic" style:text-underline-style="none" fo:font-weight="normal" style:font-name-asian="Open Sans" style:font-size-asian="18pt" style:font-style-asian="italic" style:font-weight-asian="normal" style:font-name-complex="Open Sans" style:font-size-complex="18pt" style:font-style-complex="italic"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_20_ELIXIR" style:display-name="Title slide ELIXIR" style:page-layout-name="PM1" draw:style-name="Mdp1">
      <draw:frame draw:name="Google Shape;11;p1" draw:style-name="Mgr3" draw:text-style-name="MP5" draw:layer="backgroundobjects" svg:width="11.939cm" svg:height="14.285cm" svg:x="0cm" svg:y="0cm">
        <draw:image xlink:href="Pictures/1000020100000800000005A87429A934D158A4D1.png" xlink:type="simple" xlink:show="embed" xlink:actuate="onLoad">
          <text:p/>
        </draw:image>
      </draw:frame>
      <draw:custom-shape draw:name="Google Shape;12;p1" draw:style-name="Mgr4" draw:text-style-name="MP7" draw:layer="backgroundobjects" svg:width="8.129cm" svg:height="0.904cm" svg:x="16.243cm" svg:y="12.994cm">
        <text:p text:style-name="MP6"><text:span text:style-name="MT1">elixi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p1" draw:style-name="Mgr5" draw:text-style-name="MP5" draw:layer="backgroundobjects" svg:width="5.398cm" svg:height="4.095cm" svg:x="1.258cm" svg:y="5.069cm">
        <draw:image xlink:href="Pictures/1000020100000800000006129C498E2C5ABF3C41.png" xlink:type="simple" xlink:show="embed" xlink:actuate="onLoad">
          <text:p/>
        </draw:image>
      </draw:frame>
      <draw:frame draw:name="Google Shape;64;p14" presentation:style-name="Title_20_slide_20_ELIXIR-outline1" draw:layer="backgroundobjects" svg:width="9.401cm" svg:height="0.749cm" svg:x="14.973cm" svg:y="9.936cm" presentation:class="outline" presentation:placeholder="true" presentation:user-transformed="true">
        <draw:text-box/>
      </draw:frame>
      <draw:frame draw:name="Google Shape;65;p14" draw:style-name="Mgr6" draw:text-style-name="MP5" draw:layer="backgroundobjects" svg:width="11.94cm" svg:height="14.286cm" svg:x="0cm" svg:y="0cm">
        <draw:image xlink:href="Pictures/1000020100000800000005A87429A934D158A4D1.png" xlink:type="simple" xlink:show="embed" xlink:actuate="onLoad">
          <text:p/>
        </draw:image>
      </draw:frame>
      <draw:custom-shape draw:name="Google Shape;66;p14" draw:style-name="Mgr4" draw:text-style-name="MP7" draw:layer="backgroundobjects" svg:width="8.131cm" svg:height="0.905cm" svg:x="16.243cm" svg:y="12.994cm">
        <text:p text:style-name="MP6"><text:span text:style-name="MT1">elixi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p14" presentation:style-name="Title_20_slide_20_ELIXIR-title" draw:layer="backgroundobjects" svg:width="13.661cm" svg:height="4.996cm" svg:x="10.712cm" svg:y="3.369cm" presentation:class="title" presentation:placeholder="true" presentation:user-transformed="true">
        <draw:text-box/>
      </draw:frame>
      <draw:frame draw:name="Google Shape;69;p14" draw:style-name="Mgr5" draw:text-style-name="MP5" draw:layer="backgroundobjects" svg:width="5.398cm" svg:height="4.096cm" svg:x="1.258cm" svg:y="5.069cm">
        <draw:image xlink:href="Pictures/1000020100000800000006129C498E2C5ABF3C41.png" xlink:type="simple" xlink:show="embed" xlink:actuate="onLoad">
          <text:p/>
        </draw:image>
      </draw:frame>
      <presentation:notes style:page-layout-name="PM2">
        <draw:page-thumbnail presentation:style-name="Title_20_slide_20_ELIXIR-title" draw:layer="backgroundobjects" svg:width="19.798cm" svg:height="11.136cm" svg:x="0.6cm" svg:y="2.257cm" presentation:class="page"/>
        <draw:frame presentation:style-name="Title_20_slide_20_ELIXIR-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2">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3">
      <draw:frame draw:name="Google Shape;125;p28" draw:style-name="Mgr5" draw:text-style-name="MP5" draw:layer="backgroundobjects" svg:width="11.485cm" svg:height="14.692cm" draw:transform="rotate (1.5707963267949) translate (-0.001cm 10.599cm)">
        <draw:image xlink:href="Pictures/100002010000064100000800ABB327E47C0DA0AA.png" xlink:type="simple" xlink:show="embed" xlink:actuate="onLoad">
          <text:p/>
        </draw:image>
      </draw:frame>
      <draw:custom-shape draw:name="Google Shape;126;p28" draw:style-name="Mgr7" draw:text-style-name="MP8" draw:layer="backgroundobjects" svg:width="11.413cm" svg:height="4.182cm" svg:x="0cm" svg:y="2.4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28" draw:style-name="Mgr8" draw:text-style-name="MP7" draw:layer="backgroundobjects" svg:width="8.69cm" svg:height="1.088cm" svg:x="0.768cm" svg:y="3.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8;p28" draw:style-name="Mgr5" draw:text-style-name="MP5" draw:layer="backgroundobjects" svg:width="5.716cm" svg:height="7.449cm" draw:transform="rotate (1.62228353972873) translate (13.057cm 8.286cm)">
        <draw:image xlink:href="Pictures/100002010000042700000569970680E867B6566F.png" xlink:type="simple" xlink:show="embed" xlink:actuate="onLoad">
          <text:p/>
        </draw:image>
      </draw:frame>
      <draw:frame draw:name="Google Shape;129;p28" draw:style-name="Mgr5" draw:text-style-name="MP5" draw:layer="backgroundobjects" svg:width="5.059cm" svg:height="5.432cm" draw:transform="rotate (-2.82743338823081) translate (20.497cm 6.549cm)">
        <draw:image xlink:href="Pictures/100002010000043C0000048C60519F59D334BE38.png" xlink:type="simple" xlink:show="embed" xlink:actuate="onLoad">
          <text:p/>
        </draw:image>
      </draw:fram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Google Shape;187;p42" presentation:style-name="TITLE_5f_AND_5f_BODY-title" draw:layer="backgroundobjects" svg:width="13.66cm" svg:height="3.816cm" svg:x="11.339cm" svg:y="6.213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 style:display-name="Default 1" style:page-layout-name="PM1" draw:style-name="Mdp2">
      <draw:frame draw:name="Google Shape;239;p55" presentation:style-name="Default_20_1-title" draw:layer="backgroundobjects" svg:width="13.66cm" svg:height="3.816cm" svg:x="11.339cm" svg:y="6.213cm" presentation:class="title" presentation:placeholder="true" presentation:user-transformed="true">
        <draw:text-box/>
      </draw:frame>
      <draw:frame presentation:style-name="Default_20_1-outline1" draw:layer="backgroundobjects" svg:width="22.859cm" svg:height="8.286cm" svg:x="1.27cm" svg:y="3.343cm" presentation:class="outline" presentation:placeholder="true">
        <draw:text-box/>
      </draw:frame>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WO_5f_OBJECTS" style:display-name="TWO_OBJECTS" style:page-layout-name="PM1" draw:style-name="Mdp2">
      <draw:frame draw:name="Google Shape;292;p68" presentation:style-name="TWO_5f_OBJECTS-title" draw:layer="backgroundobjects" svg:width="13.66cm" svg:height="3.816cm" svg:x="11.339cm" svg:y="6.213cm" presentation:class="title" presentation:placeholder="true" presentation:user-transformed="true">
        <draw:text-box/>
      </draw:frame>
      <draw:frame draw:name="Google Shape;293;p68" presentation:style-name="TWO_5f_OBJECTS-outline1" draw:layer="backgroundobjects" svg:width="11.154cm" svg:height="8.285cm" svg:x="1.27cm" svg:y="3.343cm" presentation:class="outline" presentation:placeholder="true" presentation:user-transformed="true">
        <draw:text-box/>
      </draw:frame>
      <draw:frame draw:name="Google Shape;294;p68" presentation:style-name="TWO_5f_OBJECTS-outline1" draw:layer="backgroundobjects" svg:width="11.154cm" svg:height="8.285cm" svg:x="12.984cm" svg:y="3.343cm" presentation:class="outline" presentation:placeholder="true" presentation:user-transformed="true">
        <draw:text-box/>
      </draw:frame>
      <presentation:notes style:page-layout-name="PM2">
        <draw:page-thumbnail presentation:style-name="TWO_5f_OBJECTS-title" draw:layer="backgroundobjects" svg:width="16.931cm" svg:height="9.524cm" svg:x="1.059cm" svg:y="1.93cm" presentation:class="page"/>
        <draw:frame presentation:style-name="TWO_5f_OBJECT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2" style:display-name="Default 2" style:page-layout-name="PM1" draw:style-name="Mdp2">
      <draw:frame draw:name="Google Shape;340;p80" draw:style-name="Mgr9" draw:text-style-name="MP5" draw:layer="backgroundobjects" svg:width="25.398cm" svg:height="9.056cm" svg:x="0cm" svg:y="-0.577cm">
        <draw:image xlink:href="Pictures/100002010000080000000480310B4D60D3BBC837.png" xlink:type="simple" xlink:show="embed" xlink:actuate="onLoad">
          <text:p/>
        </draw:image>
      </draw:frame>
      <draw:custom-shape draw:name="Google Shape;341;p80" draw:style-name="Mgr4" draw:text-style-name="MP7" draw:layer="backgroundobjects" svg:width="8.129cm" svg:height="0.904cm" svg:x="16.742cm" svg:y="12.857cm">
        <text:p text:style-name="MP6"><text:span text:style-name="MT2">elixi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3;p80" draw:style-name="Mgr5" draw:text-style-name="MP5" draw:layer="backgroundobjects" svg:width="5.298cm" svg:height="3.992cm" svg:x="1.642cm" svg:y="9.313cm">
        <draw:image xlink:href="Pictures/10000201000009C40000075B0A51E3C3CD88BC07.png" xlink:type="simple" xlink:show="embed" xlink:actuate="onLoad">
          <text:p/>
        </draw:image>
      </draw:frame>
      <draw:custom-shape draw:name="Google Shape;344;p80" draw:style-name="Mgr4" draw:text-style-name="MP7" draw:layer="backgroundobjects" svg:width="7.808cm" svg:height="0.904cm" svg:x="17.191cm" svg:y="10.166cm">
        <text:p text:style-name="MP6"><text:span text:style-name="MT3">Follow us on social med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_20_2-title" draw:layer="backgroundobjects" svg:width="16.931cm" svg:height="9.524cm" svg:x="1.059cm" svg:y="1.93cm" presentation:class="page"/>
        <draw:frame presentation:style-name="Default_20_2-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89"/>
    <meta:generator>LibreOfficeDev/6.0.5.2$Linux_X86_64 LibreOffice_project/</meta:generator>
  </office:meta>
</office:document-meta>
</file>